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A7000000339C0C1EFE.png" manifest:media-type="image/png"/>
  <manifest:file-entry manifest:full-path="Pictures/10000001000000950000008C532D0D87.png" manifest:media-type="image/png"/>
  <manifest:file-entry manifest:full-path="Pictures/10000001000000B1000000C88C7F792A.png" manifest:media-type="image/png"/>
  <manifest:file-entry manifest:full-path="Pictures/10000001000002CA000001BE74CFA7DF.png" manifest:media-type="image/png"/>
  <manifest:file-entry manifest:full-path="Pictures/10000001000001EF000002C028E869AD.png" manifest:media-type="image/png"/>
  <manifest:file-entry manifest:full-path="Pictures/100000010000009F000000841D66284B.png" manifest:media-type="image/png"/>
  <manifest:file-entry manifest:full-path="Pictures/100000010000096000000708B550DF44.png" manifest:media-type="image/png"/>
  <manifest:file-entry manifest:full-path="Pictures/100000010000096000000708F8E4565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monospace" style:font-family-generic="modern" style:font-pitch="fixed"/>
    <style:font-face style:name="Droid Sans Mono" svg:font-family="'Droid Sans Mono', monospace, monospace"/>
    <style:font-face style:name="Helvetica" svg:font-family="Helvetica"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nlo" svg:font-family="Menlo, Monaco, Consolas, 'Cascadia Mono', 'Ubuntu Mono', 'DejaVu Sans Mono', 'Liberation Mono', 'JetBrains Mono', 'Fira Code', Cousine, 'Roboto Mono', 'Courier New', Courier, sans-serif, system-ui"/>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face style:name="Times New" svg:font-family="'Times New'"/>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Verdana" svg:font-family="Verdana" style:font-family-generic="swiss" style:font-pitch="variable"/>
    <style:font-face style:name="Wingdings" svg:font-family="Wingdings" style:font-pitch="variable" style:font-charset="x-symbol"/>
    <style:font-face style:name="quote-cjk-patch" svg:font-family="quote-cjk-patch, Inter, system-ui, apple-system, BlinkMacSystemFont, 'Segoe UI', Roboto, Oxygen, Ubuntu, Cantarell, 'Open Sans', 'Helvetica Neue', sans-serif"/>
  </office:font-face-decls>
  <office:automatic-styles>
    <style:style style:name="Таблица1" style:family="table">
      <style:table-properties style:width="17cm" style:rel-width="100%" fo:margin-left="-0.191cm" table:align="left" style:writing-mode="lr-tb"/>
    </style:style>
    <style:style style:name="Таблица1.A" style:family="table-column">
      <style:table-column-properties style:column-width="7.188cm" style:rel-column-width="4166*"/>
    </style:style>
    <style:style style:name="Таблица1.B" style:family="table-column">
      <style:table-column-properties style:column-width="4.207cm" style:rel-column-width="2438*"/>
    </style:style>
    <style:style style:name="Таблица1.C" style:family="table-column">
      <style:table-column-properties style:column-width="5.607cm" style:rel-column-width="3250*"/>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2" style:family="table">
      <style:table-properties style:width="17cm" style:rel-width="100%" fo:margin-left="0cm" table:align="left" style:writing-mode="lr-tb"/>
    </style:style>
    <style:style style:name="Таблица2.A" style:family="table-column">
      <style:table-column-properties style:column-width="7.357cm" style:rel-column-width="4171*"/>
    </style:style>
    <style:style style:name="Таблица2.B" style:family="table-column">
      <style:table-column-properties style:column-width="4.203cm" style:rel-column-width="2383*"/>
    </style:style>
    <style:style style:name="Таблица2.C" style:family="table-column">
      <style:table-column-properties style:column-width="5.44cm" style:rel-column-width="3084*"/>
    </style:style>
    <style:style style:name="Таблица2.1" style:family="table-row">
      <style:table-row-properties style:min-row-height="1.191cm" fo:keep-together="auto"/>
    </style:style>
    <style:style style:name="Таблица2.A1" style:family="table-cell">
      <style:table-cell-properties style:vertical-align="middle" fo:padding-left="0.191cm" fo:padding-right="0.191cm" fo:padding-top="0cm" fo:padding-bottom="0cm" fo:border="none" style:writing-mode="lr-tb"/>
    </style:style>
    <style:style style:name="Таблица2.2" style:family="table-row">
      <style:table-row-properties style:min-row-height="1.212cm" fo:keep-together="auto"/>
    </style:style>
    <style:style style:name="Таблица2.3" style:family="table-row">
      <style:table-row-properties style:min-row-height="1.236cm" fo:keep-together="auto"/>
    </style:style>
    <style:style style:name="Таблица2.4" style:family="table-row">
      <style:table-row-properties style:min-row-height="3.567cm" fo:keep-together="auto"/>
    </style:style>
    <style:style style:name="Таблица2.5" style:family="table-row">
      <style:table-row-properties style:min-row-height="3.844cm" fo:keep-together="auto"/>
    </style:style>
    <style:style style:name="Таблица2.6" style:family="table-row">
      <style:table-row-properties style:min-row-height="1.725cm" fo:keep-together="auto"/>
    </style:style>
    <style:style style:name="Таблица2.7" style:family="table-row">
      <style:table-row-properties style:min-row-height="1.487cm" fo:keep-together="auto"/>
    </style:style>
    <style:style style:name="Таблица2.8" style:family="table-row">
      <style:table-row-properties style:min-row-height="1.459cm" fo:keep-together="auto"/>
    </style:style>
    <style:style style:name="Таблица2.9" style:family="table-row">
      <style:table-row-properties style:min-row-height="1.125cm" fo:keep-together="auto"/>
    </style:style>
    <style:style style:name="Таблица2.10" style:family="table-row">
      <style:table-row-properties style:min-row-height="1.083cm" fo:keep-together="auto"/>
    </style:style>
    <style:style style:name="Таблица2.A10" style:family="table-cell">
      <style:table-cell-properties style:vertical-align="bottom" fo:padding-left="0.191cm" fo:padding-right="0.191cm" fo:padding-top="0cm" fo:padding-bottom="0cm" fo:border="none" style:writing-mode="lr-tb"/>
    </style:style>
    <style:style style:name="Таблица2.B11" style:family="table-cell">
      <style:table-cell-properties style:vertical-align="bottom" fo:padding-left="0.191cm" fo:padding-right="0.191cm" fo:padding-top="0cm" fo:padding-bottom="0cm" fo:border-left="none" fo:border-right="none" fo:border-top="0.05pt solid #000000" fo:border-bottom="0.05pt solid #000000" style:writing-mode="lr-tb"/>
    </style:style>
    <style:style style:name="Таблица3" style:family="table">
      <style:table-properties style:width="17.38cm" fo:margin-left="-0.191cm" table:align="left" style:writing-mode="lr-tb"/>
    </style:style>
    <style:style style:name="Таблица3.A" style:family="table-column">
      <style:table-column-properties style:column-width="1.415cm"/>
    </style:style>
    <style:style style:name="Таблица3.B" style:family="table-column">
      <style:table-column-properties style:column-width="14.36cm"/>
    </style:style>
    <style:style style:name="Таблица3.C" style:family="table-column">
      <style:table-column-properties style:column-width="1.605cm"/>
    </style:style>
    <style:style style:name="Таблица3.1" style:family="table-row">
      <style:table-row-properties fo:keep-together="auto"/>
    </style:style>
    <style:style style:name="Таблица3.A1" style:family="table-cell">
      <style:table-cell-properties style:vertical-align="middle" fo:padding-left="0.191cm" fo:padding-right="0.191cm" fo:padding-top="0cm" fo:padding-bottom="0cm" fo:border="none" style:writing-mode="lr-tb"/>
    </style:style>
    <style:style style:name="Таблица22" style:family="table">
      <style:table-properties style:width="17cm" table:align="margins" style:writing-mode="lr-tb"/>
    </style:style>
    <style:style style:name="Таблица22.A" style:family="table-column">
      <style:table-column-properties style:column-width="3.588cm" style:rel-column-width="2034*"/>
    </style:style>
    <style:style style:name="Таблица22.B" style:family="table-column">
      <style:table-column-properties style:column-width="2.697cm" style:rel-column-width="1529*"/>
    </style:style>
    <style:style style:name="Таблица22.C" style:family="table-column">
      <style:table-column-properties style:column-width="2.704cm" style:rel-column-width="1533*"/>
    </style:style>
    <style:style style:name="Таблица22.D" style:family="table-column">
      <style:table-column-properties style:column-width="2.6cm" style:rel-column-width="1474*"/>
    </style:style>
    <style:style style:name="Таблица22.E" style:family="table-column">
      <style:table-column-properties style:column-width="5.412cm" style:rel-column-width="3068*"/>
    </style:style>
    <style:style style:name="Таблица22.A1" style:family="table-cell">
      <style:table-cell-properties fo:padding="0.097cm" fo:border-left="0.5pt solid #000000" fo:border-right="none" fo:border-top="0.5pt solid #000000" fo:border-bottom="0.5pt solid #000000"/>
    </style:style>
    <style:style style:name="Таблица22.E1" style:family="table-cell">
      <style:table-cell-properties fo:padding="0.097cm" fo:border="0.5pt solid #000000"/>
    </style:style>
    <style:style style:name="Таблица22.A2" style:family="table-cell">
      <style:table-cell-properties fo:padding="0.097cm" fo:border-left="0.5pt solid #000000" fo:border-right="none" fo:border-top="none" fo:border-bottom="0.5pt solid #000000"/>
    </style:style>
    <style:style style:name="Таблица22.E2" style:family="table-cell">
      <style:table-cell-properties fo:padding="0.097cm" fo:border-left="0.5pt solid #000000" fo:border-right="0.5pt solid #000000" fo:border-top="none" fo:border-bottom="0.5pt solid #000000"/>
    </style:style>
    <style:style style:name="Таблица4" style:family="table">
      <style:table-properties style:width="17cm" table:align="margins" style:writing-mode="lr-tb"/>
    </style:style>
    <style:style style:name="Таблица4.A" style:family="table-column">
      <style:table-column-properties style:column-width="17cm" style:rel-column-width="65535*"/>
    </style:style>
    <style:style style:name="Таблица4.A1" style:family="table-cell">
      <style:table-cell-properties fo:padding="0.097cm" fo:border="none"/>
    </style:style>
    <style:style style:name="Таблица5" style:family="table">
      <style:table-properties style:width="17cm" table:align="margins" style:writing-mode="lr-tb"/>
    </style:style>
    <style:style style:name="Таблица5.A" style:family="table-column">
      <style:table-column-properties style:column-width="17cm" style:rel-column-width="65535*"/>
    </style:style>
    <style:style style:name="Таблица5.A1" style:family="table-cell">
      <style:table-cell-properties fo:padding="0.097cm" fo:border="none"/>
    </style:style>
    <style:style style:name="Таблица6" style:family="table">
      <style:table-properties style:width="17cm" table:align="margins" style:writing-mode="lr-tb"/>
    </style:style>
    <style:style style:name="Таблица6.A" style:family="table-column">
      <style:table-column-properties style:column-width="1.184cm" style:rel-column-width="671*"/>
    </style:style>
    <style:style style:name="Таблица6.B" style:family="table-column">
      <style:table-column-properties style:column-width="4.704cm" style:rel-column-width="2668*"/>
    </style:style>
    <style:style style:name="Таблица6.C" style:family="table-column">
      <style:table-column-properties style:column-width="3.609cm" style:rel-column-width="2047*"/>
    </style:style>
    <style:style style:name="Таблица6.D" style:family="table-column">
      <style:table-column-properties style:column-width="3.274cm" style:rel-column-width="1857*"/>
    </style:style>
    <style:style style:name="Таблица6.E" style:family="table-column">
      <style:table-column-properties style:column-width="4.228cm" style:rel-column-width="2398*"/>
    </style:style>
    <style:style style:name="Таблица6.A1" style:family="table-cell">
      <style:table-cell-properties fo:padding="0.097cm" fo:border-left="0.5pt solid #000000" fo:border-right="none" fo:border-top="0.5pt solid #000000" fo:border-bottom="0.5pt solid #000000"/>
    </style:style>
    <style:style style:name="Таблица6.E1" style:family="table-cell">
      <style:table-cell-properties fo:padding="0.097cm" fo:border="0.5pt solid #000000"/>
    </style:style>
    <style:style style:name="Таблица6.A2" style:family="table-cell">
      <style:table-cell-properties fo:padding="0.097cm" fo:border-left="0.5pt solid #000000" fo:border-right="none" fo:border-top="none" fo:border-bottom="0.5pt solid #000000"/>
    </style:style>
    <style:style style:name="Таблица6.E2" style:family="table-cell">
      <style:table-cell-properties fo:padding="0.097cm" fo:border-left="0.5pt solid #000000" fo:border-right="0.5pt solid #000000" fo:border-top="none" fo:border-bottom="0.5pt solid #000000"/>
    </style:style>
    <style:style style:name="Таблица7" style:family="table">
      <style:table-properties style:width="17cm" table:align="margins" style:writing-mode="lr-tb"/>
    </style:style>
    <style:style style:name="Таблица7.A" style:family="table-column">
      <style:table-column-properties style:column-width="17cm" style:rel-column-width="65535*"/>
    </style:style>
    <style:style style:name="Таблица7.A1" style:family="table-cell">
      <style:table-cell-properties fo:padding="0.097cm" fo:border="none"/>
    </style:style>
    <style:style style:name="Таблица8" style:family="table">
      <style:table-properties style:width="17cm" table:align="margins" style:writing-mode="lr-tb"/>
    </style:style>
    <style:style style:name="Таблица8.A" style:family="table-column">
      <style:table-column-properties style:column-width="17cm" style:rel-column-width="65535*"/>
    </style:style>
    <style:style style:name="Таблица8.1" style:family="table-row">
      <style:table-row-properties style:min-row-height="5.893cm"/>
    </style:style>
    <style:style style:name="Таблица8.A1" style:family="table-cell">
      <style:table-cell-properties fo:padding="0.097cm" fo:border="none"/>
    </style:style>
    <style:style style:name="Таблица9" style:family="table">
      <style:table-properties style:width="17cm" table:align="margins" style:writing-mode="lr-tb"/>
    </style:style>
    <style:style style:name="Таблица9.A" style:family="table-column">
      <style:table-column-properties style:column-width="17cm" style:rel-column-width="65535*"/>
    </style:style>
    <style:style style:name="Таблица9.1" style:family="table-row">
      <style:table-row-properties style:min-row-height="3.896cm"/>
    </style:style>
    <style:style style:name="Таблица9.A1" style:family="table-cell">
      <style:table-cell-properties fo:padding="0.097cm" fo:border="none"/>
    </style:style>
    <style:style style:name="Таблица10" style:family="table">
      <style:table-properties style:width="17cm" table:align="margins" style:writing-mode="lr-tb"/>
    </style:style>
    <style:style style:name="Таблица10.A" style:family="table-column">
      <style:table-column-properties style:column-width="17cm" style:rel-column-width="65535*"/>
    </style:style>
    <style:style style:name="Таблица10.1" style:family="table-row">
      <style:table-row-properties style:min-row-height="1.804cm"/>
    </style:style>
    <style:style style:name="Таблица10.A1" style:family="table-cell">
      <style:table-cell-properties fo:padding="0.097cm" fo:border="none"/>
    </style:style>
    <style:style style:name="Таблица10.2" style:family="table-row">
      <style:table-row-properties style:min-row-height="0.882cm"/>
    </style:style>
    <style:style style:name="Таблица11" style:family="table">
      <style:table-properties style:width="17cm" table:align="margins" style:writing-mode="lr-tb"/>
    </style:style>
    <style:style style:name="Таблица11.A" style:family="table-column">
      <style:table-column-properties style:column-width="17cm" style:rel-column-width="65535*"/>
    </style:style>
    <style:style style:name="Таблица11.1" style:family="table-row">
      <style:table-row-properties style:min-row-height="4.209cm"/>
    </style:style>
    <style:style style:name="Таблица11.A1" style:family="table-cell">
      <style:table-cell-properties fo:padding="0.097cm" fo:border="none"/>
    </style:style>
    <style:style style:name="P1" style:family="paragraph" style:parent-style-name="Header">
      <style:paragraph-properties fo:margin-right="-0.002cm"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text-properties officeooo:paragraph-rsid="00410b01"/>
    </style:style>
    <style:style style:name="P4"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5" style:family="paragraph" style:parent-style-name="Standard">
      <style:paragraph-properties fo:line-height="150%" fo:text-align="center" style:justify-single-word="false" fo:break-before="page"/>
      <style:text-properties fo:text-transform="uppercase" fo:font-size="14pt" fo:font-weight="bold" style:font-size-asian="14pt" style:font-weight-asian="bold" style:font-size-complex="14pt"/>
    </style:style>
    <style:style style:name="P6" style:family="paragraph" style:parent-style-name="Standard">
      <style:paragraph-properties fo:margin-right="0cm" fo:line-height="150%" fo:text-align="justify" style:justify-single-word="false" fo:text-indent="1.251cm" style:auto-text-indent="false"/>
      <style:text-properties fo:text-transform="uppercase" fo:font-size="14pt" fo:font-weight="bold" style:font-size-asian="14pt" style:font-weight-asian="bold" style:font-size-complex="14pt"/>
    </style:style>
    <style:style style:name="P7" style:family="paragraph" style:parent-style-name="Standard">
      <style:text-properties fo:text-transform="uppercase" fo:font-size="14pt" fo:font-weight="bold" style:font-size-asian="14pt" style:font-weight-asian="bold" style:font-size-complex="14pt"/>
    </style:style>
    <style:style style:name="P8"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fo:text-transform="uppercase" fo:font-size="14pt" fo:font-weight="bold" officeooo:rsid="003d8a2c" officeooo:paragraph-rsid="003d8a2c" style:font-size-asian="14pt" style:font-weight-asian="bold" style:font-size-complex="14pt"/>
    </style:style>
    <style:style style:name="P10" style:family="paragraph" style:parent-style-name="Standard">
      <style:paragraph-properties fo:line-height="150%" fo:text-align="center" style:justify-single-word="false"/>
      <style:text-properties fo:text-transform="uppercase" fo:font-size="14pt" fo:language="en" fo:country="US" fo:font-weight="bold" style:font-size-asian="14pt" style:font-weight-asian="bold" style:font-size-complex="14pt"/>
    </style:style>
    <style:style style:name="P11" style:family="paragraph" style:parent-style-name="Standard">
      <style:paragraph-properties fo:line-height="150%" fo:text-align="center" style:justify-single-word="false"/>
    </style:style>
    <style:style style:name="P12" style:family="paragraph" style:parent-style-name="Times14_5f_РИО2">
      <style:paragraph-properties fo:margin-right="0cm" fo:line-height="150%" fo:text-align="center" style:justify-single-word="false" fo:text-indent="0cm" style:auto-text-indent="false">
        <style:tab-stops/>
      </style:paragraph-properties>
    </style:style>
    <style:style style:name="P13" style:family="paragraph" style:parent-style-name="Standard">
      <style:paragraph-properties fo:line-height="150%" fo:text-align="center" style:justify-single-word="false" fo:break-before="page"/>
      <style:text-properties officeooo:paragraph-rsid="002d9130"/>
    </style:style>
    <style:style style:name="P14" style:family="paragraph" style:parent-style-name="Standard">
      <style:paragraph-properties fo:line-height="150%" fo:text-align="center" style:justify-single-word="false"/>
      <style:text-properties officeooo:paragraph-rsid="002d9130"/>
    </style:style>
    <style:style style:name="P15" style:family="paragraph" style:parent-style-name="Standard">
      <style:paragraph-properties fo:line-height="150%" fo:text-align="start" style:justify-single-word="false"/>
    </style:style>
    <style:style style:name="P16" style:family="paragraph" style:parent-style-name="Standard">
      <style:paragraph-properties fo:margin-right="0cm" fo:line-height="150%" fo:text-align="justify" style:justify-single-word="false" fo:text-indent="0cm" style:auto-text-indent="false"/>
      <style:text-properties officeooo:paragraph-rsid="000b4c66"/>
    </style:style>
    <style:style style:name="P17" style:family="paragraph" style:parent-style-name="Standard">
      <style:paragraph-properties fo:line-height="150%" fo:text-align="center" style:justify-single-word="false"/>
      <style:text-properties fo:font-size="14pt" style:font-size-asian="14pt" style:font-size-complex="14pt"/>
    </style:style>
    <style:style style:name="P18" style:family="paragraph" style:parent-style-name="Standard">
      <style:paragraph-properties fo:line-height="150%" fo:text-align="start" style:justify-single-word="false"/>
      <style:text-properties fo:font-size="14pt" style:font-size-asian="14pt" style:font-size-complex="14pt"/>
    </style:style>
    <style:style style:name="P19" style:family="paragraph" style:parent-style-name="Standard">
      <style:paragraph-properties fo:line-height="150%" fo:text-align="start" style:justify-single-word="false" style:snap-to-layout-grid="false"/>
      <style:text-properties fo:font-size="14pt" style:font-size-asian="14pt" style:font-size-complex="14pt"/>
    </style:style>
    <style:style style:name="P20" style:family="paragraph" style:parent-style-name="Standard">
      <style:paragraph-properties style:snap-to-layout-grid="false"/>
      <style:text-properties fo:font-size="14pt" style:font-size-asian="14pt" style:font-size-complex="14pt"/>
    </style:style>
    <style:style style:name="P21" style:family="paragraph" style:parent-style-name="Standard">
      <style:text-properties fo:font-size="14pt" style:font-size-asian="14pt" style:font-size-complex="14pt"/>
    </style:style>
    <style:style style:name="P22"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23" style:family="paragraph" style:parent-style-name="Standard">
      <style:paragraph-properties fo:line-height="100%" fo:text-align="start" style:justify-single-word="false"/>
      <style:text-properties fo:font-size="14pt" style:font-size-asian="14pt" style:font-size-complex="14pt"/>
    </style:style>
    <style:style style:name="P24" style:family="paragraph" style:parent-style-name="Standard">
      <style:paragraph-properties fo:line-height="150%" fo:text-align="center" style:justify-single-word="false"/>
      <style:text-properties fo:font-size="14pt" officeooo:rsid="003d8a2c" officeooo:paragraph-rsid="003d8a2c" style:font-size-asian="14pt" style:font-size-complex="14pt"/>
    </style:style>
    <style:style style:name="P25" style:family="paragraph" style:parent-style-name="Standard">
      <style:paragraph-properties fo:line-height="150%" fo:text-align="start" style:justify-single-word="false" style:snap-to-layout-grid="false"/>
      <style:text-properties fo:font-size="14pt" fo:language="en" fo:country="US" style:font-size-asian="14pt" style:font-size-complex="14pt"/>
    </style:style>
    <style:style style:name="P26" style:family="paragraph" style:parent-style-name="Standard">
      <style:paragraph-properties fo:text-align="center" style:justify-single-word="false"/>
      <style:text-properties fo:color="#000000" loext:opacity="100%" fo:font-size="14pt" officeooo:rsid="00058a87" officeooo:paragraph-rsid="00058a87" style:font-size-asian="14pt" style:font-size-complex="14pt"/>
    </style:style>
    <style:style style:name="P27" style:family="paragraph" style:parent-style-name="Standard">
      <style:paragraph-properties fo:line-height="100%" fo:text-align="center" style:justify-single-word="false"/>
      <style:text-properties fo:color="#000000" loext:opacity="100%" fo:font-size="14pt" officeooo:rsid="00058a87" officeooo:paragraph-rsid="00058a87" style:font-size-asian="14pt" style:font-size-complex="14pt"/>
    </style:style>
    <style:style style:name="P28" style:family="paragraph" style:parent-style-name="Standard">
      <style:paragraph-properties fo:line-height="150%" fo:text-align="center" style:justify-single-word="false"/>
      <style:text-properties fo:color="#000000" loext:opacity="100%" fo:font-size="14pt" officeooo:rsid="00058a87" officeooo:paragraph-rsid="00058a87" style:font-size-asian="14pt" style:font-size-complex="14pt" style:font-weight-complex="bold"/>
    </style:style>
    <style:style style:name="P29" style:family="paragraph" style:parent-style-name="Standard">
      <style:paragraph-properties fo:line-height="150%" fo:text-align="center" style:justify-single-word="false" style:snap-to-layout-grid="false"/>
      <style:text-properties fo:color="#000000" loext:opacity="100%" fo:font-size="14pt" style:font-size-asian="14pt" style:font-size-complex="14pt" style:font-weight-complex="bold"/>
    </style:style>
    <style:style style:name="P30" style:family="paragraph" style:parent-style-name="Standard">
      <style:paragraph-properties fo:line-height="150%" fo:text-align="center" style:justify-single-word="false"/>
      <style:text-properties fo:color="#000000" loext:opacity="100%" fo:font-size="14pt" style:font-size-asian="14pt" style:font-size-complex="14pt" style:font-weight-complex="bold"/>
    </style:style>
    <style:style style:name="P31" style:family="paragraph" style:parent-style-name="Standard">
      <style:paragraph-properties fo:margin-right="0cm" fo:line-height="150%" fo:text-align="center" style:justify-single-word="false" fo:text-indent="0cm" style:auto-text-indent="false"/>
      <style:text-properties fo:color="#000000" loext:opacity="100%" fo:font-size="14pt" style:font-size-asian="14pt" style:font-size-complex="14pt" style:font-weight-complex="bold"/>
    </style:style>
    <style:style style:name="P32" style:family="paragraph" style:parent-style-name="Standard">
      <style:paragraph-properties fo:line-height="150%"/>
      <style:text-properties fo:color="#000000" loext:opacity="100%" fo:font-size="14pt" style:font-size-asian="14pt" style:font-size-complex="14pt" style:font-weight-complex="bold"/>
    </style:style>
    <style:style style:name="P33" style:family="paragraph" style:parent-style-name="Standard">
      <style:paragraph-properties fo:line-height="150%" fo:text-align="center" style:justify-single-word="false"/>
      <style:text-properties fo:color="#000000" loext:opacity="100%" fo:font-size="14pt" officeooo:rsid="000b4b8b" officeooo:paragraph-rsid="000b4b8b" style:font-size-asian="14pt" style:font-size-complex="14pt" style:font-weight-complex="bold"/>
    </style:style>
    <style:style style:name="P34" style:family="paragraph" style:parent-style-name="Standard">
      <style:paragraph-properties fo:margin-right="0cm" fo:line-height="150%" fo:text-align="center" style:justify-single-word="false" fo:text-indent="0cm" style:auto-text-indent="false"/>
      <style:text-properties fo:color="#000000" loext:opacity="100%" fo:font-size="14pt" officeooo:rsid="000b4b8b" officeooo:paragraph-rsid="000b4b8b" style:font-size-asian="14pt" style:font-size-complex="14pt" style:font-weight-complex="bold"/>
    </style:style>
    <style:style style:name="P35" style:family="paragraph" style:parent-style-name="Standard">
      <style:paragraph-properties fo:line-height="150%" fo:text-align="start" style:justify-single-word="false" style:snap-to-layout-grid="false"/>
      <style:text-properties fo:color="#000000" loext:opacity="100%" fo:font-size="14pt" officeooo:rsid="000b4b8b" officeooo:paragraph-rsid="000b4b8b" style:font-size-asian="14pt" style:font-size-complex="14pt" style:font-weight-complex="bold"/>
    </style:style>
    <style:style style:name="P36" style:family="paragraph" style:parent-style-name="Standard">
      <style:paragraph-properties fo:line-height="150%" style:snap-to-layout-grid="false"/>
      <style:text-properties fo:color="#000000" loext:opacity="100%" fo:font-size="14pt" officeooo:rsid="000b4b8b" officeooo:paragraph-rsid="000b4b8b" style:font-size-asian="14pt" style:font-size-complex="14pt" style:font-weight-complex="bold"/>
    </style:style>
    <style:style style:name="P37" style:family="paragraph" style:parent-style-name="Standard">
      <style:paragraph-properties fo:line-height="150%" fo:text-align="start" style:justify-single-word="false"/>
      <style:text-properties fo:color="#000000" loext:opacity="100%" fo:font-size="14pt" officeooo:rsid="0009f83a" officeooo:paragraph-rsid="0009f83a" style:font-size-asian="14pt" style:font-size-complex="14pt" style:font-weight-complex="bold"/>
    </style:style>
    <style:style style:name="P38" style:family="paragraph" style:parent-style-name="Standard">
      <style:paragraph-properties fo:line-height="150%" fo:text-align="start" style:justify-single-word="false"/>
      <style:text-properties fo:color="#000000" loext:opacity="100%" fo:font-size="14pt" officeooo:rsid="0009f83a" officeooo:paragraph-rsid="002d9130" style:font-size-asian="14pt" style:font-size-complex="14pt" style:font-weight-complex="bold"/>
    </style:style>
    <style:style style:name="P39" style:family="paragraph" style:parent-style-name="Standard">
      <style:paragraph-properties fo:line-height="150%" fo:text-align="start" style:justify-single-word="false" style:snap-to-layout-grid="false"/>
      <style:text-properties fo:color="#000000" loext:opacity="100%" fo:font-size="14pt" officeooo:rsid="0009f83a" officeooo:paragraph-rsid="0009f83a" style:font-size-asian="14pt" style:font-size-complex="14pt" style:font-weight-complex="bold"/>
    </style:style>
    <style:style style:name="P40" style:family="paragraph" style:parent-style-name="Standard">
      <style:paragraph-properties fo:line-height="150%" fo:text-align="center" style:justify-single-word="false"/>
      <style:text-properties fo:color="#000000" loext:opacity="100%" fo:font-size="14pt" officeooo:rsid="0009f83a" officeooo:paragraph-rsid="0009f83a" style:font-size-asian="14pt" style:font-size-complex="14pt" style:font-weight-complex="bold"/>
    </style:style>
    <style:style style:name="P41" style:family="paragraph" style:parent-style-name="Standard">
      <style:paragraph-properties fo:margin-right="0cm" fo:line-height="150%" fo:text-align="center" style:justify-single-word="false" fo:text-indent="0cm" style:auto-text-indent="false"/>
      <style:text-properties fo:color="#000000" loext:opacity="100%" fo:font-size="14pt" officeooo:rsid="0009f83a" officeooo:paragraph-rsid="0009f83a" style:font-size-asian="14pt" style:font-size-complex="14pt" style:font-weight-complex="bold"/>
    </style:style>
    <style:style style:name="P42" style:family="paragraph" style:parent-style-name="Standard">
      <style:paragraph-properties fo:line-height="150%" fo:text-align="center" style:justify-single-word="false"/>
      <style:text-properties fo:color="#000000" loext:opacity="100%" fo:font-size="14pt" officeooo:rsid="002e5180" officeooo:paragraph-rsid="002e5180" style:font-size-asian="14pt" style:font-size-complex="14pt" style:font-weight-complex="bold"/>
    </style:style>
    <style:style style:name="P43" style:family="paragraph" style:parent-style-name="Standard">
      <style:paragraph-properties fo:line-height="150%" fo:text-align="center" style:justify-single-word="false"/>
      <style:text-properties fo:color="#000000" loext:opacity="100%" fo:font-size="14pt" officeooo:rsid="002d0d22" officeooo:paragraph-rsid="002d0d22" style:font-size-asian="14pt" style:font-size-complex="14pt" style:font-weight-complex="bold"/>
    </style:style>
    <style:style style:name="P44" style:family="paragraph" style:parent-style-name="Standard">
      <style:paragraph-properties fo:line-height="150%" fo:text-align="start" style:justify-single-word="false"/>
      <style:text-properties fo:color="#000000" loext:opacity="100%" fo:font-size="14pt" officeooo:rsid="002d0d22" officeooo:paragraph-rsid="002d9130" style:font-size-asian="14pt" style:font-size-complex="14pt" style:font-weight-complex="bold"/>
    </style:style>
    <style:style style:name="P45" style:family="paragraph" style:parent-style-name="Standard">
      <style:paragraph-properties fo:line-height="150%" fo:text-align="center" style:justify-single-word="false"/>
      <style:text-properties fo:color="#000000" loext:opacity="100%" fo:font-size="14pt" officeooo:rsid="003c4fd2" officeooo:paragraph-rsid="003c4fd2" style:font-size-asian="14pt" style:font-size-complex="14pt" style:font-weight-complex="bold"/>
    </style:style>
    <style:style style:name="P46" style:family="paragraph" style:parent-style-name="Standard">
      <style:paragraph-properties fo:line-height="150%"/>
      <style:text-properties fo:color="#000000" loext:opacity="100%" fo:font-size="14pt" officeooo:rsid="003bfd0e" officeooo:paragraph-rsid="003bfd0e" style:font-size-asian="14pt" style:font-size-complex="14pt" style:font-weight-complex="bold"/>
    </style:style>
    <style:style style:name="P47" style:family="paragraph" style:parent-style-name="Standard">
      <style:paragraph-properties fo:line-height="150%" fo:text-align="justify" style:justify-single-word="false"/>
      <style:text-properties fo:color="#000000" loext:opacity="100%" fo:font-size="14pt" style:font-size-asian="14pt" style:font-size-complex="14pt"/>
    </style:style>
    <style:style style:name="P48" style:family="paragraph" style:parent-style-name="Standard">
      <style:paragraph-properties fo:margin-right="0cm" fo:line-height="150%" fo:text-align="justify" style:justify-single-word="false" fo:text-indent="0cm" style:auto-text-indent="false"/>
      <style:text-properties fo:color="#000000" loext:opacity="100%" fo:font-size="14pt" officeooo:rsid="000b4c66" officeooo:paragraph-rsid="000b4c66" style:font-size-asian="14pt" style:font-size-complex="14pt"/>
    </style:style>
    <style:style style:name="P49" style:family="paragraph" style:parent-style-name="Standard">
      <style:paragraph-properties fo:line-height="150%" fo:text-align="center" style:justify-single-word="false"/>
      <style:text-properties fo:color="#000000" loext:opacity="100%" fo:font-size="14pt" fo:language="en" fo:country="US" officeooo:rsid="003c4fd2" officeooo:paragraph-rsid="003c4fd2" style:font-size-asian="14pt" style:font-size-complex="14pt" style:font-weight-complex="bold"/>
    </style:style>
    <style:style style:name="P50" style:family="paragraph" style:parent-style-name="Standard">
      <style:paragraph-properties fo:line-height="150%" fo:text-align="center" style:justify-single-word="false" style:snap-to-layout-grid="false"/>
      <style:text-properties fo:color="#000000" loext:opacity="100%" fo:font-size="14pt" fo:language="en" fo:country="US" style:font-size-asian="14pt" style:font-size-complex="14pt" style:font-weight-complex="bold"/>
    </style:style>
    <style:style style:name="P51" style:family="paragraph" style:parent-style-name="Standard">
      <style:paragraph-properties fo:line-height="150%" fo:text-align="center" style:justify-single-word="false"/>
      <style:text-properties fo:color="#000000" loext:opacity="100%" fo:font-size="14pt" fo:language="en" fo:country="US" officeooo:rsid="00426425" officeooo:paragraph-rsid="00426425" style:font-size-asian="14pt" style:font-size-complex="14pt" style:font-weight-complex="bold"/>
    </style:style>
    <style:style style:name="P52" style:family="paragraph" style:parent-style-name="Standard">
      <style:paragraph-properties fo:line-height="150%" fo:text-align="center" style:justify-single-word="false"/>
      <style:text-properties fo:color="#000000" loext:opacity="100%" fo:font-size="14pt" fo:language="ru" fo:country="RU" officeooo:rsid="002e5180" officeooo:paragraph-rsid="002e5180" style:font-size-asian="14pt" style:font-size-complex="14pt" style:font-weight-complex="bold"/>
    </style:style>
    <style:style style:name="P53" style:family="paragraph" style:parent-style-name="Standard">
      <style:paragraph-properties fo:line-height="150%" fo:text-align="center" style:justify-single-word="false" fo:break-before="page"/>
      <style:text-properties fo:color="#000000" loext:opacity="100%" fo:font-size="14pt" fo:font-weight="bold" officeooo:rsid="00410b01" officeooo:paragraph-rsid="00410b01" style:font-size-asian="12.25pt" style:font-weight-asian="bold" style:font-size-complex="14pt" style:font-weight-complex="bold"/>
    </style:style>
    <style:style style:name="P54" style:family="paragraph" style:parent-style-name="Standard">
      <style:paragraph-properties fo:line-height="100%" fo:text-align="start" style:justify-single-word="false"/>
      <style:text-properties fo:language="ru" fo:country="RU"/>
    </style:style>
    <style:style style:name="P55" style:family="paragraph" style:parent-style-name="Standard">
      <style:paragraph-properties fo:margin-right="0cm" fo:line-height="150%" fo:text-align="justify" style:justify-single-word="false" fo:text-indent="1.251cm" style:auto-text-indent="false"/>
      <style:text-properties fo:color="#ff0000" loext:opacity="100%" fo:font-size="14pt" style:font-size-asian="14pt" style:font-size-complex="14pt"/>
    </style:style>
    <style:style style:name="P56" style:family="paragraph" style:parent-style-name="Standard">
      <style:paragraph-properties fo:text-align="center" style:justify-single-word="false"/>
      <style:text-properties fo:color="#000000" loext:opacity="100%" fo:font-size="14pt" officeooo:rsid="0051b24c" officeooo:paragraph-rsid="0051b24c" style:font-size-asian="14pt" style:font-size-complex="14pt"/>
    </style:style>
    <style:style style:name="P57" style:family="paragraph" style:parent-style-name="Standard">
      <style:paragraph-properties fo:line-height="150%" fo:text-align="justify" style:justify-single-word="false"/>
      <style:text-properties fo:color="#000000" loext:opacity="100%" fo:font-size="14pt" officeooo:rsid="0005fe9c" officeooo:paragraph-rsid="0051b24c" style:font-size-asian="14pt" style:font-size-complex="14pt"/>
    </style:style>
    <style:style style:name="P58" style:family="paragraph" style:parent-style-name="Standard">
      <style:paragraph-properties fo:line-height="100%" fo:text-align="center" style:justify-single-word="false"/>
      <style:text-properties fo:color="#000000" loext:opacity="100%" fo:font-size="14pt" officeooo:rsid="0052896c" officeooo:paragraph-rsid="0052896c" style:font-size-asian="14pt" style:font-size-complex="14pt"/>
    </style:style>
    <style:style style:name="P59" style:family="paragraph" style:parent-style-name="Standard">
      <style:paragraph-properties fo:margin-right="0cm" fo:line-height="150%" fo:text-align="justify" style:justify-single-word="false" fo:text-indent="0cm" style:auto-text-indent="false"/>
      <style:text-properties fo:color="#000000" loext:opacity="100%" fo:font-size="14pt" officeooo:paragraph-rsid="000b4c66" style:font-size-asian="14pt" style:font-size-complex="14pt"/>
    </style:style>
    <style:style style:name="P60" style:family="paragraph" style:parent-style-name="Standard" style:list-style-name="L3">
      <style:paragraph-properties fo:line-height="150%" fo:text-align="justify" style:justify-single-word="false"/>
      <style:text-properties fo:color="#000000" loext:opacity="100%" fo:font-size="14pt" officeooo:paragraph-rsid="000b4c66" style:font-size-asian="14pt" style:font-size-complex="14pt"/>
    </style:style>
    <style:style style:name="P61" style:family="paragraph" style:parent-style-name="Standard" style:list-style-name="L3">
      <style:paragraph-properties fo:line-height="150%" fo:text-align="justify" style:justify-single-word="false"/>
      <style:text-properties fo:color="#000000" loext:opacity="100%" fo:font-size="14pt" officeooo:rsid="0056c171" officeooo:paragraph-rsid="0056c171" style:font-size-asian="14pt" style:font-size-complex="14pt"/>
    </style:style>
    <style:style style:name="P62" style:family="paragraph" style:parent-style-name="Standard">
      <style:paragraph-properties fo:line-height="150%" fo:text-align="start" style:justify-single-word="false"/>
      <style:text-properties fo:color="#000000" loext:opacity="100%" fo:font-size="14pt" officeooo:rsid="007dbda8" officeooo:paragraph-rsid="007dbda8" style:font-size-asian="14pt" style:font-size-complex="14pt" style:font-weight-complex="bold"/>
    </style:style>
    <style:style style:name="P63" style:family="paragraph" style:parent-style-name="Standard">
      <style:paragraph-properties fo:line-height="150%" fo:text-align="center" style:justify-single-word="false"/>
      <style:text-properties fo:color="#000000" loext:opacity="100%" fo:font-size="14pt" officeooo:rsid="007dbda8" officeooo:paragraph-rsid="007dbda8" style:font-size-asian="14pt" style:font-size-complex="14pt" style:font-weight-complex="bold"/>
    </style:style>
    <style:style style:name="P64" style:family="paragraph" style:parent-style-name="Standard">
      <style:paragraph-properties fo:line-height="150%"/>
      <style:text-properties fo:color="#000000" loext:opacity="100%" fo:font-size="14pt" officeooo:rsid="007dbda8" officeooo:paragraph-rsid="007dbda8" style:font-size-asian="14pt" style:font-size-complex="14pt" style:font-weight-complex="bold"/>
    </style:style>
    <style:style style:name="P65" style:family="paragraph" style:parent-style-name="Standard">
      <style:paragraph-properties fo:line-height="150%" fo:text-align="center" style:justify-single-word="false"/>
      <style:text-properties fo:color="#000000" loext:opacity="100%" fo:font-size="14pt" fo:font-weight="bold" officeooo:rsid="00410b01" officeooo:paragraph-rsid="00410b01" style:font-size-asian="12.25pt" style:font-weight-asian="bold" style:font-size-complex="14pt" style:font-weight-complex="bold"/>
    </style:style>
    <style:style style:name="P66" style:family="paragraph" style:parent-style-name="Standard">
      <style:paragraph-properties fo:line-height="150%" fo:text-align="justify" style:justify-single-word="false"/>
      <style:text-properties fo:color="#000000" loext:opacity="100%" fo:font-size="14pt" fo:font-weight="normal" officeooo:rsid="00785883" officeooo:paragraph-rsid="00785883" style:font-size-asian="14pt" style:font-weight-asian="normal" style:font-size-complex="14pt" style:font-weight-complex="normal"/>
    </style:style>
    <style:style style:name="P67" style:family="paragraph" style:parent-style-name="Standard">
      <style:paragraph-properties fo:line-height="150%" fo:text-align="center" style:justify-single-word="false" style:snap-to-layout-grid="false"/>
      <style:text-properties fo:color="#000000" loext:opacity="100%" fo:font-size="14pt" fo:language="en" fo:country="US" style:font-size-asian="14pt" style:font-size-complex="14pt" style:font-weight-complex="bold"/>
    </style:style>
    <style:style style:name="P68" style:family="paragraph" style:parent-style-name="Standard">
      <style:paragraph-properties fo:line-height="150%" fo:text-align="center" style:justify-single-word="false"/>
      <style:text-properties fo:color="#000000" loext:opacity="100%" fo:font-size="14pt" fo:language="en" fo:country="US" officeooo:rsid="007dbda8" officeooo:paragraph-rsid="007dbda8" style:font-size-asian="14pt" style:font-size-complex="14pt" style:font-weight-complex="bold"/>
    </style:style>
    <style:style style:name="P69" style:family="paragraph" style:parent-style-name="Standard">
      <style:paragraph-properties fo:line-height="100%" fo:text-align="justify" style:justify-single-word="false"/>
      <style:text-properties fo:color="#000000" loext:opacity="100%" style:font-name="Courier New2" fo:font-size="11pt" fo:font-weight="normal" officeooo:rsid="00410b01" officeooo:paragraph-rsid="00410b01" fo:background-color="#ffffff" style:font-size-asian="11pt" style:font-weight-asian="normal" style:font-size-complex="11pt" style:font-weight-complex="normal"/>
    </style:style>
    <style:style style:name="P70" style:family="paragraph" style:parent-style-name="Standard">
      <style:paragraph-properties fo:line-height="100%" fo:text-align="justify" style:justify-single-word="false"/>
      <style:text-properties fo:color="#000000" loext:opacity="100%" style:font-name="Courier New2" fo:font-size="11pt" fo:font-weight="normal" officeooo:rsid="00410b01" officeooo:paragraph-rsid="00785883" fo:background-color="#ffffff" style:font-size-asian="11pt" style:font-weight-asian="normal" style:font-size-complex="11pt" style:font-weight-complex="normal"/>
    </style:style>
    <style:style style:name="P71" style:family="paragraph" style:parent-style-name="Standard">
      <style:paragraph-properties fo:line-height="100%" fo:text-align="justify" style:justify-single-word="false"/>
      <style:text-properties fo:color="#000000" loext:opacity="100%" style:font-name="Courier New2" fo:font-size="11pt" fo:font-weight="normal" officeooo:rsid="00410b01" officeooo:paragraph-rsid="0078d649" fo:background-color="#ffffff" style:font-size-asian="11pt" style:font-weight-asian="normal" style:font-size-complex="11pt" style:font-weight-complex="normal"/>
    </style:style>
    <style:style style:name="P72" style:family="paragraph" style:parent-style-name="Standard">
      <style:paragraph-properties fo:line-height="100%" fo:text-align="center" style:justify-single-word="false" fo:break-before="page"/>
      <style:text-properties fo:color="#000000" loext:opacity="100%" style:font-name="Times New Roman1" fo:font-size="14pt" fo:font-weight="bold" officeooo:rsid="007c2112" officeooo:paragraph-rsid="007c2112" fo:background-color="#ffffff" style:font-size-asian="12.25pt" style:font-weight-asian="bold" style:font-size-complex="14pt" style:font-weight-complex="bold"/>
    </style:style>
    <style:style style:name="P73" style:family="paragraph" style:parent-style-name="Standard">
      <style:paragraph-properties fo:line-height="100%" fo:text-align="center" style:justify-single-word="false"/>
      <style:text-properties fo:color="#000000" loext:opacity="100%" style:font-name="Times New Roman1" fo:font-size="14pt" fo:font-weight="bold" officeooo:rsid="007c2112" officeooo:paragraph-rsid="007c2112" fo:background-color="#ffffff" style:font-size-asian="12.25pt" style:font-weight-asian="bold" style:font-size-complex="14pt" style:font-weight-complex="bold"/>
    </style:style>
    <style:style style:name="P74" style:family="paragraph" style:parent-style-name="Standard">
      <style:paragraph-properties fo:line-height="150%" fo:text-align="center" style:justify-single-word="false"/>
      <style:text-properties fo:color="#000000" loext:opacity="100%" style:font-name="Times New Roman1" fo:font-size="14pt" fo:font-weight="bold" officeooo:rsid="007c2112" officeooo:paragraph-rsid="007c2112" fo:background-color="#ffffff" style:font-size-asian="12.25pt" style:font-weight-asian="bold" style:font-size-complex="14pt" style:font-weight-complex="bold"/>
    </style:style>
    <style:style style:name="P75" style:family="paragraph" style:parent-style-name="Standard">
      <style:paragraph-properties fo:line-height="150%" fo:text-align="center" style:justify-single-word="false"/>
      <style:text-properties fo:color="#000000" loext:opacity="100%" style:font-name="Times New Roman1" fo:font-size="14pt" fo:font-weight="bold" officeooo:rsid="007c2112" officeooo:paragraph-rsid="007dbda8" fo:background-color="#ffffff" style:font-size-asian="12.25pt" style:font-weight-asian="bold" style:font-size-complex="14pt" style:font-weight-complex="bold"/>
    </style:style>
    <style:style style:name="P76" style:family="paragraph" style:parent-style-name="Standard">
      <style:paragraph-properties fo:margin-right="0cm" fo:line-height="150%" fo:text-align="justify" style:justify-single-word="false" fo:text-indent="0cm" style:auto-text-indent="false"/>
    </style:style>
    <style:style style:name="P77" style:family="paragraph" style:parent-style-name="Standard">
      <style:paragraph-properties fo:margin-right="0cm" fo:line-height="150%" fo:text-align="justify" style:justify-single-word="false" fo:text-indent="0cm" style:auto-text-indent="false"/>
      <style:text-properties officeooo:paragraph-rsid="000b4c66"/>
    </style:style>
    <style:style style:name="P78" style:family="paragraph" style:parent-style-name="Standard">
      <style:paragraph-properties fo:line-height="150%" fo:text-align="justify" style:justify-single-word="false"/>
    </style:style>
    <style:style style:name="P79" style:family="paragraph" style:parent-style-name="Standard" style:list-style-name="L15">
      <style:paragraph-properties fo:line-height="150%" fo:text-align="justify" style:justify-single-word="false"/>
      <style:text-properties officeooo:paragraph-rsid="00785883"/>
    </style:style>
    <style:style style:name="P80" style:family="paragraph" style:parent-style-name="Standard">
      <style:paragraph-properties fo:line-height="150%" fo:text-align="start" style:justify-single-word="false"/>
    </style:style>
    <style:style style:name="P81" style:family="paragraph" style:parent-style-name="Standard">
      <style:paragraph-properties fo:line-height="150%" fo:text-align="start" style:justify-single-word="false"/>
      <style:text-properties fo:font-size="14pt" style:font-size-asian="14pt" style:font-size-complex="14pt"/>
    </style:style>
    <style:style style:name="P82" style:family="paragraph" style:parent-style-name="Standard">
      <style:paragraph-properties fo:line-height="150%" fo:text-align="center" style:justify-single-word="false" fo:break-before="page"/>
      <style:text-properties fo:font-size="14pt" style:font-size-asian="14pt" style:font-size-complex="14pt"/>
    </style:style>
    <style:style style:name="P83" style:family="paragraph" style:parent-style-name="Standard">
      <style:paragraph-properties fo:line-height="150%" fo:text-align="center" style:justify-single-word="false"/>
      <style:text-properties fo:font-size="14pt" style:font-size-asian="14pt" style:font-size-complex="14pt"/>
    </style:style>
    <style:style style:name="P84" style:family="paragraph" style:parent-style-name="Standard">
      <style:paragraph-properties fo:line-height="150%" fo:text-align="center" style:justify-single-word="false"/>
      <style:text-properties fo:font-size="14pt" officeooo:paragraph-rsid="007c2112" style:font-size-asian="14pt" style:font-size-complex="14pt"/>
    </style:style>
    <style:style style:name="P85" style:family="paragraph" style:parent-style-name="Standard">
      <style:paragraph-properties fo:line-height="150%" fo:text-align="center" style:justify-single-word="false"/>
      <style:text-properties fo:font-size="14pt" officeooo:paragraph-rsid="007dbda8" style:font-size-asian="14pt" style:font-size-complex="14pt"/>
    </style:style>
    <style:style style:name="P86" style:family="paragraph" style:parent-style-name="Standard" style:list-style-name="L11">
      <style:paragraph-properties fo:line-height="150%" fo:text-align="justify" style:justify-single-word="false"/>
      <style:text-properties fo:font-size="14pt" fo:font-weight="normal" officeooo:rsid="006c1b2d" officeooo:paragraph-rsid="006d4e09" style:font-size-asian="14pt" style:font-weight-asian="normal" style:font-size-complex="14pt" style:font-weight-complex="normal"/>
    </style:style>
    <style:style style:name="P87" style:family="paragraph" style:parent-style-name="Standard" style:list-style-name="L11">
      <style:paragraph-properties fo:line-height="150%" fo:text-align="justify" style:justify-single-word="false"/>
      <style:text-properties fo:font-size="14pt" fo:font-weight="normal" officeooo:rsid="006c1b2d" officeooo:paragraph-rsid="006c1b2d" style:font-size-asian="14pt" style:font-weight-asian="normal" style:font-size-complex="14pt" style:font-weight-complex="normal"/>
    </style:style>
    <style:style style:name="P88" style:family="paragraph" style:parent-style-name="Standard">
      <style:paragraph-properties fo:line-height="150%" fo:text-align="start" style:justify-single-word="false"/>
      <style:text-properties fo:font-size="14pt" officeooo:rsid="003e6b87" officeooo:paragraph-rsid="004918bf" style:font-size-asian="12.25pt" style:font-size-complex="14pt"/>
    </style:style>
    <style:style style:name="P89" style:family="paragraph" style:parent-style-name="Standard">
      <style:paragraph-properties fo:margin-right="0cm" fo:line-height="150%" fo:text-align="justify" style:justify-single-word="false" fo:text-indent="1.251cm" style:auto-text-indent="false"/>
      <style:text-properties fo:color="#ff0000" loext:opacity="100%" fo:font-size="14pt" style:font-size-asian="14pt" style:font-size-complex="14pt"/>
    </style:style>
    <style:style style:name="P90" style:family="paragraph" style:parent-style-name="Standard">
      <style:paragraph-properties fo:margin-right="0cm" fo:line-height="150%" fo:text-align="justify" style:justify-single-word="false" fo:text-indent="1.251cm" style:auto-text-indent="false"/>
      <style:text-properties fo:color="#ff0000" loext:opacity="100%" fo:font-size="14pt" officeooo:paragraph-rsid="0052896c" style:font-size-asian="14pt" style:font-size-complex="14pt"/>
    </style:style>
    <style:style style:name="P91" style:family="paragraph" style:parent-style-name="Standard">
      <style:paragraph-properties fo:margin-right="0cm" fo:line-height="150%" fo:text-align="justify" style:justify-single-word="false" fo:text-indent="1.251cm" style:auto-text-indent="false"/>
      <style:text-properties fo:color="#ff0000" loext:opacity="100%" fo:font-size="14pt" fo:language="en" fo:country="US" style:font-size-asian="14pt" style:font-size-complex="14pt"/>
    </style:style>
    <style:style style:name="P92" style:family="paragraph" style:parent-style-name="Standard" style:list-style-name="L15">
      <style:text-properties fo:color="#ff0000" loext:opacity="100%" style:font-name="Times New Roman2" fo:font-size="14pt" fo:letter-spacing="-0.004cm" fo:font-weight="normal" style:font-size-asian="14pt" style:font-weight-asian="normal" style:font-size-complex="14pt" style:font-weight-complex="normal"/>
    </style:style>
    <style:style style:name="P93"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Times New Roman2" fo:font-size="14pt" fo:language="ru" fo:country="RU" fo:font-style="normal" style:text-underline-style="none" fo:font-weight="normal" officeooo:rsid="0037480c" officeooo:paragraph-rsid="00676c35" style:text-blinking="false" fo:background-color="transparent" style:font-size-asian="14pt" style:font-weight-asian="normal" style:font-size-complex="14pt" style:font-weight-complex="normal"/>
    </style:style>
    <style:style style:name="P94" style:family="paragraph" style:parent-style-name="Standard">
      <style:paragraph-properties fo:line-height="150%" fo:text-align="center" style:justify-single-word="false" fo:break-before="page"/>
      <style:text-properties fo:font-variant="normal" fo:text-transform="none" fo:color="#000000" loext:opacity="100%" style:text-line-through-style="none" style:text-line-through-type="none" style:font-name="Times New Roman2" fo:font-size="14pt" fo:language="ru" fo:country="RU" fo:font-style="normal" style:text-underline-style="none" fo:font-weight="normal" officeooo:rsid="0071ee9b" officeooo:paragraph-rsid="0071ee9b" style:text-blinking="false" fo:background-color="transparent" style:font-size-asian="14pt" style:font-weight-asian="normal" style:font-size-complex="14pt" style:font-weight-complex="normal"/>
    </style:style>
    <style:style style:name="P95"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Times New Roman2" fo:font-size="14pt" fo:language="ru" fo:country="RU" fo:font-style="normal" style:text-underline-style="none" fo:font-weight="normal" officeooo:rsid="0072d9ab" officeooo:paragraph-rsid="0071ee9b" style:text-blinking="false" fo:background-color="transparent" style:font-size-asian="14pt" style:font-weight-asian="normal" style:font-size-complex="14pt" style:font-weight-complex="normal"/>
    </style:style>
    <style:style style:name="P96"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Times New Roman2" fo:font-size="14pt" fo:language="ru" fo:country="RU" fo:font-style="normal" style:text-underline-style="none" fo:font-weight="normal" officeooo:rsid="0072d9ab" officeooo:paragraph-rsid="0072d9ab" style:text-blinking="false" fo:background-color="transparent" style:font-size-asian="14pt" style:font-weight-asian="normal" style:font-size-complex="14pt" style:font-weight-complex="normal"/>
    </style:style>
    <style:style style:name="P97" style:family="paragraph" style:parent-style-name="Standard" style:list-style-name="L14">
      <style:paragraph-properties fo:line-height="150%" fo:text-align="start" style:justify-single-word="false"/>
      <style:text-properties fo:font-variant="normal" fo:text-transform="none" fo:color="#000000" loext:opacity="100%" style:text-line-through-style="none" style:text-line-through-type="none" style:font-name="Times New Roman2" fo:font-size="14pt" fo:language="ru" fo:country="RU" fo:font-style="normal" style:text-underline-style="none" fo:font-weight="normal" officeooo:rsid="0072d9ab" officeooo:paragraph-rsid="0072d9ab" style:text-blinking="false" fo:background-color="transparent" style:font-size-asian="14pt" style:font-weight-asian="normal" style:font-size-complex="14pt" style:font-weight-complex="normal"/>
    </style:style>
    <style:style style:name="P98"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Times New Roman2" fo:font-size="14pt" fo:language="ru" fo:country="RU" fo:font-style="normal" style:text-underline-style="none" fo:font-weight="normal" officeooo:rsid="0072d9ab" officeooo:paragraph-rsid="0077083a" style:text-blinking="false" fo:background-color="transparent" style:font-size-asian="14pt" style:font-weight-asian="normal" style:font-size-complex="14pt" style:font-weight-complex="normal"/>
    </style:style>
    <style:style style:name="P99" style:family="paragraph" style:parent-style-name="Standard" style:list-style-name="L14">
      <style:paragraph-properties fo:line-height="150%" fo:text-align="start" style:justify-single-word="false"/>
      <style:text-properties fo:font-variant="normal" fo:text-transform="none" fo:color="#000000" loext:opacity="100%" style:text-line-through-style="none" style:text-line-through-type="none" style:font-name="Times New Roman2" fo:font-size="14pt" fo:language="ru" fo:country="RU" fo:font-style="normal" style:text-underline-style="none" fo:font-weight="normal" officeooo:rsid="00734b90" officeooo:paragraph-rsid="00734b90" style:text-blinking="false" fo:background-color="transparent" style:font-size-asian="14pt" style:font-weight-asian="normal" style:font-size-complex="14pt" style:font-weight-complex="normal"/>
    </style:style>
    <style:style style:name="P100"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Times New Roman2" fo:font-size="14pt" fo:language="ru" fo:country="RU" fo:font-style="normal" style:text-underline-style="none" fo:font-weight="normal" officeooo:rsid="00737ae5" officeooo:paragraph-rsid="00737ae5" style:text-blinking="false" fo:background-color="transparent" style:font-size-asian="14pt" style:font-weight-asian="normal" style:font-size-complex="14pt" style:font-weight-complex="normal"/>
    </style:style>
    <style:style style:name="P101" style:family="paragraph" style:parent-style-name="Standard">
      <style:paragraph-properties fo:line-height="150%" fo:text-align="justify" style:justify-single-word="false"/>
      <style:text-properties fo:font-variant="normal" fo:text-transform="none" fo:color="#000000" loext:opacity="100%" style:text-line-through-style="none" style:text-line-through-type="none" style:font-name="Times New Roman2" fo:font-size="14pt" fo:language="ru" fo:country="RU" fo:font-style="normal" style:text-underline-style="none" fo:font-weight="normal" officeooo:rsid="00737ae5" officeooo:paragraph-rsid="00737ae5" style:text-blinking="false" fo:background-color="transparent" style:font-size-asian="14pt" style:font-weight-asian="normal" style:font-size-complex="14pt" style:font-weight-complex="normal"/>
    </style:style>
    <style:style style:name="P102" style:family="paragraph" style:parent-style-name="Standard">
      <style:paragraph-properties fo:line-height="150%" fo:text-align="justify" style:justify-single-word="false"/>
      <style:text-properties fo:font-weight="bold" officeooo:rsid="00578450" officeooo:paragraph-rsid="00578450" style:font-weight-asian="bold" style:font-weight-complex="bold"/>
    </style:style>
    <style:style style:name="P103" style:family="paragraph" style:parent-style-name="Standard">
      <style:paragraph-properties fo:line-height="150%" fo:text-align="justify" style:justify-single-word="false"/>
      <style:text-properties fo:font-weight="bold" officeooo:rsid="00578450" officeooo:paragraph-rsid="0058ab28" style:font-weight-asian="bold" style:font-weight-complex="bold"/>
    </style:style>
    <style:style style:name="P104" style:family="paragraph" style:parent-style-name="Standard" style:list-style-name="L5">
      <style:paragraph-properties fo:line-height="150%" fo:text-align="justify" style:justify-single-word="false"/>
      <style:text-properties fo:font-weight="bold" officeooo:rsid="0058ab28" officeooo:paragraph-rsid="0058ab28" style:font-weight-asian="bold" style:font-weight-complex="bold"/>
    </style:style>
    <style:style style:name="P105" style:family="paragraph" style:parent-style-name="Standard">
      <style:paragraph-properties fo:line-height="150%" fo:text-align="justify" style:justify-single-word="false"/>
      <style:text-properties fo:font-weight="bold" officeooo:rsid="0058ab28" officeooo:paragraph-rsid="0058ab28" style:font-weight-asian="bold" style:font-weight-complex="bold"/>
    </style:style>
    <style:style style:name="P106" style:family="paragraph" style:parent-style-name="Standard">
      <style:paragraph-properties fo:line-height="150%" fo:text-align="justify" style:justify-single-word="false"/>
      <style:text-properties fo:font-weight="bold" officeooo:rsid="005a2c69" officeooo:paragraph-rsid="005a2c69" style:font-weight-asian="bold" style:font-weight-complex="bold"/>
    </style:style>
    <style:style style:name="P107" style:family="paragraph" style:parent-style-name="Standard">
      <style:paragraph-properties fo:line-height="150%" fo:text-align="justify" style:justify-single-word="false"/>
      <style:text-properties fo:font-weight="bold" officeooo:rsid="005f69c5" officeooo:paragraph-rsid="005f69c5" style:font-weight-asian="bold" style:font-weight-complex="bold"/>
    </style:style>
    <style:style style:name="P108" style:family="paragraph" style:parent-style-name="Standard">
      <style:paragraph-properties fo:line-height="150%" fo:text-align="justify" style:justify-single-word="false"/>
      <style:text-properties fo:font-weight="bold" officeooo:rsid="0060d614" officeooo:paragraph-rsid="0060d614" style:font-weight-asian="bold" style:font-weight-complex="bold"/>
    </style:style>
    <style:style style:name="P109" style:family="paragraph" style:parent-style-name="Standard">
      <style:paragraph-properties fo:line-height="150%" fo:text-align="justify" style:justify-single-word="false"/>
      <style:text-properties fo:font-weight="bold" officeooo:rsid="0060d614" officeooo:paragraph-rsid="00638d95" style:font-weight-asian="bold" style:font-weight-complex="bold"/>
    </style:style>
    <style:style style:name="P110" style:family="paragraph" style:parent-style-name="Standard">
      <style:paragraph-properties fo:line-height="150%" fo:text-align="justify" style:justify-single-word="false"/>
      <style:text-properties fo:font-weight="bold" officeooo:rsid="0060d614" officeooo:paragraph-rsid="0065b45d" style:font-weight-asian="bold" style:font-weight-complex="bold"/>
    </style:style>
    <style:style style:name="P111" style:family="paragraph" style:parent-style-name="Standard">
      <style:paragraph-properties fo:line-height="150%" fo:text-align="justify" style:justify-single-word="false"/>
      <style:text-properties fo:font-weight="bold" officeooo:rsid="00638d95" officeooo:paragraph-rsid="00638d95" style:font-weight-asian="bold" style:font-weight-complex="bold"/>
    </style:style>
    <style:style style:name="P112" style:family="paragraph" style:parent-style-name="Standard">
      <style:paragraph-properties fo:line-height="150%" fo:text-align="justify" style:justify-single-word="false"/>
      <style:text-properties fo:font-weight="bold" officeooo:rsid="006539c6" officeooo:paragraph-rsid="006539c6" style:font-weight-asian="bold" style:font-weight-complex="bold"/>
    </style:style>
    <style:style style:name="P113" style:family="paragraph" style:parent-style-name="Standard">
      <style:paragraph-properties fo:line-height="150%" fo:text-align="center" style:justify-single-word="false" fo:break-before="page"/>
      <style:text-properties fo:font-weight="bold" officeooo:rsid="00676c35" officeooo:paragraph-rsid="00676c35" style:font-weight-asian="bold" style:font-weight-complex="bold"/>
    </style:style>
    <style:style style:name="P114" style:family="paragraph" style:parent-style-name="Standard">
      <style:paragraph-properties fo:line-height="150%" fo:text-align="center" style:justify-single-word="false"/>
      <style:text-properties fo:text-transform="uppercase" fo:font-size="14pt" fo:language="en" fo:country="US" fo:font-weight="bold" style:font-size-asian="14pt" style:font-weight-asian="bold" style:font-size-complex="14pt"/>
    </style:style>
    <style:style style:name="P115" style:family="paragraph" style:parent-style-name="Standard">
      <style:paragraph-properties fo:margin-right="0cm" fo:line-height="150%" fo:text-align="justify" style:justify-single-word="false" fo:text-indent="0cm" style:auto-text-indent="false"/>
      <style:text-properties officeooo:rsid="002d9130" officeooo:paragraph-rsid="002d9130"/>
    </style:style>
    <style:style style:name="P116" style:family="paragraph" style:parent-style-name="Standard" style:list-style-name="L4">
      <style:paragraph-properties fo:line-height="150%" fo:text-align="justify" style:justify-single-word="false"/>
      <style:text-properties officeooo:rsid="00578450" officeooo:paragraph-rsid="00578450"/>
    </style:style>
    <style:style style:name="P117" style:family="paragraph" style:parent-style-name="Standard">
      <style:paragraph-properties fo:line-height="150%" fo:text-align="justify" style:justify-single-word="false"/>
      <style:text-properties officeooo:rsid="00578450" officeooo:paragraph-rsid="00578450"/>
    </style:style>
    <style:style style:name="P118" style:family="paragraph" style:parent-style-name="Standard">
      <style:paragraph-properties fo:margin-right="0cm" fo:line-height="150%" fo:text-align="justify" style:justify-single-word="false" fo:text-indent="1.251cm" style:auto-text-indent="false"/>
      <style:text-properties fo:font-weight="normal" officeooo:rsid="00578450" officeooo:paragraph-rsid="00578450" style:font-weight-asian="normal" style:font-weight-complex="normal"/>
    </style:style>
    <style:style style:name="P119" style:family="paragraph" style:parent-style-name="Standard" style:list-style-name="L4">
      <style:paragraph-properties fo:line-height="150%" fo:text-align="justify" style:justify-single-word="false"/>
      <style:text-properties fo:font-weight="normal" officeooo:rsid="00578450" officeooo:paragraph-rsid="00578450" style:font-weight-asian="normal" style:font-weight-complex="normal"/>
    </style:style>
    <style:style style:name="P120" style:family="paragraph" style:parent-style-name="Standard" style:list-style-name="L6">
      <style:paragraph-properties fo:line-height="150%" fo:text-align="justify" style:justify-single-word="false"/>
      <style:text-properties fo:font-weight="normal" officeooo:rsid="0058ab28" officeooo:paragraph-rsid="0058ab28" style:font-weight-asian="normal" style:font-weight-complex="normal"/>
    </style:style>
    <style:style style:name="P121" style:family="paragraph" style:parent-style-name="Standard">
      <style:paragraph-properties fo:line-height="150%"/>
      <style:text-properties fo:font-weight="normal" officeooo:rsid="005a2c69" officeooo:paragraph-rsid="005a2c69" style:font-weight-asian="normal" style:font-weight-complex="normal"/>
    </style:style>
    <style:style style:name="P122" style:family="paragraph" style:parent-style-name="Standard" style:list-style-name="L6">
      <style:paragraph-properties fo:line-height="150%" fo:text-align="justify" style:justify-single-word="false"/>
      <style:text-properties fo:font-weight="normal" officeooo:rsid="005a2c69" officeooo:paragraph-rsid="005a2c69" style:font-weight-asian="normal" style:font-weight-complex="normal"/>
    </style:style>
    <style:style style:name="P123" style:family="paragraph" style:parent-style-name="Standard">
      <style:paragraph-properties fo:line-height="150%" fo:text-align="justify" style:justify-single-word="false"/>
      <style:text-properties fo:font-weight="normal" officeooo:rsid="005a2c69" officeooo:paragraph-rsid="005a2c69" style:font-weight-asian="normal" style:font-weight-complex="normal"/>
    </style:style>
    <style:style style:name="P124" style:family="paragraph" style:parent-style-name="Standard">
      <style:paragraph-properties fo:line-height="150%" fo:text-align="justify" style:justify-single-word="false"/>
      <style:text-properties fo:font-weight="normal" officeooo:rsid="00638d95" officeooo:paragraph-rsid="00638d95" style:font-weight-asian="normal" style:font-weight-complex="normal"/>
    </style:style>
    <style:style style:name="P125" style:family="paragraph" style:parent-style-name="Standard">
      <style:paragraph-properties fo:line-height="150%" fo:text-align="justify" style:justify-single-word="false"/>
      <style:text-properties fo:font-weight="normal" officeooo:rsid="006539c6" officeooo:paragraph-rsid="006539c6" style:font-weight-asian="normal" style:font-weight-complex="normal"/>
    </style:style>
    <style:style style:name="P126" style:family="paragraph" style:parent-style-name="Standard">
      <style:paragraph-properties fo:line-height="150%" fo:text-align="justify" style:justify-single-word="false"/>
      <style:text-properties fo:font-weight="normal" officeooo:rsid="00676c35" officeooo:paragraph-rsid="006a6e97" style:font-weight-asian="normal" style:font-weight-complex="normal"/>
    </style:style>
    <style:style style:name="P127" style:family="paragraph" style:parent-style-name="Standard">
      <style:paragraph-properties fo:line-height="150%" fo:text-align="start" style:justify-single-word="false"/>
      <style:text-properties fo:font-weight="normal" officeooo:rsid="006a6e97" officeooo:paragraph-rsid="006a6e97" style:font-weight-asian="normal" style:font-weight-complex="normal"/>
    </style:style>
    <style:style style:name="P128" style:family="paragraph" style:parent-style-name="Standard" style:list-style-name="L8">
      <style:paragraph-properties fo:line-height="150%" fo:text-align="start" style:justify-single-word="false"/>
      <style:text-properties fo:font-weight="normal" officeooo:rsid="006a6e97" officeooo:paragraph-rsid="006a6e97" style:font-weight-asian="normal" style:font-weight-complex="normal"/>
    </style:style>
    <style:style style:name="P129" style:family="paragraph" style:parent-style-name="Standard" style:list-style-name="L9">
      <style:paragraph-properties fo:line-height="150%" fo:text-align="start" style:justify-single-word="false"/>
      <style:text-properties fo:font-weight="normal" officeooo:rsid="006a6e97" officeooo:paragraph-rsid="006a6e97" style:font-weight-asian="normal" style:font-weight-complex="normal"/>
    </style:style>
    <style:style style:name="P130" style:family="paragraph" style:parent-style-name="Standard">
      <style:paragraph-properties fo:line-height="150%" fo:text-align="center" style:justify-single-word="false"/>
      <style:text-properties fo:font-weight="normal" officeooo:rsid="006a6e97" officeooo:paragraph-rsid="00676c35" style:font-weight-asian="normal" style:font-weight-complex="normal"/>
    </style:style>
    <style:style style:name="P131" style:family="paragraph" style:parent-style-name="Standard">
      <style:paragraph-properties fo:line-height="150%" fo:text-align="justify" style:justify-single-word="false"/>
      <style:text-properties fo:font-weight="normal" officeooo:rsid="006a6e97" officeooo:paragraph-rsid="006a6e97" style:font-weight-asian="normal" style:font-weight-complex="normal"/>
    </style:style>
    <style:style style:name="P132" style:family="paragraph" style:parent-style-name="Standard">
      <style:paragraph-properties fo:line-height="150%" fo:text-align="justify" style:justify-single-word="false"/>
      <style:text-properties fo:font-weight="normal" officeooo:rsid="006c1b2d" officeooo:paragraph-rsid="006c1b2d" style:font-weight-asian="normal" style:font-weight-complex="normal"/>
    </style:style>
    <style:style style:name="P133" style:family="paragraph" style:parent-style-name="Standard" style:list-style-name="L10">
      <style:paragraph-properties fo:line-height="150%" fo:text-align="justify" style:justify-single-word="false"/>
      <style:text-properties fo:font-weight="normal" officeooo:rsid="006c1b2d" officeooo:paragraph-rsid="006c1b2d" style:font-weight-asian="normal" style:font-weight-complex="normal"/>
    </style:style>
    <style:style style:name="P134" style:family="paragraph" style:parent-style-name="Standard" style:list-style-name="L11">
      <style:paragraph-properties fo:line-height="150%" fo:text-align="justify" style:justify-single-word="false"/>
      <style:text-properties fo:font-weight="normal" officeooo:rsid="006c1b2d" officeooo:paragraph-rsid="006c1b2d" style:font-weight-asian="normal" style:font-weight-complex="normal"/>
    </style:style>
    <style:style style:name="P135" style:family="paragraph" style:parent-style-name="Standard" style:list-style-name="L11">
      <style:paragraph-properties fo:line-height="150%" fo:text-align="justify" style:justify-single-word="false"/>
      <style:text-properties fo:font-weight="normal" officeooo:rsid="006c1b2d" officeooo:paragraph-rsid="006c8943" style:font-weight-asian="normal" style:font-weight-complex="normal"/>
    </style:style>
    <style:style style:name="P136" style:family="paragraph" style:parent-style-name="Standard" style:list-style-name="L11">
      <style:paragraph-properties fo:line-height="150%" fo:text-align="justify" style:justify-single-word="false"/>
      <style:text-properties fo:font-weight="normal" officeooo:rsid="006c1b2d" officeooo:paragraph-rsid="006d4e09" style:font-weight-asian="normal" style:font-weight-complex="normal"/>
    </style:style>
    <style:style style:name="P137" style:family="paragraph" style:parent-style-name="Standard">
      <style:paragraph-properties fo:line-height="150%" fo:text-align="justify" style:justify-single-word="false"/>
      <style:text-properties fo:font-weight="normal" officeooo:rsid="006f2c67" officeooo:paragraph-rsid="006f2c67" style:font-weight-asian="normal" style:font-weight-complex="normal"/>
    </style:style>
    <style:style style:name="P138" style:family="paragraph" style:parent-style-name="Standard" style:list-style-name="L12">
      <style:paragraph-properties fo:line-height="150%" fo:text-align="justify" style:justify-single-word="false"/>
      <style:text-properties fo:font-weight="normal" officeooo:rsid="006f2c67" officeooo:paragraph-rsid="006f2c67" style:font-weight-asian="normal" style:font-weight-complex="normal"/>
    </style:style>
    <style:style style:name="P139" style:family="paragraph" style:parent-style-name="Standard" style:list-style-name="L13">
      <style:paragraph-properties fo:line-height="150%" fo:text-align="justify" style:justify-single-word="false"/>
      <style:text-properties fo:font-weight="normal" officeooo:rsid="006f2c67" officeooo:paragraph-rsid="006f2c67" style:font-weight-asian="normal" style:font-weight-complex="normal"/>
    </style:style>
    <style:style style:name="P140" style:family="paragraph" style:parent-style-name="Standard" style:list-style-name="L13">
      <style:paragraph-properties fo:line-height="150%" fo:text-align="justify" style:justify-single-word="false"/>
      <style:text-properties fo:font-weight="normal" officeooo:rsid="006f2c67" officeooo:paragraph-rsid="0071ee9b" style:font-weight-asian="normal" style:font-weight-complex="normal"/>
    </style:style>
    <style:style style:name="P141" style:family="paragraph" style:parent-style-name="Standard">
      <style:paragraph-properties fo:line-height="150%" fo:text-align="justify" style:justify-single-word="false"/>
      <style:text-properties fo:font-weight="normal" officeooo:rsid="006f2c67" officeooo:paragraph-rsid="0071ee9b" style:font-weight-asian="normal" style:font-weight-complex="normal"/>
    </style:style>
    <style:style style:name="P142" style:family="paragraph" style:parent-style-name="Standard" style:list-style-name="L13">
      <style:paragraph-properties fo:line-height="150%" fo:text-align="justify" style:justify-single-word="false"/>
      <style:text-properties fo:font-weight="normal" officeooo:rsid="00704450" officeooo:paragraph-rsid="00704450" style:font-weight-asian="normal" style:font-weight-complex="normal"/>
    </style:style>
    <style:style style:name="P143" style:family="paragraph" style:parent-style-name="Standard">
      <style:paragraph-properties fo:margin-right="0cm" fo:line-height="150%" fo:text-align="justify" style:justify-single-word="false" fo:text-indent="1.251cm" style:auto-text-indent="false"/>
      <style:text-properties officeooo:rsid="00580258" officeooo:paragraph-rsid="00580258"/>
    </style:style>
    <style:style style:name="P144" style:family="paragraph" style:parent-style-name="Standard">
      <style:paragraph-properties fo:line-height="150%"/>
      <style:text-properties fo:font-size="12pt" fo:font-weight="normal" officeooo:rsid="005f69c5" officeooo:paragraph-rsid="005f69c5" style:font-size-asian="12pt" style:font-weight-asian="normal" style:font-size-complex="12pt" style:font-weight-complex="normal"/>
    </style:style>
    <style:style style:name="P145" style:family="paragraph" style:parent-style-name="Table_20_Contents">
      <style:paragraph-properties fo:text-align="center" style:justify-single-word="false"/>
    </style:style>
    <style:style style:name="P146" style:family="paragraph" style:parent-style-name="Table_20_Contents">
      <style:paragraph-properties fo:text-align="center" style:justify-single-word="false"/>
      <style:text-properties officeooo:paragraph-rsid="007a761f"/>
    </style:style>
    <style:style style:name="P147" style:family="paragraph" style:parent-style-name="Table_20_Contents">
      <style:paragraph-properties fo:text-align="center" style:justify-single-word="false"/>
      <style:text-properties fo:font-size="12pt" officeooo:rsid="005b82e3" officeooo:paragraph-rsid="005b82e3" style:font-size-asian="12pt" style:font-size-complex="12pt"/>
    </style:style>
    <style:style style:name="P148" style:family="paragraph" style:parent-style-name="Table_20_Contents">
      <style:paragraph-properties fo:text-align="center" style:justify-single-word="false"/>
      <style:text-properties fo:font-size="12pt" officeooo:rsid="005b82e3" officeooo:paragraph-rsid="005ca32e" style:font-size-asian="12pt" style:font-size-complex="12pt"/>
    </style:style>
    <style:style style:name="P149" style:family="paragraph" style:parent-style-name="Table_20_Contents">
      <style:paragraph-properties fo:text-align="center" style:justify-single-word="false"/>
      <style:text-properties fo:font-size="12pt" officeooo:rsid="005b82e3" officeooo:paragraph-rsid="005d9053" style:font-size-asian="12pt" style:font-size-complex="12pt"/>
    </style:style>
    <style:style style:name="P150" style:family="paragraph" style:parent-style-name="Table_20_Contents">
      <style:text-properties fo:font-size="12pt" officeooo:rsid="005b82e3" officeooo:paragraph-rsid="005b82e3" style:font-size-asian="12pt" style:font-size-complex="12pt"/>
    </style:style>
    <style:style style:name="P151" style:family="paragraph" style:parent-style-name="Table_20_Contents">
      <style:paragraph-properties fo:text-align="center" style:justify-single-word="false"/>
      <style:text-properties fo:font-size="12pt" officeooo:rsid="005ca32e" officeooo:paragraph-rsid="005ca32e" style:font-size-asian="12pt" style:font-size-complex="12pt"/>
    </style:style>
    <style:style style:name="P152" style:family="paragraph" style:parent-style-name="Table_20_Contents">
      <style:paragraph-properties fo:text-align="center" style:justify-single-word="false"/>
      <style:text-properties fo:font-size="12pt" officeooo:rsid="005ca32e" officeooo:paragraph-rsid="005d9053" style:font-size-asian="12pt" style:font-size-complex="12pt"/>
    </style:style>
    <style:style style:name="P153" style:family="paragraph" style:parent-style-name="Table_20_Contents">
      <style:text-properties fo:font-size="12pt" officeooo:rsid="005ca32e" officeooo:paragraph-rsid="005ca32e" style:font-size-asian="12pt" style:font-size-complex="12pt"/>
    </style:style>
    <style:style style:name="P154" style:family="paragraph" style:parent-style-name="Table_20_Contents">
      <style:text-properties fo:font-size="12pt" officeooo:rsid="005d9053" officeooo:paragraph-rsid="005d9053" style:font-size-asian="12pt" style:font-size-complex="12pt"/>
    </style:style>
    <style:style style:name="P155" style:family="paragraph" style:parent-style-name="Table_20_Contents">
      <style:paragraph-properties fo:text-align="start" style:justify-single-word="false"/>
      <style:text-properties fo:font-size="12pt" officeooo:rsid="0065b45d" officeooo:paragraph-rsid="0065b45d" style:font-size-asian="12pt" style:font-size-complex="12pt"/>
    </style:style>
    <style:style style:name="P156" style:family="paragraph" style:parent-style-name="Table_20_Contents">
      <style:paragraph-properties fo:text-align="start" style:justify-single-word="false"/>
    </style:style>
    <style:style style:name="P157" style:family="paragraph" style:parent-style-name="Table_20_Contents">
      <style:paragraph-properties fo:text-align="justify" style:justify-single-word="false"/>
    </style:style>
    <style:style style:name="P158" style:family="paragraph" style:parent-style-name="Table_20_Contents">
      <style:paragraph-properties fo:text-align="justify" style:justify-single-word="false"/>
      <style:text-properties officeooo:paragraph-rsid="0077083a"/>
    </style:style>
    <style:style style:name="P159" style:family="paragraph" style:parent-style-name="Table_20_Contents">
      <style:paragraph-properties fo:text-align="center" style:justify-single-word="false"/>
      <style:text-properties fo:font-size="14pt" officeooo:rsid="0077083a" officeooo:paragraph-rsid="0077083a" style:font-size-asian="12.25pt" style:font-size-complex="14pt"/>
    </style:style>
    <style:style style:name="P160" style:family="paragraph" style:parent-style-name="Table_20_Contents">
      <style:paragraph-properties fo:line-height="150%" fo:text-align="center" style:justify-single-word="false"/>
      <style:text-properties fo:font-size="14pt" officeooo:rsid="007c2112" officeooo:paragraph-rsid="007c2112" style:font-size-asian="12.25pt" style:font-size-complex="14pt"/>
    </style:style>
    <style:style style:name="P161" style:family="paragraph" style:parent-style-name="Table_20_Contents">
      <style:paragraph-properties fo:text-align="center" style:justify-single-word="false"/>
      <style:text-properties officeooo:rsid="0079ce63" officeooo:paragraph-rsid="0079ce63"/>
    </style:style>
    <style:style style:name="P162" style:family="paragraph" style:parent-style-name="Table_20_Contents">
      <style:paragraph-properties fo:text-align="center" style:justify-single-word="false"/>
      <style:text-properties officeooo:rsid="0079ce63" officeooo:paragraph-rsid="007a761f"/>
    </style:style>
    <style:style style:name="P163" style:family="paragraph" style:parent-style-name="Table_20_Contents">
      <style:paragraph-properties fo:text-align="center" style:justify-single-word="false"/>
      <style:text-properties officeooo:rsid="007a761f" officeooo:paragraph-rsid="007a761f"/>
    </style:style>
    <style:style style:name="P164" style:family="paragraph" style:parent-style-name="Table_20_Contents">
      <style:paragraph-properties fo:line-height="150%" fo:text-align="center" style:justify-single-word="false"/>
    </style:style>
    <style:style style:name="P165" style:family="paragraph" style:parent-style-name="Table_20_Contents">
      <style:paragraph-properties fo:line-height="150%" fo:text-align="center" style:justify-single-word="false"/>
      <style:text-properties officeooo:paragraph-rsid="007c2112"/>
    </style:style>
    <style:style style:name="P166" style:family="paragraph" style:parent-style-name="Table_20_Contents">
      <style:paragraph-properties fo:line-height="150%" fo:text-align="center" style:justify-single-word="false"/>
      <style:text-properties officeooo:paragraph-rsid="007dbda8"/>
    </style:style>
    <style:style style:name="T1" style:family="text">
      <style:text-properties fo:font-size="14pt" fo:font-weight="bold" style:font-size-asian="14pt" style:font-weight-asian="bold"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578450" style:font-size-asian="14pt" style:font-weight-asian="bold" style:font-size-complex="14pt" style:font-weight-complex="bold"/>
    </style:style>
    <style:style style:name="T4" style:family="text">
      <style:text-properties fo:font-size="14pt" style:font-size-asian="14pt" style:font-size-complex="14pt"/>
    </style:style>
    <style:style style:name="T5" style:family="text">
      <style:text-properties fo:font-size="14pt" officeooo:rsid="00058a87" style:font-size-asian="14pt" style:font-size-complex="14pt"/>
    </style:style>
    <style:style style:name="T6" style:family="text">
      <style:text-properties fo:font-size="14pt" officeooo:rsid="0052896c" style:font-size-asian="14pt" style:font-size-complex="14pt"/>
    </style:style>
    <style:style style:name="T7" style:family="text">
      <style:text-properties fo:font-size="14pt" officeooo:rsid="00580258" style:font-size-asian="14pt" style:font-size-complex="14pt"/>
    </style:style>
    <style:style style:name="T8" style:family="text">
      <style:text-properties fo:font-size="14pt" officeooo:rsid="0058ab28" style:font-size-asian="14pt" style:font-size-complex="14pt"/>
    </style:style>
    <style:style style:name="T9" style:family="text">
      <style:text-properties fo:font-size="14pt" fo:language="en" fo:country="US" style:font-size-asian="14pt" style:font-size-complex="14pt" style:language-complex="ar" style:country-complex="SA"/>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fo:font-size="14pt" fo:font-weight="normal" officeooo:rsid="00580258" style:font-size-asian="14pt" style:font-weight-asian="normal" style:font-size-complex="14pt" style:font-weight-complex="normal"/>
    </style:style>
    <style:style style:name="T12" style:family="text">
      <style:text-properties fo:font-size="14pt" fo:font-style="italic" style:font-size-asian="14pt" style:font-style-asian="italic" style:font-size-complex="14pt" style:font-style-complex="italic"/>
    </style:style>
    <style:style style:name="T13" style:family="text">
      <style:text-properties fo:font-size="14pt" fo:font-style="italic" officeooo:rsid="006c1b2d" style:font-size-asian="14pt" style:font-style-asian="italic" style:font-size-complex="14pt" style:font-style-complex="italic"/>
    </style:style>
    <style:style style:name="T14" style:family="text">
      <style:text-properties fo:font-size="14pt" fo:font-style="italic" officeooo:rsid="006c8943" style:font-size-asian="14pt" style:font-style-asian="italic" style:font-size-complex="14pt" style:font-style-complex="italic"/>
    </style:style>
    <style:style style:name="T15" style:family="text">
      <style:text-properties fo:font-size="14pt" fo:font-style="italic" officeooo:rsid="006f2c67" style:font-size-asian="14pt" style:font-style-asian="italic" style:font-size-complex="14pt" style:font-style-complex="italic"/>
    </style:style>
    <style:style style:name="T16" style:family="text">
      <style:text-properties fo:font-size="14pt" fo:font-style="italic" officeooo:rsid="0071ee9b" style:font-size-asian="14pt" style:font-style-asian="italic" style:font-size-complex="14pt" style:font-style-complex="italic"/>
    </style:style>
    <style:style style:name="T1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8" style:family="text">
      <style:text-properties fo:font-size="14pt" fo:font-style="normal" fo:font-weight="normal" officeooo:rsid="00580258" style:font-size-asian="14pt" style:font-style-asian="normal" style:font-weight-asian="normal" style:font-size-complex="14pt" style:font-style-complex="normal" style:font-weight-complex="normal"/>
    </style:style>
    <style:style style:name="T19" style:family="text">
      <style:text-properties fo:font-size="14pt" fo:font-style="normal" fo:font-weight="normal" officeooo:rsid="0058ab28" style:font-size-asian="14pt" style:font-style-asian="normal" style:font-weight-asian="normal" style:font-size-complex="14pt" style:font-style-complex="normal" style:font-weight-complex="normal"/>
    </style:style>
    <style:style style:name="T20" style:family="text">
      <style:text-properties fo:font-size="14pt" fo:font-style="normal" fo:font-weight="normal" officeooo:rsid="0060d614" style:font-size-asian="14pt" style:font-style-asian="normal" style:font-weight-asian="normal" style:font-size-complex="14pt" style:font-style-complex="normal" style:font-weight-complex="normal"/>
    </style:style>
    <style:style style:name="T21" style:family="text">
      <style:text-properties fo:font-size="14pt" fo:font-style="normal" fo:font-weight="normal" officeooo:rsid="0062bed7" style:font-size-asian="14pt" style:font-style-asian="normal" style:font-weight-asian="normal" style:font-size-complex="14pt" style:font-style-complex="normal" style:font-weight-complex="normal"/>
    </style:style>
    <style:style style:name="T22" style:family="text">
      <style:text-properties fo:font-size="14pt" fo:font-style="normal" fo:font-weight="normal" officeooo:rsid="00638d95" style:font-size-asian="14pt" style:font-style-asian="normal" style:font-weight-asian="normal" style:font-size-complex="14pt" style:font-style-complex="normal" style:font-weight-complex="normal"/>
    </style:style>
    <style:style style:name="T23" style:family="text">
      <style:text-properties fo:font-size="14pt" fo:font-style="normal" fo:font-weight="normal" officeooo:rsid="0065b45d" style:font-size-asian="14pt" style:font-style-asian="normal" style:font-weight-asian="normal" style:font-size-complex="14pt" style:font-style-complex="normal" style:font-weight-complex="normal"/>
    </style:style>
    <style:style style:name="T24" style:family="text">
      <style:text-properties fo:font-size="14pt" fo:font-style="normal" style:font-size-asian="14pt" style:font-style-asian="normal" style:font-size-complex="14pt" style:font-style-complex="normal"/>
    </style:style>
    <style:style style:name="T25" style:family="text">
      <style:text-properties fo:font-size="14pt" fo:font-style="normal" officeooo:rsid="00580258" style:font-size-asian="14pt" style:font-style-asian="normal" style:font-size-complex="14pt" style:font-style-complex="normal"/>
    </style:style>
    <style:style style:name="T26" style:family="text">
      <style:text-properties fo:font-size="14pt" fo:font-style="normal" officeooo:rsid="0062bed7" style:font-size-asian="14pt" style:font-style-asian="normal" style:font-size-complex="14pt" style:font-style-complex="normal"/>
    </style:style>
    <style:style style:name="T27" style:family="text">
      <style:text-properties fo:font-size="14pt" fo:font-style="normal" officeooo:rsid="006539c6" style:font-size-asian="14pt" style:font-style-asian="normal" style:font-size-complex="14pt" style:font-style-complex="normal"/>
    </style:style>
    <style:style style:name="T28" style:family="text">
      <style:text-properties fo:font-size="14pt" fo:font-style="normal" officeooo:rsid="0065b45d" style:font-size-asian="14pt" style:font-style-asian="normal" style:font-size-complex="14pt" style:font-style-complex="normal"/>
    </style:style>
    <style:style style:name="T29" style:family="text">
      <style:text-properties fo:font-size="14pt" fo:font-style="normal" officeooo:rsid="00676c35" style:font-size-asian="14pt" style:font-style-asian="normal" style:font-size-complex="14pt" style:font-style-complex="normal"/>
    </style:style>
    <style:style style:name="T30" style:family="text">
      <style:text-properties fo:font-size="14pt" fo:font-style="normal" officeooo:rsid="00690f7e" style:font-size-asian="14pt" style:font-style-asian="normal" style:font-size-complex="14pt" style:font-style-complex="normal"/>
    </style:style>
    <style:style style:name="T31" style:family="text">
      <style:text-properties fo:font-size="14pt" fo:font-style="normal" officeooo:rsid="006c1b2d" style:font-size-asian="14pt" style:font-style-asian="normal" style:font-size-complex="14pt" style:font-style-complex="normal"/>
    </style:style>
    <style:style style:name="T32" style:family="text">
      <style:text-properties fo:font-size="14pt" fo:font-style="normal" officeooo:rsid="006c8943" style:font-size-asian="14pt" style:font-style-asian="normal" style:font-size-complex="14pt" style:font-style-complex="normal"/>
    </style:style>
    <style:style style:name="T33" style:family="text">
      <style:text-properties fo:font-size="14pt" fo:font-style="normal" officeooo:rsid="006d4e09" style:font-size-asian="14pt" style:font-style-asian="normal" style:font-size-complex="14pt" style:font-style-complex="normal"/>
    </style:style>
    <style:style style:name="T34" style:family="text">
      <style:text-properties fo:font-size="14pt" fo:font-style="normal" officeooo:rsid="006f2c67" style:font-size-asian="14pt" style:font-style-asian="normal" style:font-size-complex="14pt" style:font-style-complex="normal"/>
    </style:style>
    <style:style style:name="T35" style:family="text">
      <style:text-properties fo:font-size="14pt" fo:font-style="normal" officeooo:rsid="00704450" style:font-size-asian="14pt" style:font-style-asian="normal" style:font-size-complex="14pt" style:font-style-complex="normal"/>
    </style:style>
    <style:style style:name="T36" style:family="text">
      <style:text-properties fo:font-size="14pt" fo:font-style="normal" officeooo:rsid="0071ee9b" style:font-size-asian="14pt" style:font-style-asian="normal" style:font-size-complex="14pt" style:font-style-complex="normal"/>
    </style:style>
    <style:style style:name="T37" style:family="text">
      <style:text-properties fo:font-size="14pt" fo:font-style="normal" fo:font-weight="bold" style:font-size-asian="14pt" style:font-style-asian="normal" style:font-weight-asian="bold" style:font-size-complex="14pt" style:font-style-complex="normal" style:font-weight-complex="bold"/>
    </style:style>
    <style:style style:name="T38" style:family="text">
      <style:text-properties fo:color="#000000" loext:opacity="100%" fo:font-size="14pt" fo:font-weight="bold" officeooo:rsid="00058a87" style:font-size-asian="14pt" style:font-weight-asian="bold" style:font-size-complex="14pt"/>
    </style:style>
    <style:style style:name="T39" style:family="text">
      <style:text-properties fo:color="#000000" loext:opacity="100%" fo:font-size="14pt" style:font-size-asian="14pt" style:font-size-complex="14pt"/>
    </style:style>
    <style:style style:name="T40" style:family="text">
      <style:text-properties fo:color="#000000" loext:opacity="100%" fo:font-size="14pt" officeooo:rsid="00058a87" style:font-size-asian="14pt" style:font-size-complex="14pt"/>
    </style:style>
    <style:style style:name="T41" style:family="text">
      <style:text-properties fo:color="#000000" loext:opacity="100%" fo:font-size="14pt" officeooo:rsid="000b4c66" style:font-size-asian="14pt" style:font-size-complex="14pt"/>
    </style:style>
    <style:style style:name="T42" style:family="text">
      <style:text-properties fo:color="#000000" loext:opacity="100%" fo:font-size="14pt" officeooo:rsid="0052896c" style:font-size-asian="14pt" style:font-size-complex="14pt"/>
    </style:style>
    <style:style style:name="T43" style:family="text">
      <style:text-properties fo:color="#000000" loext:opacity="100%" fo:font-size="14pt" fo:language="ru" fo:country="RU" officeooo:rsid="00058a87" style:font-size-asian="14pt" style:font-size-complex="14pt"/>
    </style:style>
    <style:style style:name="T44" style:family="text">
      <style:text-properties fo:color="#000000" loext:opacity="100%" style:font-name="Times New Roman2"/>
    </style:style>
    <style:style style:name="T45" style:family="text">
      <style:text-properties fo:color="#000000" loext:opacity="100%" style:font-name="Times New Roman2" fo:font-size="14pt" style:font-size-asian="14pt" style:font-size-complex="14pt"/>
    </style:style>
    <style:style style:name="T46" style:family="text">
      <style:text-properties fo:color="#000000" loext:opacity="100%" style:font-name="Times New Roman2" fo:font-size="14pt" fo:language="ru" fo:country="RU" officeooo:rsid="003d8a2c" style:font-size-asian="14pt" style:font-size-complex="14pt"/>
    </style:style>
    <style:style style:name="T47" style:family="text">
      <style:text-properties fo:color="#000000" loext:opacity="100%" style:font-name="Times New Roman2" fo:font-size="14pt" fo:language="ru" fo:country="RU" officeooo:rsid="00785883" style:font-size-asian="14pt" style:font-size-complex="14pt"/>
    </style:style>
    <style:style style:name="T48" style:family="text">
      <style:text-properties fo:color="#000000" loext:opacity="100%" style:font-name="Times New Roman2" fo:font-size="14pt" fo:language="ru" fo:country="RU" fo:font-style="normal" style:text-underline-style="none" fo:font-weight="normal" officeooo:rsid="00471338" style:font-size-asian="14pt" style:font-style-asian="normal" style:font-weight-asian="normal" style:font-size-complex="14pt" style:font-style-complex="normal" style:font-weight-complex="normal"/>
    </style:style>
    <style:style style:name="T49" style:family="text">
      <style:text-properties fo:color="#000000" loext:opacity="100%" style:font-name="Times New Roman2" fo:font-size="14pt" fo:language="ru" fo:country="RU" fo:font-style="normal" style:text-underline-style="none" fo:font-weight="normal" officeooo:rsid="00785883" style:font-size-asian="14pt" style:font-style-asian="normal" style:font-weight-asian="normal" style:font-size-complex="14pt" style:font-style-complex="normal" style:font-weight-complex="normal"/>
    </style:style>
    <style:style style:name="T50" style:family="text">
      <style:text-properties fo:text-transform="uppercase" style:font-size-complex="14pt"/>
    </style:style>
    <style:style style:name="T51" style:family="text">
      <style:text-properties fo:text-transform="uppercase" fo:font-size="14pt" fo:font-weight="bold" style:font-size-asian="14pt" style:font-weight-asian="bold" style:font-size-complex="14pt"/>
    </style:style>
    <style:style style:name="T52" style:family="text">
      <style:text-properties fo:text-transform="uppercase" fo:font-size="14pt" fo:language="en" fo:country="US" fo:font-weight="bold" style:font-size-asian="14pt" style:font-weight-asian="bold" style:font-size-complex="14pt"/>
    </style:style>
    <style:style style:name="T53" style:family="text">
      <style:text-properties fo:text-transform="uppercase" fo:color="#000000" loext:opacity="100%" fo:font-size="14pt" fo:language="ru" fo:country="RU" fo:font-weight="bold" officeooo:rsid="000b8b91" style:font-size-asian="14pt" style:font-weight-asian="bold" style:font-size-complex="14pt"/>
    </style:style>
    <style:style style:name="T54" style:family="text">
      <style:text-properties fo:text-transform="uppercase" fo:color="#000000" loext:opacity="100%" fo:font-size="14pt" fo:language="ru" fo:country="RU" fo:font-weight="bold" officeooo:rsid="0056c171" style:font-size-asian="14pt" style:font-weight-asian="bold" style:font-size-complex="14pt"/>
    </style:style>
    <style:style style:name="T55" style:family="text">
      <style:text-properties fo:text-transform="uppercase" fo:font-weight="bold" style:font-weight-asian="bold"/>
    </style:style>
    <style:style style:name="T56" style:family="text">
      <style:text-properties fo:font-variant="normal" fo:text-transform="none" fo:font-size="14pt" style:font-size-asian="14pt" style:font-size-complex="14pt"/>
    </style:style>
    <style:style style:name="T57" style:family="text">
      <style:text-properties fo:font-variant="normal" fo:text-transform="none" fo:font-size="14pt" fo:language="ru" fo:country="RU" officeooo:rsid="00058a87" style:font-size-asian="14pt" style:font-size-complex="14pt"/>
    </style:style>
    <style:style style:name="T58" style:family="text">
      <style:text-properties fo:font-variant="normal" fo:text-transform="none" fo:color="#000000" loext:opacity="100%" style:font-name="Times New Roman2" fo:letter-spacing="normal" fo:font-style="normal" fo:font-weight="normal"/>
    </style:style>
    <style:style style:name="T59" style:family="text">
      <style:text-properties fo:font-variant="normal" fo:text-transform="none" fo:color="#000000" loext:opacity="100%" style:font-name="Times New Roman2" fo:letter-spacing="normal" fo:font-style="normal" fo:font-weight="normal" officeooo:rsid="005419df"/>
    </style:style>
    <style:style style:name="T60" style:family="text">
      <style:text-properties fo:font-variant="normal" fo:text-transform="none" fo:color="#000000" loext:opacity="100%" style:font-name="Times New Roman2" fo:font-size="14pt" fo:letter-spacing="normal" fo:font-style="normal" fo:font-weight="normal" officeooo:rsid="000b4c66" style:font-size-asian="14pt" style:font-size-complex="14pt"/>
    </style:style>
    <style:style style:name="T61" style:family="text">
      <style:text-properties fo:font-variant="normal" fo:text-transform="none" fo:color="#000000" loext:opacity="100%" style:font-name="Times New Roman2" fo:font-size="14pt" fo:letter-spacing="normal" fo:font-style="normal" fo:font-weight="normal" officeooo:rsid="0055fcc3" style:font-size-asian="14pt" style:font-size-complex="14pt"/>
    </style:style>
    <style:style style:name="T62" style:family="text">
      <style:text-properties fo:language="ru" fo:country="RU" officeooo:rsid="0007cb0c"/>
    </style:style>
    <style:style style:name="T63" style:family="text">
      <style:text-properties fo:language="ru" fo:country="RU" officeooo:rsid="003e6b87"/>
    </style:style>
    <style:style style:name="T64" style:family="text">
      <style:text-properties fo:language="ru" fo:country="RU" officeooo:rsid="004918bf"/>
    </style:style>
    <style:style style:name="T65" style:family="text">
      <style:text-properties fo:language="ru" fo:country="RU" officeooo:rsid="007dbda8"/>
    </style:style>
    <style:style style:name="T66" style:family="text">
      <style:text-properties officeooo:rsid="0005fe9c"/>
    </style:style>
    <style:style style:name="T67" style:family="text">
      <style:text-properties officeooo:rsid="0007cb0c"/>
    </style:style>
    <style:style style:name="T68" style:family="text">
      <style:text-properties fo:color="#ff0000" loext:opacity="100%" fo:font-size="14pt" style:font-size-asian="14pt" style:font-size-complex="14pt"/>
    </style:style>
    <style:style style:name="T69" style:family="text">
      <style:text-properties officeooo:rsid="002d9130"/>
    </style:style>
    <style:style style:name="T70" style:family="text">
      <style:text-properties officeooo:rsid="00190b76"/>
    </style:style>
    <style:style style:name="T71" style:family="text">
      <style:text-properties officeooo:rsid="001f199e"/>
    </style:style>
    <style:style style:name="T72" style:family="text">
      <style:text-properties officeooo:rsid="0009f83a"/>
    </style:style>
    <style:style style:name="T73" style:family="text">
      <style:text-properties officeooo:rsid="003572fd"/>
    </style:style>
    <style:style style:name="T74" style:family="text">
      <style:text-properties fo:font-weight="bold" style:font-weight-asian="bold" style:font-weight-complex="bold"/>
    </style:style>
    <style:style style:name="T75" style:family="text">
      <style:text-properties fo:font-weight="bold" officeooo:rsid="003b69ff" style:font-weight-asian="bold" style:font-weight-complex="bold"/>
    </style:style>
    <style:style style:name="T76" style:family="text">
      <style:text-properties fo:font-style="normal" style:font-style-asian="normal" style:font-style-complex="normal"/>
    </style:style>
    <style:style style:name="T77" style:family="text">
      <style:text-properties officeooo:rsid="0051b24c"/>
    </style:style>
    <style:style style:name="T78" style:family="text">
      <style:text-properties style:font-name="Times New Roman2"/>
    </style:style>
    <style:style style:name="T79" style:family="text">
      <style:text-properties style:font-name="Times New Roman2" fo:language="ru" fo:country="RU" officeooo:rsid="0007cb0c" style:font-name-asian="Times New Roman3" style:font-name-complex="Times New Roman3"/>
    </style:style>
    <style:style style:name="T80" style:family="text">
      <style:text-properties style:font-name="Times New Roman2" officeooo:rsid="000b4c66"/>
    </style:style>
    <style:style style:name="T81" style:family="text">
      <style:text-properties style:font-name="Times New Roman2" officeooo:rsid="0056c171"/>
    </style:style>
    <style:style style:name="T82" style:family="text">
      <style:text-properties fo:font-style="italic" style:font-style-asian="italic" style:font-style-complex="italic"/>
    </style:style>
    <style:style style:name="T83" style:family="text">
      <style:text-properties fo:font-style="italic" officeooo:rsid="006d4e09" style:font-style-asian="italic" style:font-style-complex="italic"/>
    </style:style>
    <style:style style:name="T84" style:family="text">
      <style:text-properties officeooo:rsid="005ca32e"/>
    </style:style>
    <style:style style:name="T85" style:family="text">
      <style:text-properties officeooo:rsid="005d9053"/>
    </style:style>
    <style:style style:name="T86" style:family="text">
      <style:text-properties officeooo:rsid="005f69c5"/>
    </style:style>
    <style:style style:name="T87" style:family="text">
      <style:text-properties officeooo:rsid="006d4e09"/>
    </style:style>
    <style:style style:name="T88" style:family="text">
      <style:text-properties officeooo:rsid="0071ee9b"/>
    </style:style>
    <style:style style:name="T89" style:family="text">
      <style:text-properties officeooo:rsid="0072d9ab"/>
    </style:style>
    <style:style style:name="T90" style:family="text">
      <style:text-properties officeooo:rsid="00734b90"/>
    </style:style>
    <style:style style:name="T91" style:family="text">
      <style:text-properties officeooo:rsid="00737ae5"/>
    </style:style>
    <style:style style:name="T92" style:family="text">
      <style:text-properties officeooo:rsid="0073e430"/>
    </style:style>
    <style:style style:name="T93" style:family="text">
      <style:text-properties officeooo:rsid="0077083a"/>
    </style:style>
    <style:style style:name="T94" style:family="text">
      <style:text-properties style:font-name="Times New Roman1" fo:font-size="14pt" fo:font-weight="bold" officeooo:rsid="00785883" style:font-size-asian="14pt" style:font-weight-asian="bold" style:font-size-complex="14pt" style:font-weight-complex="bold"/>
    </style:style>
    <style:style style:name="T95" style:family="text">
      <style:text-properties style:font-name="Times New Roman1" fo:font-size="14pt" fo:font-weight="bold" officeooo:rsid="0078d649" style:font-size-asian="14pt" style:font-weight-asian="bold" style:font-size-complex="14pt" style:font-weight-complex="bold"/>
    </style:style>
    <style:style style:name="T96" style:family="text">
      <style:text-properties officeooo:rsid="0079ce63"/>
    </style:style>
    <style:style style:name="T97" style:family="text">
      <style:text-properties officeooo:rsid="007a761f"/>
    </style:style>
    <style:style style:name="T98" style:family="text">
      <style:text-properties officeooo:rsid="007c211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МИНОБРНАУКИ РОССИИ</text:p>
      <text:p text:style-name="P4">Санкт-Петербургский государственный</text:p>
      <text:p text:style-name="P4">электротехнический университет </text:p>
      <text:p text:style-name="P4">«ЛЭТИ» им. В.И. Ульянова (Ленина)</text:p>
      <text:p text:style-name="P11"><text:span text:style-name="T1">Кафедра </text:span><text:span text:style-name="T38">МОЭВМ</text:span></text:p>
      <text:p text:style-name="P4"/>
      <text:p text:style-name="P4"/>
      <text:p text:style-name="P17"/>
      <text:p text:style-name="P17"/>
      <text:p text:style-name="P17"/>
      <text:p text:style-name="P12"><text:span text:style-name="Название_20_книги"><text:span text:style-name="T50">Курсовая РАБОТА</text:span></text:span></text:p>
      <text:p text:style-name="P11"><text:span text:style-name="T1">по дисциплине «</text:span><text:span text:style-name="T38">Алгоритмы и структуры данных</text:span><text:span text:style-name="T1">»</text:span></text:p>
      <text:p text:style-name="P11"><text:span text:style-name="Название_20_книги"><text:span text:style-name="T56">Тема: </text:span></text:span><text:span text:style-name="Название_20_книги"><text:span text:style-name="T57">Выбор оптимальной структуры данных</text:span></text:span></text:p>
      <text:p text:style-name="P11"><text:span text:style-name="Название_20_книги"><text:span text:style-name="T56"/></text:span></text:p>
      <text:p text:style-name="P17"/>
      <text:p text:style-name="P17"/>
      <text:p text:style-name="P17"/>
      <text:p text:style-name="P17"/>
      <text:p text:style-name="P17"/>
      <text:p text:style-name="P17"/>
      <text:p text:style-name="P17"/>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Standard"><text:span text:style-name="T4">Студент</text:span><text:span text:style-name="T40">ка</text:span><text:span text:style-name="T4"> гр. </text:span><text:span text:style-name="T40">4342</text:span></text:p>
          </table:table-cell>
          <table:table-cell table:style-name="Таблица1.B1" office:value-type="string">
            <text:p text:style-name="P20"/>
          </table:table-cell>
          <table:table-cell table:style-name="Таблица1.A1" office:value-type="string">
            <text:p text:style-name="P26">Киселева А.Д.</text:p>
          </table:table-cell>
        </table:table-row>
        <table:table-row table:style-name="Таблица1.1">
          <table:table-cell table:style-name="Таблица1.A1" office:value-type="string">
            <text:p text:style-name="P21">Преподаватель<text:span text:style-name="T4"/></text:p>
          </table:table-cell>
          <table:table-cell table:style-name="Таблица1.B2" office:value-type="string">
            <text:p text:style-name="P20"/>
          </table:table-cell>
          <table:table-cell table:style-name="Таблица1.A1" office:value-type="string">
            <text:p text:style-name="P56">Иванов Д.В.</text:p>
          </table:table-cell>
        </table:table-row>
      </table:table>
      <text:p text:style-name="P22"/>
      <text:p text:style-name="P22"/>
      <text:p text:style-name="P22">Санкт-Петербург</text:p>
      <text:p text:style-name="P28">2025</text:p>
      <text:p text:style-name="P5">ЗАДАНИЕ</text:p>
      <text:p text:style-name="P4">на курсовую работу</text:p>
      <text:p text:style-name="P7"/>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table:number-columns-spanned="3" office:value-type="string">
            <text:p text:style-name="P15"><text:span text:style-name="T4">Студент</text:span><text:span text:style-name="T40">ка</text:span><text:span text:style-name="T39"> </text:span><text:span text:style-name="T40">Киселева А.Д.</text:span></text:p>
          </table:table-cell>
          <table:covered-table-cell/>
          <table:covered-table-cell/>
        </table:table-row>
        <table:table-row table:style-name="Таблица2.2">
          <table:table-cell table:style-name="Таблица2.A1" table:number-columns-spanned="3" office:value-type="string">
            <text:p text:style-name="P15"><text:span text:style-name="T4">Группа </text:span><text:span text:style-name="T40">4342</text:span></text:p>
          </table:table-cell>
          <table:covered-table-cell/>
          <table:covered-table-cell/>
        </table:table-row>
        <table:table-row table:style-name="Таблица2.3">
          <table:table-cell table:style-name="Таблица2.A1" table:number-columns-spanned="3" office:value-type="string">
            <text:p text:style-name="P15"><text:span text:style-name="T4">Тема работы: </text:span><text:span text:style-name="T43">Выбор оптимальной структуры данных</text:span></text:p>
          </table:table-cell>
          <table:covered-table-cell/>
          <table:covered-table-cell/>
        </table:table-row>
        <table:table-row table:style-name="Таблица2.4">
          <table:table-cell table:style-name="Таблица2.A1" table:number-columns-spanned="3" office:value-type="string">
            <text:p text:style-name="P18">Исходные данные: </text:p>
            <text:p text:style-name="P18">Вариант <text:span text:style-name="T77">4.1</text:span></text:p>
            <text:p text:style-name="P57"><text:span text:style-name="T62">В столовой “Мария” решили ввести функцию онлайн заказа еды. Для этого необходимо хранить название блюда и его цену. Для удобства выбора нужно уметь выводить список позиций по названию (в лексикографическом порядке). Также студенты желают иметь возможность поиска цены блюда по его названию. При этом обновление ассортимента позиций происходит регулярно, но реже запросов на доступ к списку блюд. Выберите и реализуйте оптимальную структуру данных для введения новой функции. </text:span><text:span text:style-name="T79">Для выбора структуры данных нужно провести подробное исследование и зафиксировать его в отчете. Для демонстрации работы необходимо сделать промежуточные выводы работы программы и визуализацию структуры данных.</text:span></text:p>
          </table:table-cell>
          <table:covered-table-cell/>
          <table:covered-table-cell/>
        </table:table-row>
        <table:table-row table:style-name="Таблица2.5">
          <table:table-cell table:style-name="Таблица2.A1" table:number-columns-spanned="3" office:value-type="string">
            <text:p text:style-name="P18">Содержание пояснительной записки:</text:p>
            <text:p text:style-name="P47">«<text:span text:style-name="T66">Аннотация», </text:span>«Содержание», «Введение»,<text:span text:style-name="T67"> «Выбор структуры данных», «</text:span><text:span text:style-name="T77">Реализация структур </text:span><text:span text:style-name="T88">и алгоритмов</text:span><text:span text:style-name="T77">»</text:span><text:span text:style-name="T67">, «</text:span><text:span text:style-name="T77">Исследование», </text:span>«Заключение», «Список использованных источников»</text:p>
          </table:table-cell>
          <table:covered-table-cell/>
          <table:covered-table-cell/>
        </table:table-row>
        <table:table-row table:style-name="Таблица2.6">
          <table:table-cell table:style-name="Таблица2.A1" table:number-columns-spanned="3" office:value-type="string">
            <text:p text:style-name="P18">Предполагаемый объем пояснительной записки:</text:p>
            <text:p text:style-name="P15"><text:span text:style-name="T4">Не менее </text:span><text:span text:style-name="T5">10</text:span><text:span text:style-name="T68"> </text:span><text:span text:style-name="T4">страниц.</text:span></text:p>
          </table:table-cell>
          <table:covered-table-cell/>
          <table:covered-table-cell/>
        </table:table-row>
        <table:table-row table:style-name="Таблица2.7">
          <table:table-cell table:style-name="Таблица2.A1" table:number-columns-spanned="3" office:value-type="string">
            <text:p text:style-name="P15"><text:span text:style-name="T4">Дата выдачи задания: </text:span><text:span text:style-name="T42">24</text:span><text:span text:style-name="T39">.</text:span><text:span text:style-name="T42">11</text:span><text:span text:style-name="T39">.20</text:span><text:span text:style-name="T40">25</text:span></text:p>
          </table:table-cell>
          <table:covered-table-cell/>
          <table:covered-table-cell/>
        </table:table-row>
        <text:soft-page-break/>
        <table:table-row table:style-name="Таблица2.8">
          <table:table-cell table:style-name="Таблица2.A1" table:number-columns-spanned="3" office:value-type="string">
            <text:p text:style-name="P15"><text:span text:style-name="T4">Дата сдачи реферата: </text:span><text:span text:style-name="T40">2</text:span><text:span text:style-name="T42">0</text:span><text:span text:style-name="T40">.</text:span><text:span text:style-name="T42">12</text:span><text:span text:style-name="T40">.2025</text:span></text:p>
          </table:table-cell>
          <table:covered-table-cell/>
          <table:covered-table-cell/>
        </table:table-row>
        <table:table-row table:style-name="Таблица2.9">
          <table:table-cell table:style-name="Таблица2.A1" table:number-columns-spanned="3" office:value-type="string">
            <text:p text:style-name="P15"><text:span text:style-name="T4">Дата защиты реферата: </text:span><text:span text:style-name="T5">2</text:span><text:span text:style-name="T6">2</text:span><text:span text:style-name="T39">.</text:span><text:span text:style-name="T42">12</text:span><text:span text:style-name="T39">.20</text:span><text:span text:style-name="T40">25</text:span></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able:table-cell>
          <table:covered-table-cell/>
          <table:covered-table-cell/>
        </table:table-row>
        <table:table-row table:style-name="Таблица2.10">
          <table:table-cell table:style-name="Таблица2.A10" office:value-type="string">
            <text:p text:style-name="P54"><text:span text:style-name="T4">Студент</text:span><text:span text:style-name="T39">ка</text:span></text:p>
          </table:table-cell>
          <table:table-cell table:style-name="Таблица2.A10" office:value-type="string">
            <text:p text:style-name="P25"/>
          </table:table-cell>
          <table:table-cell table:style-name="Таблица2.A10" office:value-type="string">
            <text:p text:style-name="P27">Киселева А.Д.</text:p>
          </table:table-cell>
        </table:table-row>
        <table:table-row table:style-name="Таблица2.10">
          <table:table-cell table:style-name="Таблица2.A10" office:value-type="string">
            <text:p text:style-name="P23">Преподаватель</text:p>
          </table:table-cell>
          <table:table-cell table:style-name="Таблица2.B11" office:value-type="string">
            <text:p text:style-name="P19"/>
          </table:table-cell>
          <table:table-cell table:style-name="Таблица2.A10" office:value-type="string">
            <text:p text:style-name="P58">Иванов Д.В.</text:p>
          </table:table-cell>
        </table:table-row>
      </table:table>
      <text:p text:style-name="P7"/>
      <text:p text:style-name="P82"><text:span text:style-name="T55">Аннотация</text:span></text:p>
      <text:p text:style-name="P55"><text:span text:style-name="T44"/></text:p>
      <text:p text:style-name="P90"><text:span text:style-name="T58">Курсовая работа посвящена разработке консольной утилиты для системы онлайн-заказа еды в столовой "Мария". </text:span><text:span text:style-name="T59">Программа реализует два режима работы: администраторский и клиентский, предоставляя функционал для управления меню блюд и формирования заказов. В системе администратор может добавлять, удалять и изменять цены блюд в меню, в то время как клиенты имеют возможность просматривать меню, выбирать блюда для заказа, управлять содержимым корзины и рассчитывать итоговую стоимость. Чтобы программа одинаково быстро работала при различных количествах позиций меню, производится исследование подходящих структур данных и в соответствие с временем выполнения каждой операции выбирается оптимальная структура.</text:span></text:p>
      <text:p text:style-name="P55"/>
      <text:p text:style-name="P10">Summary</text:p>
      <text:p text:style-name="P10"/>
      <text:p text:style-name="P78"><text:span text:style-name="T52"><text:tab/></text:span><text:span text:style-name="T9">The course work is devoted to the development of a console utility for the online food ordering system in the Maria canteen. The program implements two modes of operation: admin and client, providing functionality for managing the menu of dishes and forming orders. In the system, the administrator can add, delete and change the prices of dishes in the menu, while customers have the opportunity to view the menu, select dishes to order, manage the contents of the basket and calculate the total cost. In order for the program to work equally quickly with different numbers of menu items, suitable data structures are investigated and the optimal structure is selected in accordance with the execution time of each operation.</text:span></text:p>
      <text:p text:style-name="P91"/>
      <text:p text:style-name="P5">содержание</text:p>
      <text:p text:style-name="P8"/>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9"/>
          </table:table-cell>
          <table:table-cell table:style-name="Таблица3.A1" office:value-type="string">
            <text:p text:style-name="P32">Введение</text:p>
          </table:table-cell>
          <table:table-cell table:style-name="Таблица3.A1" office:value-type="string">
            <text:p text:style-name="P63">6</text:p>
          </table:table-cell>
        </table:table-row>
        <table:table-row table:style-name="Таблица3.1">
          <table:table-cell table:style-name="Таблица3.A1" office:value-type="string">
            <text:p text:style-name="P30">1.</text:p>
          </table:table-cell>
          <table:table-cell table:style-name="Таблица3.A1" office:value-type="string">
            <text:p text:style-name="P62">Выбор структуры данных</text:p>
          </table:table-cell>
          <table:table-cell table:style-name="Таблица3.A1" office:value-type="string">
            <text:p text:style-name="P63">7</text:p>
          </table:table-cell>
        </table:table-row>
        <table:table-row table:style-name="Таблица3.1">
          <table:table-cell table:style-name="Таблица3.A1" office:value-type="string">
            <text:p text:style-name="P63">2.</text:p>
          </table:table-cell>
          <table:table-cell table:style-name="Таблица3.A1" office:value-type="string">
            <text:p text:style-name="P62">Реализация структур и алгоритмов</text:p>
          </table:table-cell>
          <table:table-cell table:style-name="Таблица3.A1" office:value-type="string">
            <text:p text:style-name="P63">13</text:p>
          </table:table-cell>
        </table:table-row>
        <table:table-row table:style-name="Таблица3.1">
          <table:table-cell table:style-name="Таблица3.A1" office:value-type="string">
            <text:p text:style-name="P63">3.</text:p>
          </table:table-cell>
          <table:table-cell table:style-name="Таблица3.A1" office:value-type="string">
            <text:p text:style-name="P62">Исследование</text:p>
          </table:table-cell>
          <table:table-cell table:style-name="Таблица3.A1" office:value-type="string">
            <text:p text:style-name="P63">19</text:p>
          </table:table-cell>
        </table:table-row>
        <table:table-row table:style-name="Таблица3.1">
          <table:table-cell table:style-name="Таблица3.A1" office:value-type="string">
            <text:p text:style-name="P29"/>
          </table:table-cell>
          <table:table-cell table:style-name="Таблица3.A1" office:value-type="string">
            <text:p text:style-name="P32">Заключение</text:p>
          </table:table-cell>
          <table:table-cell table:style-name="Таблица3.A1" office:value-type="string">
            <text:p text:style-name="P68">22</text:p>
          </table:table-cell>
        </table:table-row>
        <table:table-row table:style-name="Таблица3.1">
          <table:table-cell table:style-name="Таблица3.A1" office:value-type="string">
            <text:p text:style-name="P50"/>
          </table:table-cell>
          <table:table-cell table:style-name="Таблица3.A1" office:value-type="string">
            <text:p text:style-name="P32">Список использованных источников</text:p>
          </table:table-cell>
          <table:table-cell table:style-name="Таблица3.A1" office:value-type="string">
            <text:p text:style-name="P68">23</text:p>
          </table:table-cell>
        </table:table-row>
        <table:table-row table:style-name="Таблица3.1">
          <table:table-cell table:style-name="Таблица3.A1" office:value-type="string">
            <text:p text:style-name="P50"/>
          </table:table-cell>
          <table:table-cell table:style-name="Таблица3.A1" office:value-type="string">
            <text:p text:style-name="P32">Приложение А. <text:span text:style-name="T73">Тестирование</text:span></text:p>
          </table:table-cell>
          <table:table-cell table:style-name="Таблица3.A1" office:value-type="string">
            <text:p text:style-name="P68">24</text:p>
          </table:table-cell>
        </table:table-row>
        <table:table-row table:style-name="Таблица3.1">
          <table:table-cell table:style-name="Таблица3.A1" office:value-type="string">
            <text:p text:style-name="P50"/>
          </table:table-cell>
          <table:table-cell table:style-name="Таблица3.A1" office:value-type="string">
            <text:p text:style-name="P46">Приложение Б. Код программы</text:p>
          </table:table-cell>
          <table:table-cell table:style-name="Таблица3.A1" office:value-type="string">
            <text:p text:style-name="P51">2<text:span text:style-name="T65">6</text:span></text:p>
          </table:table-cell>
        </table:table-row>
        <table:table-row table:style-name="Таблица3.1">
          <table:table-cell table:style-name="Таблица3.A1" office:value-type="string">
            <text:p text:style-name="P50"/>
          </table:table-cell>
          <table:table-cell table:style-name="Таблица3.A1" office:value-type="string">
            <text:p text:style-name="P64">Приложение С. Примеры работы программы</text:p>
          </table:table-cell>
          <table:table-cell table:style-name="Таблица3.A1" office:value-type="string">
            <text:p text:style-name="P68">34</text:p>
          </table:table-cell>
        </table:table-row>
      </table:table>
      <text:p text:style-name="P21"/>
      <text:p text:style-name="P5">введение</text:p>
      <text:p text:style-name="P48"/>
      <text:p text:style-name="P16"><text:span text:style-name="T41"><text:tab/>Цель:<text:tab/> </text:span><text:span text:style-name="T60">разработать программу для системы онлайн-заказа еды в столовой «Мария», обеспечивающую эффективное </text:span><text:span text:style-name="T61">обновление</text:span><text:span text:style-name="T60">, </text:span><text:span text:style-name="T61">быстрый </text:span><text:span text:style-name="T60">поиск и сортированный вывод данных о блюдах с учётом специфики частоты операций обновления и чтения.</text:span></text:p>
      <text:p text:style-name="P16"><text:span text:style-name="T45"/></text:p>
      <text:p text:style-name="P59"><text:span text:style-name="T80"><text:tab/>Задачи:</text:span></text:p>
      <text:list text:style-name="L3">
        <text:list-item>
          <text:p text:style-name="P60"><text:span text:style-name="T80">Провести сравнительный анализ структур данных для выбора оптимального решения, соответствующего требованиям задачи</text:span><text:span text:style-name="T81">. </text:span></text:p>
        </text:list-item>
        <text:list-item>
          <text:p text:style-name="P60"><text:span text:style-name="T80">Реализовать базовые операции с выбранной структурой данных: добавление, удаление, изменение цены блюда, поиск по названию и лексикографический вывод всего меню.</text:span></text:p>
        </text:list-item>
        <text:list-item>
          <text:p text:style-name="P60"><text:span text:style-name="T80">Организовать взаимодействие с пользователем через консольный интерфейс с поддержкой двух режимов работы (администратор и клиент) и набором текстовых команд.</text:span></text:p>
        </text:list-item>
        <text:list-item>
          <text:p text:style-name="P61"><text:span text:style-name="T80">И</text:span><text:span text:style-name="T78">сследовать временную сложность каждой операции для всех случаев и отразить ее на графиках зависимости времени от размера входных данных.</text:span></text:p>
        </text:list-item>
        <text:list-item>
          <text:p text:style-name="P60"><text:span text:style-name="T81">Протестировать</text:span><text:span text:style-name="T80"> </text:span><text:span text:style-name="T81">программу.</text:span></text:p>
        </text:list-item>
      </text:list>
      <text:p text:style-name="P13"><text:span text:style-name="T51">1. </text:span><text:span text:style-name="T54">ВЫБОР СТРУКТУРЫ ДАННЫХ</text:span></text:p>
      <text:p text:style-name="P14"><text:span text:style-name="T53"/></text:p>
      <text:p text:style-name="P115"><text:span text:style-name="T2">1.1. </text:span><text:span text:style-name="T3">Формализация постановки задачи</text:span></text:p>
      <text:p text:style-name="P143"><text:span text:style-name="T3">1.</text:span><text:span text:style-name="T2">1.1. Операции</text:span></text:p>
      <text:p text:style-name="P118"><text:span text:style-name="T4">В рамках решаемой задачи структура должна поддерживать следующие операции:</text:span></text:p>
      <text:list text:style-name="L4">
        <text:list-item>
          <text:p text:style-name="P119"><text:span text:style-name="T4">Добавление элемента по ключу и значению;</text:span></text:p>
        </text:list-item>
        <text:list-item>
          <text:p text:style-name="P119"><text:span text:style-name="T4">Обновление значения существующего ключа;</text:span></text:p>
        </text:list-item>
        <text:list-item>
          <text:p text:style-name="P119"><text:span text:style-name="T4">Поиск значения элемента по ключу;</text:span></text:p>
        </text:list-item>
        <text:list-item>
          <text:p text:style-name="P119"><text:span text:style-name="T4">Удаление элемента по ключу;</text:span></text:p>
        </text:list-item>
        <text:list-item>
          <text:p text:style-name="P116"><text:span text:style-name="T10">Вывод всех элементов в лексикографическом порядке.</text:span></text:p>
        </text:list-item>
      </text:list>
      <text:p text:style-name="P117"><text:span text:style-name="T10"/></text:p>
      <text:p text:style-name="P102"><text:span text:style-name="T4"><text:tab/></text:span><text:span text:style-name="T7">1.1.2 </text:span><text:span text:style-name="T25">Анализ частоты операций</text:span></text:p>
      <text:p text:style-name="P117"><text:span text:style-name="T10"><text:tab/>Согласно заданию, обновление списка элементов происходит регулярно, но реже запросов на вывод всех элементов в отсортированном порядке и поиска элемента по ключу. </text:span></text:p>
      <text:p text:style-name="P117"><text:span text:style-name="T11"/></text:p>
      <text:p text:style-name="P103"><text:span text:style-name="T7"><text:tab/></text:span><text:span text:style-name="T8">1.1.3 Х</text:span><text:span text:style-name="T25">арактеристики данных</text:span></text:p>
      <text:p text:style-name="P103"><text:span text:style-name="T25"><text:tab/></text:span><text:span text:style-name="T18">Ожидаемый объем входных данных не превышает 1000 позиций, <text:s/>предполагается активное изменение данных. К</text:span><text:span text:style-name="T19">лючи имеют следующие характеристики:</text:span></text:p>
      <text:list text:style-name="L5">
        <text:list-item>
          <text:p text:style-name="P104"><text:span text:style-name="T17">Тип: строка, содержащая название блюда;</text:span></text:p>
        </text:list-item>
        <text:list-item>
          <text:p text:style-name="P104"><text:span text:style-name="T17">Характер доступа: случайный (поиск конкретного блюда) + последовательный (вывод всего меню);</text:span></text:p>
        </text:list-item>
        <text:list-item>
          <text:p text:style-name="P104"><text:span text:style-name="T17">Уникальность: все ключи уникальны, не может быть двух блюд с одинаковым названием.</text:span></text:p>
        </text:list-item>
      </text:list>
      <text:p text:style-name="P105"><text:span text:style-name="T17"/></text:p>
      <text:p text:style-name="P105"><text:span text:style-name="T24"><text:tab/>1.1.4 Критерии выбора</text:span></text:p>
      <text:list text:style-name="L6">
        <text:list-item>
          <text:p text:style-name="P120"><text:soft-page-break/><text:span text:style-name="T24">Эффективность поиска по ключу, так как это наиболее частая операция.</text:span></text:p>
        </text:list-item>
        <text:list-item>
          <text:p text:style-name="P122"><text:span text:style-name="T24">Поддержка вывода позиций в лексикографическом порядке, вторая по частоте операция.</text:span></text:p>
        </text:list-item>
        <text:list-item>
          <text:p text:style-name="P122"><text:span text:style-name="T24">Эффективность вставки и удаления — операции выполняются регулярно.</text:span></text:p>
        </text:list-item>
      </text:list>
      <text:p text:style-name="P123"><text:span text:style-name="T24"/></text:p>
      <text:p text:style-name="P106"><text:span text:style-name="T24">1.2 Анализ альтернативных структур данных</text:span></text:p>
      <text:p text:style-name="P107"><text:span text:style-name="T24"><text:tab/>1.2.1 Массив</text:span></text:p>
      <text:p text:style-name="P107"><text:span text:style-name="T24"><text:tab/></text:span><text:span text:style-name="T20">Массив — структура данных, которая хранит набор однородных данных, доступ к которым осуществляется по индексам. Элементы массива хранятся последовательно, что требует выделения непрерывного участка памяти. </text:span></text:p>
      <text:p text:style-name="P109"><text:span text:style-name="T17"><text:tab/>Для наиболее эффективной операции поиска </text:span><text:span text:style-name="T22">O(log n)</text:span><text:span text:style-name="T17"> массив должен быть отсортирован по названиям блюд. </text:span><text:span text:style-name="T21">Для операций вставки и удаления в среднем случае нужно сдвинуть n/2 элементов, в худшем n элементов массива, что оценивается как O(n). При большом количестве блюд будут потери в скорости.</text:span></text:p>
      <text:p text:style-name="P110"><text:span text:style-name="T21"><text:tab/></text:span><text:span text:style-name="T23">Для <text:s/></text:span><text:span text:style-name="T22">вывода меню в лексикографическом порядке </text:span><text:span text:style-name="T23">требуется обойти весь отсортированный массив, что займет O(n) времени.</text:span></text:p>
      <text:p text:style-name="P108"><text:span text:style-name="T21"><text:tab/>Исходя из рассуждений выше, массив не подходит для данной задачи из-за отсутствия возможности одновременно быстрого поиска и обновления позиций меню.</text:span></text:p>
      <text:p text:style-name="P108"><text:span text:style-name="T21"/></text:p>
      <text:p text:style-name="P111"><text:span text:style-name="T26"><text:tab/>1.</text:span><text:span text:style-name="T24">2.2 Хэш-таблица</text:span></text:p>
      <text:p text:style-name="P111"><text:span text:style-name="T24"><text:tab/></text:span><text:span text:style-name="T17">Хэш-таблица — структура данных, которая хранит пары ключ-значение, используя хэш-функцию для вычисления индекса в массиве. Коллизии разрешаются методом цепочек или открытой адресации.</text:span></text:p>
      <text:p text:style-name="P124"><text:span text:style-name="T24"><text:tab/>Для операции поиска по названию блюда в среднем случае требуется O(1) время, так как хэш-функция равномерно распределяет ключи по ячейкам. Однако в худшем случае, при плохой хэш-функции или искусственно </text:span><text:soft-page-break/><text:span text:style-name="T24">подобранных данных, все ключи могут попасть в одну ячейку, что приведёт к поиску по списку из n элементов за O(n).</text:span></text:p>
      <text:p text:style-name="P124"><text:span text:style-name="T24"><text:tab/>Операции вставки и удаления также имеют среднюю сложность O(1), но в худшем случае требуют O(n) из-за необходимости обработки длинной цепочки коллизий или рехэширования всей таблицы при высокой нагрузке.</text:span></text:p>
      <text:p text:style-name="P124"><text:span text:style-name="T24"><text:tab/>Для вывода меню в лексикографическом порядке требуется дополнительная сортировка всех элементов, что занимает O(n log n) времени, поскольку хэш-таблица не сохраняет порядок ключей.</text:span></text:p>
      <text:p text:style-name="P124"><text:span text:style-name="T24"><text:tab/></text:span><text:span text:style-name="T28">Х</text:span><text:span text:style-name="T24">эш-таблица не подходит для данной задачи, так как не поддерживает упорядоченный вывод данных без дополнительной затратной сортировки, что противоречит требованию частого отображения меню в отсортированном виде.</text:span></text:p>
      <text:p text:style-name="P124"><text:span text:style-name="T24"/></text:p>
      <text:p text:style-name="P124"><text:span text:style-name="T37"><text:tab/>1.2.3 Бинарное дерево</text:span></text:p>
      <text:p text:style-name="P123"><text:span text:style-name="T24"><text:tab/>Бинарное дерево поиска (BST) — структура данных, в которой каждый узел содержит ключ и два поддерева (левое и правое), причём все ключи в левом поддереве меньше, а в правом — больше ключа родителя.</text:span></text:p>
      <text:p text:style-name="P123"><text:span text:style-name="T24"><text:tab/>Для операции поиска по названию блюда в среднем случае требуется O(log n) время при сбалансированном дереве. Однако в худшем случае, когда ключи добавляются в отсортированном порядке, дерево вырождается в список, и поиск занимает O(n).</text:span></text:p>
      <text:p text:style-name="P123"><text:span text:style-name="T24"><text:tab/>Операции вставки и удаления также имеют среднюю сложность O(log n), но в худшем случае требуют O(n) из-за необходимости обхода вырожденного дерева.</text:span></text:p>
      <text:p text:style-name="P123"><text:span text:style-name="T24"><text:tab/>Вывод меню в лексикографическом порядке осуществляется за O(n) с помощью </text:span><text:span text:style-name="T27">центрированного</text:span><text:span text:style-name="T24"> обхода дерева.</text:span></text:p>
      <text:p text:style-name="P123"><text:span text:style-name="T24"><text:tab/>BST не подходит для данной задачи, так как не гарантирует сбалансированность, что может привести к деградации производительности до O(n) при определённых последовательностях вставки.</text:span></text:p>
      <text:p text:style-name="P123"><text:soft-page-break/><text:span text:style-name="T24"/></text:p>
      <text:p text:style-name="P112"><text:span text:style-name="T24"><text:tab/>1.2.4 АВЛ-дерево</text:span></text:p>
      <text:p text:style-name="P112"><text:span text:style-name="T24"><text:tab/></text:span><text:span text:style-name="T17">АВЛ-дерево — сбалансированное бинарное дерево поиска, в котором для каждого узла высота его поддеревьев различается не более чем на 1, что обеспечивается операциями поворота после вставки и удаления.</text:span></text:p>
      <text:p text:style-name="P125"><text:span text:style-name="T24"><text:tab/>Для операции поиска по названию блюда гарантируется время O(log n) как в среднем, так и в худшем случае благодаря строгой балансировке дерева.</text:span></text:p>
      <text:p text:style-name="P125"><text:span text:style-name="T24"><text:tab/>Операции вставки и удаления также выполняются за O(log n), поскольку после модификации может потребоваться балансировка от корня до изменённого узла.</text:span></text:p>
      <text:p text:style-name="P125"><text:span text:style-name="T24"><text:tab/>Вывод меню в лексикографическом порядке осуществляется за O(n) с помощью центрированного обхода дерева.</text:span></text:p>
      <text:p text:style-name="P125"><text:span text:style-name="T24"><text:tab/>АВЛ-дерево подходит для данной задачи, так как обеспечивает гарантированно логарифмическое время для всех основных операций, поддерживает данные в отсортированном порядке и эффективно справляется с профилем нагрузки, где поиск и вывод происходят значительно чаще обновлений.</text:span></text:p>
      <text:p text:style-name="P125"><text:span text:style-name="T24"><text:tab/></text:span></text:p>
      <text:p text:style-name="P112"><text:span text:style-name="T24"><text:tab/>1.2.5 Красно-черное дерево</text:span></text:p>
      <text:p text:style-name="P125"><text:span text:style-name="T24"><text:tab/>Красно-чёрное дерево — сбалансированное бинарное дерево поиска, в котором каждый узел имеет цвет (красный или чёрный), и выполняются свойства, ограничивающие высоту дерева, обеспечивая приближённую балансировку.</text:span></text:p>
      <text:p text:style-name="P125"><text:span text:style-name="T24"><text:tab/>Для операции поиска по названию блюда гарантируется время O(log n) как в среднем, так и в худшем случае, поскольку дерево остаётся сбалансированным за счёт соблюдения свойств красно-чёрного дерева.</text:span></text:p>
      <text:p text:style-name="P125"><text:soft-page-break/><text:span text:style-name="T24"><text:tab/>Операции вставки и удаления также выполняются за O(log n), так как требуют коррекции цвета и выполнения поворотов, количество которых ограничено константой, что сохраняет логарифмическую сложность.</text:span></text:p>
      <text:p text:style-name="P125"><text:span text:style-name="T24"><text:tab/>Вывод меню в лексикографическом порядке осуществляется за O(n) с помощью </text:span><text:span text:style-name="T28">центрированного</text:span><text:span text:style-name="T24"> обхода дерева, что соответствует требованию задачи.</text:span></text:p>
      <text:p text:style-name="P125"><text:span text:style-name="T24"><text:tab/>Красно-чёрное дерево подходит для данной задачи, однако АВЛ-дерево является более предпочтительным выбором, поскольку обеспечивает более строгую балансировку, что даёт меньшую константу в операциях поиска при частоте запросов на чтение, значительно превышающей частоту обновлений.</text:span></text:p>
      <text:p text:style-name="P106"><text:span text:style-name="T24"/></text:p>
      <text:p text:style-name="P106"><text:span text:style-name="T28"><text:tab/>1.2.6. Выбор структуры</text:span></text:p>
      <text:p text:style-name="P106"><text:span text:style-name="T28"><text:tab/></text:span><text:span text:style-name="T23"> Для наглядности и удобства выбора сложности всех операций структур, рассмотренных выше, отображены в Таблице 1.</text:span></text:p>
      <text:p text:style-name="P106"><text:span text:style-name="T23"/></text:p>
      <text:p text:style-name="P144"><text:span text:style-name="T76">Таблица 1 — Сравнение сложности операций на различных структурах данных</text:span></text:p>
      <table:table table:name="Таблица22" table:style-name="Таблица22">
        <table:table-column table:style-name="Таблица22.A"/>
        <table:table-column table:style-name="Таблица22.B"/>
        <table:table-column table:style-name="Таблица22.C"/>
        <table:table-column table:style-name="Таблица22.D"/>
        <table:table-column table:style-name="Таблица22.E"/>
        <table:table-row>
          <table:table-cell table:style-name="Таблица22.A1" office:value-type="string">
            <text:p text:style-name="P147">Структура данных</text:p>
          </table:table-cell>
          <table:table-cell table:style-name="Таблица22.A1" office:value-type="string">
            <text:p text:style-name="P147">Поиск</text:p>
            <text:p text:style-name="P147">(средний/худший случаи)</text:p>
          </table:table-cell>
          <table:table-cell table:style-name="Таблица22.A1" office:value-type="string">
            <text:p text:style-name="P147">Вставка/Удаление</text:p>
            <text:p text:style-name="P147">(средний/худший случаи)</text:p>
          </table:table-cell>
          <table:table-cell table:style-name="Таблица22.A1" office:value-type="string">
            <text:p text:style-name="P147">Упорядоченн<text:span text:style-name="T84">ый вывод</text:span></text:p>
          </table:table-cell>
          <table:table-cell table:style-name="Таблица22.E1" office:value-type="string">
            <text:p text:style-name="P147">Комментарий</text:p>
          </table:table-cell>
        </table:table-row>
        <table:table-row>
          <table:table-cell table:style-name="Таблица22.A2" office:value-type="string">
            <text:p text:style-name="P150">Отсортированный массив</text:p>
          </table:table-cell>
          <table:table-cell table:style-name="Таблица22.A2" office:value-type="string">
            <text:p text:style-name="P147">O(log n)</text:p>
          </table:table-cell>
          <table:table-cell table:style-name="Таблица22.A2" office:value-type="string">
            <text:p text:style-name="P147">O(n)</text:p>
          </table:table-cell>
          <table:table-cell table:style-name="Таблица22.A2" office:value-type="string">
            <text:p text:style-name="P151">O(n)</text:p>
          </table:table-cell>
          <table:table-cell table:style-name="Таблица22.E2" office:value-type="string">
            <text:p text:style-name="P155">Требуется поддержка в отсортированном виде <text:span text:style-name="T84">для обеспечения </text:span><text:span text:style-name="T85">бинарного поиска, </text:span>вставка/удаление потребуют сдвига элементов.</text:p>
          </table:table-cell>
        </table:table-row>
        <table:table-row>
          <table:table-cell table:style-name="Таблица22.A2" office:value-type="string">
            <text:p text:style-name="P150">Хэш-таблица</text:p>
          </table:table-cell>
          <table:table-cell table:style-name="Таблица22.A2" office:value-type="string">
            <text:p text:style-name="P147">O(1)/<text:span text:style-name="T84">O(n)</text:span></text:p>
          </table:table-cell>
          <table:table-cell table:style-name="Таблица22.A2" office:value-type="string">
            <text:p text:style-name="P148">O(1)/<text:span text:style-name="T84">O(n)</text:span></text:p>
          </table:table-cell>
          <table:table-cell table:style-name="Таблица22.A2" office:value-type="string">
            <text:p text:style-name="P151">O(n log n)</text:p>
          </table:table-cell>
          <table:table-cell table:style-name="Таблица22.E2" office:value-type="string">
            <text:p text:style-name="P153">Для вывода меню в лексикографическом порядке потребуется сортировка.</text:p>
          </table:table-cell>
        </table:table-row>
        <table:table-row>
          <table:table-cell table:style-name="Таблица22.A2" office:value-type="string">
            <text:p text:style-name="P150">Бинарное дерево</text:p>
          </table:table-cell>
          <table:table-cell table:style-name="Таблица22.A2" office:value-type="string">
            <text:p text:style-name="P148">O(log n)/<text:span text:style-name="T84">O(n)</text:span></text:p>
          </table:table-cell>
          <table:table-cell table:style-name="Таблица22.A2" office:value-type="string">
            <text:p text:style-name="P148">O(log n)/<text:span text:style-name="T84">O(n)</text:span></text:p>
          </table:table-cell>
          <table:table-cell table:style-name="Таблица22.A2" office:value-type="string">
            <text:p text:style-name="P151">O(n)</text:p>
          </table:table-cell>
          <table:table-cell table:style-name="Таблица22.E2" office:value-type="string">
            <text:p text:style-name="P154">Высокий риск низкой скорости из-за несбалансированности дерева <text:span text:style-name="T86">по высоте.</text:span></text:p>
          </table:table-cell>
        </table:table-row>
        <text:soft-page-break/>
        <table:table-row>
          <table:table-cell table:style-name="Таблица22.A2" office:value-type="string">
            <text:p text:style-name="P150">АВЛ-дерево</text:p>
          </table:table-cell>
          <table:table-cell table:style-name="Таблица22.A2" office:value-type="string">
            <text:p text:style-name="P149">O(log n)</text:p>
          </table:table-cell>
          <table:table-cell table:style-name="Таблица22.A2" office:value-type="string">
            <text:p text:style-name="P149">O(log n)</text:p>
          </table:table-cell>
          <table:table-cell table:style-name="Таблица22.A2" office:value-type="string">
            <text:p text:style-name="P152">O(n)</text:p>
          </table:table-cell>
          <table:table-cell table:style-name="Таблица22.E2" office:value-type="string">
            <text:p text:style-name="P154">При частых запросах на обновление элементов тратится время на перебалансировку.</text:p>
          </table:table-cell>
        </table:table-row>
        <table:table-row>
          <table:table-cell table:style-name="Таблица22.A2" office:value-type="string">
            <text:p text:style-name="P150">Красно-чёрное дерево</text:p>
          </table:table-cell>
          <table:table-cell table:style-name="Таблица22.A2" office:value-type="string">
            <text:p text:style-name="P149">O(log n)</text:p>
          </table:table-cell>
          <table:table-cell table:style-name="Таблица22.A2" office:value-type="string">
            <text:p text:style-name="P149">O(log n)</text:p>
          </table:table-cell>
          <table:table-cell table:style-name="Таблица22.A2" office:value-type="string">
            <text:p text:style-name="P152">O(n)</text:p>
          </table:table-cell>
          <table:table-cell table:style-name="Таблица22.E2" office:value-type="string">
            <text:p text:style-name="P154">При частых запросах на вывод всех элементов тратится больше времени из-за нестрогой сбалансированности по высоте.</text:p>
          </table:table-cell>
        </table:table-row>
      </table:table>
      <text:p text:style-name="P121"><text:span text:style-name="T24"/></text:p>
      <text:p text:style-name="P123"><text:span text:style-name="T24"><text:tab/></text:span><text:span text:style-name="T28">В соответствие с проведенным анализом, в качестве </text:span><text:span text:style-name="T29">основной структуры данных выбрано АВЛ-дерево, так как оно полностью удовлетворяет условиям задачи: обеспечивает быстрый вывод позиций меню в лексикографическом порядке, поиск позиции и вставку/удаление элементов. Время, затрачиваемое на перебалансировку не является критичным, так как операции вывода и поиска производятся чаще, чем операции обновления ассортимента.</text:span></text:p>
      <text:p text:style-name="P123"><text:span text:style-name="T29"/></text:p>
      <text:p text:style-name="P113"><text:span text:style-name="T24">2. РЕАЛИЗА</text:span><text:span text:style-name="T30">ЦИЯ СТРУКТУР И АЛГОРИТМОВ</text:span></text:p>
      <text:p text:style-name="P130"><text:span text:style-name="T30"/></text:p>
      <text:p text:style-name="P127"><text:span text:style-name="T30"><text:tab/>С</text:span><text:span text:style-name="T24">труктура </text:span><text:span text:style-name="T12">Node</text:span><text:span text:style-name="T24"> предназначена для хранения содержимого узла АВЛ-дерева.</text:span></text:p>
      <text:p text:style-name="P127"><text:span text:style-name="T24">Поля:</text:span></text:p>
      <text:list text:style-name="L8">
        <text:list-item>
          <text:p text:style-name="P128"><text:span text:style-name="T12">std::string name</text:span><text:span text:style-name="T24"> — название блюда;</text:span></text:p>
        </text:list-item>
        <text:list-item>
          <text:p text:style-name="P128"><text:span text:style-name="T12">int cost</text:span><text:span text:style-name="T24"> — цена блюда;</text:span></text:p>
        </text:list-item>
        <text:list-item>
          <text:p text:style-name="P128"><text:span text:style-name="T12">int height </text:span><text:span text:style-name="T24">— высота узла;</text:span></text:p>
        </text:list-item>
        <text:list-item>
          <text:p text:style-name="P128"><text:span text:style-name="T12">Node* left</text:span><text:span text:style-name="T24"> — левый ребенок;</text:span></text:p>
        </text:list-item>
        <text:list-item>
          <text:p text:style-name="P128"><text:span text:style-name="T12">Node* right</text:span><text:span text:style-name="T24"> — правый ребенок.</text:span></text:p>
        </text:list-item>
      </text:list>
      <text:p text:style-name="P127"><text:span text:style-name="T24">Метод</text:span><text:span text:style-name="T31">ы</text:span><text:span text:style-name="T24">:</text:span></text:p>
      <text:list text:style-name="L9">
        <text:list-item>
          <text:p text:style-name="P129"><text:span text:style-name="T12">Node(std::string name, int cost)</text:span><text:span text:style-name="T24"> — </text:span><text:span text:style-name="T31">конструктор с параметрами, используется для создания узла с определенным названием и ценой.</text:span></text:p>
        </text:list-item>
      </text:list>
      <text:p text:style-name="P127"><text:span text:style-name="T31"/></text:p>
      <text:p text:style-name="P131"><text:span text:style-name="T31"><text:tab/>Класс</text:span><text:span text:style-name="T13"> AvlTree</text:span><text:span text:style-name="T31"> представляет реализацию всего функционала АВЛ-дерева.</text:span></text:p>
      <text:p text:style-name="P132"><text:span text:style-name="T24">Поля:</text:span></text:p>
      <text:list text:style-name="L10">
        <text:list-item>
          <text:p text:style-name="P133"><text:span text:style-name="T12">Node* rootNode</text:span><text:span text:style-name="T24"> — указатель на корень дерева;</text:span></text:p>
        </text:list-item>
        <text:list-item>
          <text:p text:style-name="P133"><text:span text:style-name="T12">int resultCost</text:span><text:span text:style-name="T24"> — поле, которое используется для подсчета итоговой стоимости товаров в корзине.</text:span></text:p>
        </text:list-item>
      </text:list>
      <text:p text:style-name="P132"><text:span text:style-name="T24">Методы:</text:span></text:p>
      <text:list text:style-name="L11">
        <text:list-item>
          <text:p text:style-name="P134"><text:span text:style-name="T12">Node* balance(Node* root)</text:span><text:span text:style-name="T24"> — метод балансировки дерева. Если абсолютное значение баланс-фактора узла больше единицы, то выполняются соответствующие повороты, чтобы обеспечить сбалансированную высоту дерева.</text:span></text:p>
          <text:p text:style-name="P134"><text:span text:style-name="T24">Принимаемый аргумент:</text:span></text:p>
          <text:list>
            <text:list-header>
              <text:p text:style-name="P134"><text:span text:style-name="T12">Node* root</text:span><text:span text:style-name="T24"> — </text:span><text:span text:style-name="T32">указатель на </text:span><text:span text:style-name="T24">узел, относительно которого должна происходить балансировка.</text:span></text:p>
            </text:list-header>
          </text:list>
          <text:p text:style-name="P134"><text:span text:style-name="T24">Возвращаемое значение:</text:span></text:p>
          <text:list text:continue-numbering="true">
            <text:list-header>
              <text:p text:style-name="P135"><text:soft-page-break/><text:span text:style-name="T12">Node* </text:span><text:span text:style-name="T14">node</text:span><text:span text:style-name="T32"> — указатель на узел сбалансированного поддерева.</text:span></text:p>
            </text:list-header>
          </text:list>
        </text:list-item>
        <text:list-item>
          <text:p text:style-name="P134"><text:span text:style-name="T12">int getBF(Node* root)</text:span><text:span text:style-name="T24"> - <text:s/>метод вычисления баланс-фактора узла. Вычисляет разницу высот правого и левого поддеревьев для определения необходимости балансировки.</text:span></text:p>
          <text:p text:style-name="P134"><text:span text:style-name="T24">Принимаемый аргумент:</text:span></text:p>
          <text:list>
            <text:list-header>
              <text:p text:style-name="P134"><text:span text:style-name="T12">Node* root</text:span><text:span text:style-name="T24"> — указатель на узел, для которого вычисляется баланс-фактор.</text:span></text:p>
            </text:list-header>
          </text:list>
          <text:p text:style-name="P134"><text:span text:style-name="T24">Возвращаемое значение:</text:span></text:p>
          <text:list text:continue-numbering="true">
            <text:list-header>
              <text:p text:style-name="P134"><text:span text:style-name="T12">int balanceFactor</text:span><text:span text:style-name="T24"> — целочисленное значение баланс-фактора.</text:span></text:p>
            </text:list-header>
          </text:list>
        </text:list-item>
        <text:list-item>
          <text:p text:style-name="P134"><text:span text:style-name="T12">void update(Node* root)</text:span><text:span text:style-name="T24"> — метод обновления высоты узла. Пересчитывает высоту узла на основе высот его дочерних поддеревьев.</text:span></text:p>
          <text:p text:style-name="P134"><text:span text:style-name="T24">Принимаемый аргумент:</text:span></text:p>
          <text:list>
            <text:list-header>
              <text:p text:style-name="P134"><text:span text:style-name="T12">Node* root</text:span><text:span text:style-name="T24"> — указатель на узел, высоту которого необходимо обновить.</text:span></text:p>
            </text:list-header>
          </text:list>
        </text:list-item>
        <text:list-item>
          <text:p text:style-name="P134"><text:span text:style-name="T12">Node* rotateLeft(Node* root)</text:span><text:span text:style-name="T24"> <text:s/>— метод левого поворота вокруг указанного узла. Используется для балансировки дерева при перевесе правого поддерева.</text:span></text:p>
          <text:p text:style-name="P134"><text:span text:style-name="T24">Принимаемый аргумент:</text:span></text:p>
          <text:list>
            <text:list-header>
              <text:p text:style-name="P134"><text:span text:style-name="T12">Node* root</text:span><text:span text:style-name="T24"> — указатель на узел, вокруг которого выполняется поворот.</text:span></text:p>
            </text:list-header>
          </text:list>
          <text:p text:style-name="P134"><text:span text:style-name="T24">Возвращаемое значение:</text:span></text:p>
          <text:list text:continue-numbering="true">
            <text:list-header>
              <text:p text:style-name="P134"><text:span text:style-name="T12">Node* node</text:span><text:span text:style-name="T24"> — указатель на новый корень поддерева после поворота.</text:span></text:p>
            </text:list-header>
          </text:list>
        </text:list-item>
        <text:list-item>
          <text:p text:style-name="P134"><text:span text:style-name="T12">Node* rotateRight(Node* root)</text:span><text:span text:style-name="T24"> — метод правого поворота вокруг указанного узла. Используется для балансировки дерева при перевесе левого поддерева.</text:span></text:p>
          <text:p text:style-name="P134"><text:span text:style-name="T24">Принимаемый аргумент:</text:span></text:p>
          <text:list>
            <text:list-header>
              <text:p text:style-name="P134"><text:span text:style-name="T12">Node* root</text:span><text:span text:style-name="T24"> — указатель на узел, вокруг которого выполняется поворот.</text:span></text:p>
            </text:list-header>
          </text:list>
          <text:p text:style-name="P134"><text:span text:style-name="T24">Возвращаемое значение:</text:span></text:p>
          <text:list text:continue-numbering="true">
            <text:list-header>
              <text:p text:style-name="P134"><text:soft-page-break/><text:span text:style-name="T12">Node* node</text:span><text:span text:style-name="T24"> — указатель на новый корень поддерева после поворота.</text:span></text:p>
            </text:list-header>
          </text:list>
        </text:list-item>
        <text:list-item>
          <text:p text:style-name="P134"><text:span text:style-name="T12">Node* minimum(Node* root)</text:span><text:span text:style-name="T24"> — метод поиска узла с минимальным ключом в поддереве. Находит блюдо с наименьшим названием в лексикографическом порядке.</text:span></text:p>
          <text:p text:style-name="P134"><text:span text:style-name="T24">Принимаемый аргумент:</text:span></text:p>
          <text:list>
            <text:list-header>
              <text:p text:style-name="P134"><text:span text:style-name="T12">Node* root</text:span><text:span text:style-name="T24"> — указатель на корень поддерева для поиска.</text:span></text:p>
            </text:list-header>
          </text:list>
          <text:p text:style-name="P134"><text:span text:style-name="T24">Возвращаемое значение:</text:span></text:p>
          <text:list text:continue-numbering="true">
            <text:list-header>
              <text:p text:style-name="P134"><text:span text:style-name="T12">Node* node</text:span><text:span text:style-name="T24"> — указатель на узел с минимальным ключом.</text:span></text:p>
            </text:list-header>
          </text:list>
        </text:list-item>
        <text:list-item>
          <text:p text:style-name="P134"><text:span text:style-name="T12">Node* deleteNode(Node* root, std::string key)</text:span><text:span text:style-name="T24"> — метод рекурсивного удаления узла из поддерева. Удаляет узел с указанным ключом, затем балансирует поддерево.</text:span></text:p>
          <text:p text:style-name="P134"><text:span text:style-name="T24">Принимаемые аргументы:</text:span></text:p>
          <text:list>
            <text:list-header>
              <text:p text:style-name="P134"><text:span text:style-name="T12">Node* root</text:span><text:span text:style-name="T24"> — указатель на корень поддерева для удаления.</text:span></text:p>
              <text:p text:style-name="P134"><text:span text:style-name="T12">std::string key</text:span><text:span text:style-name="T24"> — название блюда для удаления.</text:span></text:p>
            </text:list-header>
          </text:list>
          <text:p text:style-name="P134"><text:span text:style-name="T24">Возвращаемое значение:</text:span></text:p>
          <text:list text:continue-numbering="true">
            <text:list-header>
              <text:p text:style-name="P134"><text:span text:style-name="T12">Node* node</text:span><text:span text:style-name="T24"> — указатель на корень сбалансированного поддерева после удаления.</text:span></text:p>
            </text:list-header>
          </text:list>
        </text:list-item>
        <text:list-item>
          <text:p text:style-name="P135"><text:span text:style-name="T12">Node* insertNode(Node* root, std::string name, int cost)</text:span><text:span text:style-name="T24"> — метод рекурсивной вставки узла в поддерево. Добавляет новый узел или обновляет стоимость существующего блюда, затем балансирует поддерево.</text:span></text:p>
          <text:p text:style-name="P135"><text:span text:style-name="T24">Принимаемые аргументы:</text:span></text:p>
          <text:list>
            <text:list-header>
              <text:p text:style-name="P135"><text:span text:style-name="T12">Node* root</text:span><text:span text:style-name="T24"> — указатель на корень поддерева для вставки.</text:span></text:p>
              <text:p text:style-name="P135"><text:span text:style-name="T12">std::string name</text:span><text:span text:style-name="T24"> — название блюда (ключ).</text:span></text:p>
              <text:p text:style-name="P135"><text:span text:style-name="T12">int cost</text:span><text:span text:style-name="T24"> — цена блюда.</text:span></text:p>
            </text:list-header>
          </text:list>
          <text:p text:style-name="P135"><text:span text:style-name="T24">Возвращаемое значение:</text:span></text:p>
          <text:list text:continue-numbering="true">
            <text:list-header>
              <text:p text:style-name="P135"><text:soft-page-break/><text:span text:style-name="T12">Node* node</text:span><text:span text:style-name="T24"> — указатель на корень сбалансированного поддерева после вставки.</text:span></text:p>
            </text:list-header>
          </text:list>
        </text:list-item>
        <text:list-item>
          <text:p text:style-name="P134"><text:span text:style-name="T12">Node* search(Node* root, std::string name)</text:span><text:span text:style-name="T24"> — метод рекурсивного поиска узла по ключу. Находит узел с указанным названием блюда в поддереве.</text:span></text:p>
          <text:p text:style-name="P134"><text:span text:style-name="T24">Принимаемые аргументы:</text:span></text:p>
          <text:list>
            <text:list-header>
              <text:p text:style-name="P134"><text:span text:style-name="T12">Node* root</text:span><text:span text:style-name="T24"> — указатель на корень поддерева для поиска.</text:span></text:p>
              <text:p text:style-name="P134"><text:span text:style-name="T12">std::string name</text:span><text:span text:style-name="T24"> — название блюда для поиска.</text:span></text:p>
            </text:list-header>
          </text:list>
          <text:p text:style-name="P134"><text:span text:style-name="T24">Возвращаемое значение:</text:span></text:p>
          <text:list text:continue-numbering="true">
            <text:list-header>
              <text:p text:style-name="P134"><text:span text:style-name="T12">Node* node</text:span><text:span text:style-name="T24"> — указатель на найденный узел или </text:span><text:span text:style-name="T12">nullptr</text:span><text:span text:style-name="T24">, если узел не найден.</text:span></text:p>
            </text:list-header>
          </text:list>
        </text:list-item>
        <text:list-item>
          <text:p text:style-name="P136"><text:span text:style-name="T12">void inOrderTraversal(Node* node)</text:span><text:span text:style-name="T24"> — метод </text:span><text:span text:style-name="T33">центрированного</text:span><text:span text:style-name="T24"> обхода поддерева. Выводит все блюда в лексикографическом порядке и вычисляет суммарную стоимость </text:span><text:span text:style-name="T33">для корзины</text:span><text:span text:style-name="T24">.</text:span></text:p>
          <text:p text:style-name="P136"><text:span text:style-name="T24">Принимаемый аргумент:</text:span></text:p>
          <text:list>
            <text:list-header>
              <text:p text:style-name="P136"><text:span text:style-name="T12">Node* node</text:span><text:span text:style-name="T24"> — указатель на корень поддерева для обхода.</text:span></text:p>
            </text:list-header>
          </text:list>
        </text:list-item>
        <text:list-item>
          <text:p text:style-name="P134"><text:span text:style-name="T12">void destroyTree(Node* node)</text:span><text:span text:style-name="T24"> <text:s/>— метод рекурсивного удаления всех узлов дерева. Освобождает память, выделенную для узлов поддерева.</text:span></text:p>
          <text:p text:style-name="P134"><text:span text:style-name="T24">Принимаемый аргумент:</text:span></text:p>
          <text:list>
            <text:list-header>
              <text:p text:style-name="P134"><text:span text:style-name="T12">Node* node</text:span><text:span text:style-name="T24"> — указатель на корень поддерева для удаления.</text:span></text:p>
            </text:list-header>
          </text:list>
        </text:list-item>
        <text:list-item>
          <text:p text:style-name="P86"><text:s/><text:span text:style-name="T82">AvlTree()</text:span> <text:span text:style-name="T76">—</text:span> <text:span text:style-name="T87">конструктор по умолчанию, инициализирует указатель на корень дерева как </text:span><text:span text:style-name="T83">nullptr</text:span><text:span text:style-name="T87">, итоговую сумму блюд в корзине как 0.</text:span></text:p>
        </text:list-item>
        <text:list-item>
          <text:p text:style-name="P87"><text:s/><text:span text:style-name="T82">void insert(std::string name, int cost)</text:span> — публичный метод вставки блюда в дерево. Обеспечивает добавление нового блюда или обновление цены существующего.</text:p>
          <text:p text:style-name="P87">Принимаемые аргументы:</text:p>
          <text:list>
            <text:list-header>
              <text:p text:style-name="P87"><text:span text:style-name="T82">std::string name</text:span> — название блюда.</text:p>
              <text:p text:style-name="P87"><text:span text:style-name="T82">int cost </text:span>— цена блюда.</text:p>
            </text:list-header>
          </text:list>
        </text:list-item>
        <text:list-item>
          <text:p text:style-name="P87"><text:soft-page-break/><text:s/><text:span text:style-name="T82">void remove(std::string name)</text:span> — публичный метод удаления блюда из дерева. Удаляет блюдо с указанным названием, если оно существует.</text:p>
          <text:p text:style-name="P87">Принимаемый аргумент:</text:p>
          <text:list>
            <text:list-header>
              <text:p text:style-name="P87">std::string name — название <text:span text:style-name="T87">удаляемого</text:span> блюда.</text:p>
            </text:list-header>
          </text:list>
        </text:list-item>
        <text:list-item>
          <text:p text:style-name="P87"><text:s/><text:span text:style-name="T82">void show(std::string item)</text:span> — публичный метод вывода содержимого дерева. Выводит все блюда в <text:span text:style-name="T87">лексикографическом</text:span> порядке с ценами, при выводе корзины также показывает итоговую стоимость.</text:p>
          <text:p text:style-name="P87">Принимаемый аргумент:</text:p>
          <text:list>
            <text:list-header>
              <text:p text:style-name="P87"><text:span text:style-name="T82">std::string item</text:span> — контекст вывода ("<text:span text:style-name="T82">menu</text:span>" для меню, "<text:span text:style-name="T82">cart</text:span>" для корзины).</text:p>
            </text:list-header>
          </text:list>
        </text:list-item>
        <text:list-item>
          <text:p text:style-name="P87"><text:span text:style-name="T82"><text:s/>int searchByName(std::string name)</text:span> <text:s/>— публичный метод поиска цены блюда по названию. Возвращает цену блюда или -1, если блюдо не найдено.</text:p>
          <text:p text:style-name="P87">Принимаемый аргумент:</text:p>
          <text:list>
            <text:list-header>
              <text:p text:style-name="P87"><text:span text:style-name="T82">std::string name</text:span> — название <text:span text:style-name="T87">искомого </text:span>блюда.</text:p>
            </text:list-header>
          </text:list>
          <text:p text:style-name="P87">Возвращаемое значение:</text:p>
          <text:list text:continue-numbering="true">
            <text:list-header>
              <text:p text:style-name="P87"><text:span text:style-name="T82">int cost </text:span>— цена найденного блюда или -1 при ошибке.</text:p>
            </text:list-header>
          </text:list>
        </text:list-item>
        <text:list-item>
          <text:p text:style-name="P87"><text:s/><text:span text:style-name="T82">~AvlTree()</text:span> - <text:span text:style-name="T87">деструктор, удаляет все дерево и освобождает выделенную память.</text:span></text:p>
        </text:list-item>
      </text:list>
      <text:p text:style-name="P126"><text:span text:style-name="T30"><text:tab/></text:span></text:p>
      <text:p text:style-name="P126"><text:span text:style-name="T30"><text:tab/></text:span><text:span text:style-name="T34">Класс </text:span><text:span text:style-name="T15">Menu</text:span><text:span text:style-name="T34"> реализует взаимодействие пользователя с программой: обрабатывает ввод, позволяет производить операции с содержанием меню и корзины, определяет права доступа к определенным функциям в зависимости от типа текущего пользователя.</text:span></text:p>
      <text:p text:style-name="P137"><text:span text:style-name="T24">Поля:</text:span></text:p>
      <text:list text:style-name="L12">
        <text:list-item>
          <text:p text:style-name="P138"><text:span text:style-name="T12">User user</text:span><text:span text:style-name="T24"> — поле, определяющее тип пользователя;</text:span></text:p>
        </text:list-item>
        <text:list-item>
          <text:p text:style-name="P138"><text:span text:style-name="T12">AvlTree menu</text:span><text:span text:style-name="T24"> — объект меню;</text:span></text:p>
        </text:list-item>
        <text:list-item>
          <text:p text:style-name="P138"><text:soft-page-break/><text:span text:style-name="T12">AvlTree customer</text:span><text:span text:style-name="T24"> — объект корзины;</text:span></text:p>
        </text:list-item>
        <text:list-item>
          <text:p text:style-name="P138"><text:span text:style-name="T12">int KEY</text:span><text:span text:style-name="T24"> — пароль для авторизации администратора и получения доступа к командам модификации меню.</text:span></text:p>
        </text:list-item>
      </text:list>
      <text:p text:style-name="P137"><text:span text:style-name="T24">Методы:</text:span></text:p>
      <text:list text:style-name="L13">
        <text:list-item>
          <text:p text:style-name="P139"><text:span text:style-name="T12">void help()</text:span><text:span text:style-name="T24"> — </text:span><text:span text:style-name="T35">метод вывода справки, содержащей доступные команды для определенного типа пользователя.</text:span></text:p>
        </text:list-item>
        <text:list-item>
          <text:p text:style-name="P139"><text:span text:style-name="T12">void checkRights()</text:span><text:span text:style-name="T24"> - </text:span><text:span text:style-name="T35">метод проверки прав пользователя. Изначально пользователь определен как клиент, чтобы поменять тип на администратора, нужно ввести пароль. Команды клиента и администратора различаются: клиент может только управлять корзиной, администратор — только редактировать меню.</text:span></text:p>
        </text:list-item>
        <text:list-item>
          <text:p text:style-name="P139"><text:span text:style-name="T12">int stringToInt(std::string str)</text:span><text:span text:style-name="T24"> — </text:span><text:span text:style-name="T35">метод преобразования строки в целое число.</text:span></text:p>
          <text:p text:style-name="P142"><text:span text:style-name="T24">Принимаемый аргумент:</text:span></text:p>
          <text:list>
            <text:list-header>
              <text:p text:style-name="P142"><text:span text:style-name="T12">std::string str</text:span><text:span text:style-name="T24"> — строка, которую нужно преобразовать.</text:span></text:p>
            </text:list-header>
          </text:list>
          <text:p text:style-name="P142"><text:span text:style-name="T24">Возвращаемое значение:</text:span></text:p>
          <text:list text:continue-numbering="true">
            <text:list-header>
              <text:p text:style-name="P142"><text:span text:style-name="T12">int value</text:span><text:span text:style-name="T24"> — число, полученное из строки.</text:span></text:p>
            </text:list-header>
          </text:list>
        </text:list-item>
        <text:list-item>
          <text:p text:style-name="P140"><text:span text:style-name="T12">Menu()</text:span><text:span text:style-name="T24"> </text:span><text:span text:style-name="T35">— </text:span><text:span text:style-name="T24"><text:s/></text:span><text:span text:style-name="T35">конструктор по умолчанию, устанавливает пользователя как клиента, </text:span><text:span text:style-name="T36">создает объекты меню и корзины.</text:span></text:p>
        </text:list-item>
        <text:list-item>
          <text:p text:style-name="P140"><text:span text:style-name="T12">void start()</text:span><text:span text:style-name="T24"> </text:span><text:span text:style-name="T35">— </text:span><text:span text:style-name="T24"><text:s/></text:span><text:span text:style-name="T36">метод запуска программы. Обрабатывает ввод пользователя, вызывает соответствующие методы или выводит сообщения об ошибках.</text:span></text:p>
        </text:list-item>
      </text:list>
      <text:p text:style-name="P141"><text:span text:style-name="T36"/></text:p>
      <text:p text:style-name="P141"><text:span text:style-name="T36"><text:tab/>В функции </text:span><text:span text:style-name="T16">main()</text:span><text:span text:style-name="T36"> создается объект класса </text:span><text:span text:style-name="T16">Menu</text:span><text:span text:style-name="T36"> и запускается программа с помощью вызова у объекта соответствующего метода.</text:span></text:p>
      <text:p text:style-name="P93"><text:span text:style-name="T75"/></text:p>
      <text:p text:style-name="P94"><text:span text:style-name="T75">3. </text:span><text:span text:style-name="T74">ИССЛЕДОВАНИЕ</text:span></text:p>
      <text:p text:style-name="P95"/>
      <text:p text:style-name="P96"><text:tab/>Для оценки временной сложности операций АВЛ-дерева произведено исследование времени выполнения функций вставки и удаления элементов, поиска по названию и центрированного обхода дерева. Теоретическая сложность операций:</text:p>
      <text:list text:style-name="L14">
        <text:list-item>
          <text:p text:style-name="P97">Вставка элемента во всех случаях <text:span text:style-name="T90">оценивается как O(log n), так как в лучшем случае при вставке элемента в лист нужно пройти до него log n узлов, в среднем и худшем случае понадобятся перебалансировки на пути к корню.</text:span></text:p>
        </text:list-item>
        <text:list-item>
          <text:p text:style-name="P97">Удаление элемента также имеет сложность O(log n) во всех случаях, поскольку требует поиска удаляемого узла за O(log n), а в случае узла с двумя потомками — дополнительного поиска минимального элемента в правом поддереве за O(log n) с последующей балансировкой на пути к корню.</text:p>
        </text:list-item>
        <text:list-item>
          <text:p text:style-name="P99">Поиск элемента в лучшем случае выполняется за O(1) при условии, что он находится в корне дерева. В среднем и худшем случаях благодаря сбалансированности дерева операция оценивается в <text:span text:style-name="T89">O(log n).</text:span></text:p>
        </text:list-item>
        <text:list-item>
          <text:p text:style-name="P99">Центрированный обход дерева <text:span text:style-name="T91">всегда занимает O(n) времени, так как необходимо посетить каждый узел ровно один раз.</text:span></text:p>
        </text:list-item>
      </text:list>
      <text:p text:style-name="P100"><text:tab/></text:p>
      <text:p text:style-name="P101"><text:tab/>Выполнялся замер времени для деревьев, содержащих от 10 до 20000 <text:span text:style-name="T92">случайных элементов. </text:span><text:span text:style-name="T93">Результаты исследования отражены на графиках зависимости объема входных данных от времени выполнения операций (см. Рисунок 1 и Рисунок 2). Ожидаемые оценки временной сложности совпали с полученными на практике: операции вставки, удаления и поиска по графикам находятся ниже пунктирной теоретической прямой, операция центрированного </text:span><text:soft-page-break/><text:span text:style-name="T93">обхода колеблется в окрестности теоретической прямой.</text:span><text:span text:style-name="T92"><text:line-break/></text:span></text:p>
      <table:table table:name="Таблица4" table:style-name="Таблица4">
        <table:table-column table:style-name="Таблица4.A"/>
        <table:table-row>
          <table:table-cell table:style-name="Таблица4.A1" office:value-type="string">
            <text:p text:style-name="P157"><draw:frame draw:style-name="fr4" draw:name="Изображение11" text:anchor-type="char" svg:width="16.806cm" svg:height="12.605cm" draw:z-index="0"><draw:image xlink:href="Pictures/100000010000096000000708F8E45653.png" xlink:type="simple" xlink:show="embed" xlink:actuate="onLoad" draw:mime-type="image/png"/></draw:frame></text:p>
          </table:table-cell>
        </table:table-row>
        <table:table-row>
          <table:table-cell table:style-name="Таблица4.A1" office:value-type="string">
            <text:p text:style-name="P159">Рисунок 1 — График операций вставки, удаления и поиска элементов</text:p>
          </table:table-cell>
        </table:table-row>
      </table:table>
      <text:p text:style-name="P101"><text:soft-page-break/></text:p>
      <table:table table:name="Таблица5" table:style-name="Таблица5">
        <table:table-column table:style-name="Таблица5.A"/>
        <table:table-row>
          <table:table-cell table:style-name="Таблица5.A1" office:value-type="string">
            <text:p text:style-name="P158"><draw:frame draw:style-name="fr3" draw:name="Изображение12" text:anchor-type="char" svg:width="16.806cm" svg:height="12.605cm" draw:z-index="1"><draw:image xlink:href="Pictures/100000010000096000000708B550DF44.png" xlink:type="simple" xlink:show="embed" xlink:actuate="onLoad" draw:mime-type="image/png"/></draw:frame></text:p>
          </table:table-cell>
        </table:table-row>
        <table:table-row>
          <table:table-cell table:style-name="Таблица5.A1" office:value-type="string">
            <text:p text:style-name="P159">Рисунок 2 — График операции центрированного обхода</text:p>
          </table:table-cell>
        </table:table-row>
      </table:table>
      <text:p text:style-name="P98"/>
      <text:p text:style-name="P5">заключение</text:p>
      <text:p text:style-name="P6"/>
      <text:p text:style-name="P76"><text:span text:style-name="T68"><text:tab/></text:span><text:span text:style-name="T46">В ходе выполнения курсовой работы была разработана консольная </text:span><text:span text:style-name="T47">программа</text:span><text:span text:style-name="T46"> для системы онлайн-заказа еды в столовой «Мария» на основе АВЛ-дерева. Программа успешно реализует все поставленные задачи: управление меню блюд (добавление, удаление, изменение цены), поиск блюд по названию и вывод всего меню в лексикографическом порядке.</text:span></text:p>
      <text:p text:style-name="P76"><text:span text:style-name="T46"><text:tab/>Проведённый анализ альтернативных структур данных показал, что АВЛ-дерево является оптимальным выбором для данной задачи. Оно обеспечивает гарантированную логарифмическую сложность O(log n) для операций вставки, удаления и поиска, что соответствует профилю нагрузки системы, где операции чтения (поиск и вывод меню) выполняются значительно чаще операций обновления. Экспериментальные исследования подтвердили теоретические оценки сложности операций. </text:span></text:p>
      <text:p text:style-name="P76"><text:span text:style-name="T46"><text:tab/>Разработанная программа демонстрирует стабильную работу, корректную обработку пользовательского ввода, разграничение прав доступа между администратором и клиентом, а также эффективное использование памяти. Интерфейс программы интуитивно понятен и включает контекстную справку по командам.</text:span></text:p>
      <text:p text:style-name="P5">список использованных источников</text:p>
      <text:p text:style-name="P7"/>
      <text:list text:style-name="L15">
        <text:list-item>
          <text:p text:style-name="P79"><text:span text:style-name="Internet_20_link"><text:span text:style-name="T48">Ахо А., Хопкрофт Дж., Ульман Дж. Структуры данных и алгоритмы. — М.: Вильямс, 2001. — 384 с.</text:span></text:span></text:p>
        </text:list-item>
        <text:list-item>
          <text:p text:style-name="P79"><text:span text:style-name="Internet_20_link"><text:span text:style-name="T48">Седжвик Р. Фундаментальные алгоритмы на C++. — М.: Диасофт, 2002. — 688 с.</text:span></text:span></text:p>
        </text:list-item>
        <text:list-item>
          <text:p text:style-name="P79"><text:span text:style-name="Internet_20_link"><text:span text:style-name="T48">Липпман С., Лажойе Ж., Му Б. Язык программирования C++. — М.: Вильямс, 2014. — 1184 с.</text:span></text:span></text:p>
          <text:p text:style-name="P79"><text:span text:style-name="Internet_20_link"><text:span text:style-name="T49"/></text:span></text:p>
          <text:p text:style-name="P79"><text:span text:style-name="Internet_20_link"><text:span text:style-name="T48"/></text:span></text:p>
          <text:p text:style-name="P92"/>
        </text:list-item>
      </text:list>
      <text:p text:style-name="P5">приложение А</text:p>
      <text:p text:style-name="P9">Тестирование</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row>
          <table:table-cell table:style-name="Таблица6.A1" office:value-type="string">
            <text:p text:style-name="P161">№ теста</text:p>
          </table:table-cell>
          <table:table-cell table:style-name="Таблица6.A1" office:value-type="string">
            <text:p text:style-name="P161">Тест</text:p>
          </table:table-cell>
          <table:table-cell table:style-name="Таблица6.A1" office:value-type="string">
            <text:p text:style-name="P161">Входные данные</text:p>
          </table:table-cell>
          <table:table-cell table:style-name="Таблица6.A1" office:value-type="string">
            <text:p text:style-name="P161">Выходные данные</text:p>
          </table:table-cell>
          <table:table-cell table:style-name="Таблица6.E1" office:value-type="string">
            <text:p text:style-name="P161">Комментарий</text:p>
          </table:table-cell>
        </table:table-row>
        <table:table-row>
          <table:table-cell table:style-name="Таблица6.A2" office:value-type="string">
            <text:p text:style-name="P161">1</text:p>
          </table:table-cell>
          <table:table-cell table:style-name="Таблица6.A2" office:value-type="string">
            <text:p text:style-name="P156">Вставка одного элемента</text:p>
          </table:table-cell>
          <table:table-cell table:style-name="Таблица6.A2" office:value-type="string">
            <text:p text:style-name="P145">insert("Pizza", 350)</text:p>
          </table:table-cell>
          <table:table-cell table:style-name="Таблица6.A2" office:value-type="string">
            <text:p text:style-name="P161">Найден элемент Pizza = 350</text:p>
          </table:table-cell>
          <table:table-cell table:style-name="Таблица6.E2" office:value-type="string">
            <text:p text:style-name="P156">Базовая проверка вставки </text:p>
          </table:table-cell>
        </table:table-row>
        <table:table-row>
          <table:table-cell table:style-name="Таблица6.A2" office:value-type="string">
            <text:p text:style-name="P161">2</text:p>
          </table:table-cell>
          <table:table-cell table:style-name="Таблица6.A2" office:value-type="string">
            <text:p text:style-name="P156">Поиск несуществующего элемента</text:p>
          </table:table-cell>
          <table:table-cell table:style-name="Таблица6.A2" office:value-type="string">
            <text:p text:style-name="P145">searchByName("Burger") в пустом дереве</text:p>
          </table:table-cell>
          <table:table-cell table:style-name="Таблица6.A2" office:value-type="string">
            <text:p text:style-name="P145">-<text:span text:style-name="T96">1</text:span></text:p>
          </table:table-cell>
          <table:table-cell table:style-name="Таблица6.E2" office:value-type="string">
            <text:p text:style-name="P156">Корректная обработка отсутствующего элемента</text:p>
          </table:table-cell>
        </table:table-row>
        <table:table-row>
          <table:table-cell table:style-name="Таблица6.A2" office:value-type="string">
            <text:p text:style-name="P161">3</text:p>
          </table:table-cell>
          <table:table-cell table:style-name="Таблица6.A2" office:value-type="string">
            <text:p text:style-name="P156">LL балансировка</text:p>
          </table:table-cell>
          <table:table-cell table:style-name="Таблица6.A2" office:value-type="string">
            <text:p text:style-name="P145">insert("C", 300) → insert("B", 200) → insert("A", 100)</text:p>
          </table:table-cell>
          <table:table-cell table:style-name="Таблица6.A2" office:value-type="string">
            <text:p text:style-name="P145">Все элементы найдены: A=100, B=200, C=300</text:p>
          </table:table-cell>
          <table:table-cell table:style-name="Таблица6.E2" office:value-type="string">
            <text:p text:style-name="P156">Проверка правого вращения при лево-левом перевесе</text:p>
          </table:table-cell>
        </table:table-row>
        <table:table-row>
          <table:table-cell table:style-name="Таблица6.A2" office:value-type="string">
            <text:p text:style-name="P161">4</text:p>
          </table:table-cell>
          <table:table-cell table:style-name="Таблица6.A2" office:value-type="string">
            <text:p text:style-name="P156">RR балансировка</text:p>
          </table:table-cell>
          <table:table-cell table:style-name="Таблица6.A2" office:value-type="string">
            <text:p text:style-name="P145">insert("A", 100) → insert("B", 200) → insert("C", 300)</text:p>
          </table:table-cell>
          <table:table-cell table:style-name="Таблица6.A2" office:value-type="string">
            <text:p text:style-name="P146">Все элементы найдены: A=100, B=200, C=300</text:p>
          </table:table-cell>
          <table:table-cell table:style-name="Таблица6.E2" office:value-type="string">
            <text:p text:style-name="P156">Проверка левого вращения при право-правом перевесе</text:p>
          </table:table-cell>
        </table:table-row>
        <table:table-row>
          <table:table-cell table:style-name="Таблица6.A2" office:value-type="string">
            <text:p text:style-name="P161">5</text:p>
          </table:table-cell>
          <table:table-cell table:style-name="Таблица6.A2" office:value-type="string">
            <text:p text:style-name="P156">LR балансировка</text:p>
          </table:table-cell>
          <table:table-cell table:style-name="Таблица6.A2" office:value-type="string">
            <text:p text:style-name="P145">insert("C", 300) → insert("A", 100) → insert("B", 200)</text:p>
          </table:table-cell>
          <table:table-cell table:style-name="Таблица6.A2" office:value-type="string">
            <text:p text:style-name="P146">Все элементы найдены: A=100, B=200, C=300</text:p>
          </table:table-cell>
          <table:table-cell table:style-name="Таблица6.E2" office:value-type="string">
            <text:p text:style-name="P156">Проверка двойного вращения (влево, затем вправо)</text:p>
          </table:table-cell>
        </table:table-row>
        <table:table-row>
          <table:table-cell table:style-name="Таблица6.A2" office:value-type="string">
            <text:p text:style-name="P161">6</text:p>
          </table:table-cell>
          <table:table-cell table:style-name="Таблица6.A2" office:value-type="string">
            <text:p text:style-name="P156">RL балансировка</text:p>
          </table:table-cell>
          <table:table-cell table:style-name="Таблица6.A2" office:value-type="string">
            <text:p text:style-name="P145">insert("A", 100) → insert("C", 300) → insert("B", 200)</text:p>
          </table:table-cell>
          <table:table-cell table:style-name="Таблица6.A2" office:value-type="string">
            <text:p text:style-name="P146">Все элементы найдены: A=100, B=200, C=300</text:p>
          </table:table-cell>
          <table:table-cell table:style-name="Таблица6.E2" office:value-type="string">
            <text:p text:style-name="P156">Проверка двойного вращения (вправо, затем влево)</text:p>
          </table:table-cell>
        </table:table-row>
        <table:table-row>
          <table:table-cell table:style-name="Таблица6.A2" office:value-type="string">
            <text:p text:style-name="P161">7</text:p>
          </table:table-cell>
          <table:table-cell table:style-name="Таблица6.A2" office:value-type="string">
            <text:p text:style-name="P156">Удаление узла с двумя потомками</text:p>
          </table:table-cell>
          <table:table-cell table:style-name="Таблица6.A2" office:value-type="string">
            <text:p text:style-name="P145">insert("B",200) → insert("A",100) → insert("C",300) → remove("B")</text:p>
          </table:table-cell>
          <table:table-cell table:style-name="Таблица6.A2" office:value-type="string">
            <text:p text:style-name="P145">A=100, C=300 найдены; B=-1</text:p>
          </table:table-cell>
          <table:table-cell table:style-name="Таблица6.E2" office:value-type="string">
            <text:p text:style-name="P156">Проверка удаления с заменой на минимум правого поддерева</text:p>
          </table:table-cell>
        </table:table-row>
        <table:table-row>
          <table:table-cell table:style-name="Таблица6.A2" office:value-type="string">
            <text:p text:style-name="P161">8</text:p>
          </table:table-cell>
          <table:table-cell table:style-name="Таблица6.A2" office:value-type="string">
            <text:p text:style-name="P156">Удаление несуществующего элемента</text:p>
          </table:table-cell>
          <table:table-cell table:style-name="Таблица6.A2" office:value-type="string">
            <text:p text:style-name="P145">insert("Pizza",350) → remove("Burger")</text:p>
          </table:table-cell>
          <table:table-cell table:style-name="Таблица6.A2" office:value-type="string">
            <text:p text:style-name="P163">Удаляемый элемент не найден</text:p>
          </table:table-cell>
          <table:table-cell table:style-name="Таблица6.E2" office:value-type="string">
            <text:p text:style-name="P156">Корректная обработка удаления отсутствующего элемента</text:p>
          </table:table-cell>
        </table:table-row>
        <table:table-row>
          <table:table-cell table:style-name="Таблица6.A2" office:value-type="string">
            <text:p text:style-name="P161">9</text:p>
          </table:table-cell>
          <table:table-cell table:style-name="Таблица6.A2" office:value-type="string">
            <text:p text:style-name="P156">Обновление цены существующего блюда</text:p>
          </table:table-cell>
          <table:table-cell table:style-name="Таблица6.A2" office:value-type="string">
            <text:p text:style-name="P145">insert("Pizza",350) → insert("Pizza",400)</text:p>
          </table:table-cell>
          <table:table-cell table:style-name="Таблица6.A2" office:value-type="string">
            <text:p text:style-name="P162">Pizza = <text:span text:style-name="T97">400</text:span></text:p>
          </table:table-cell>
          <table:table-cell table:style-name="Таблица6.E2" office:value-type="string">
            <text:p text:style-name="P156">Повторный insert обновляет значение, узел не создаётся</text:p>
          </table:table-cell>
        </table:table-row>
        <table:table-row>
          <table:table-cell table:style-name="Таблица6.A2" office:value-type="string">
            <text:p text:style-name="P161">10</text:p>
          </table:table-cell>
          <table:table-cell table:style-name="Таблица6.A2" office:value-type="string">
            <text:p text:style-name="P156">Множественная вставка и поиск</text:p>
          </table:table-cell>
          <table:table-cell table:style-name="Таблица6.A2" office:value-type="string">
            <text:p text:style-name="P145">Вставка 5 блюд: Pizza, Burger, Salad, Pasta, Soup</text:p>
          </table:table-cell>
          <table:table-cell table:style-name="Таблица6.A2" office:value-type="string">
            <text:p text:style-name="P145">Все 5 блюд найдены с правильными ценами</text:p>
          </table:table-cell>
          <table:table-cell table:style-name="Таблица6.E2" office:value-type="string">
            <text:p text:style-name="P156">Проверка работы с множественными элементами</text:p>
          </table:table-cell>
        </table:table-row>
        <table:table-row>
          <table:table-cell table:style-name="Таблица6.A2" office:value-type="string">
            <text:p text:style-name="P161">11</text:p>
          </table:table-cell>
          <table:table-cell table:style-name="Таблица6.A2" office:value-type="string">
            <text:p text:style-name="P156">Последовательное добавление и удаление</text:p>
          </table:table-cell>
          <table:table-cell table:style-name="Таблица6.A2" office:value-type="string">
            <text:p text:style-name="P145">insert("Item0"-"Item4") → поиск → remove("Item0"-"Item4")</text:p>
          </table:table-cell>
          <table:table-cell table:style-name="Таблица6.A2" office:value-type="string">
            <text:p text:style-name="P145">Все элементы найдены при добавлении, все удалены после <text:soft-page-break/>remove</text:p>
          </table:table-cell>
          <table:table-cell table:style-name="Таблица6.E2" office:value-type="string">
            <text:p text:style-name="P156">Проверка полного цикла добавления-удаления</text:p>
          </table:table-cell>
        </table:table-row>
        <table:table-row>
          <table:table-cell table:style-name="Таблица6.A2" office:value-type="string">
            <text:p text:style-name="P161">12</text:p>
          </table:table-cell>
          <table:table-cell table:style-name="Таблица6.A2" office:value-type="string">
            <text:p text:style-name="P156">Пустая строка как ключ</text:p>
          </table:table-cell>
          <table:table-cell table:style-name="Таблица6.A2" office:value-type="string">
            <text:p text:style-name="P145">insert("",100) → searchByName("") → remove("")</text:p>
          </table:table-cell>
          <table:table-cell table:style-name="Таблица6.A2" office:value-type="string">
            <text:p text:style-name="P163">Вставка не произведена</text:p>
          </table:table-cell>
          <table:table-cell table:style-name="Таблица6.E2" office:value-type="string">
            <text:p text:style-name="P156">Проверка граничного случая с пустой строкой</text:p>
          </table:table-cell>
        </table:table-row>
      </table:table>
      <text:p text:style-name="P24"><text:span text:style-name="T55"/></text:p>
      <text:p text:style-name="P88"><draw:frame draw:style-name="fr1" draw:name="Изображение1" text:anchor-type="char" svg:width="10.253cm" svg:height="14.582cm" draw:z-index="2"><draw:image xlink:href="Pictures/10000001000001EF000002C028E869AD.png" xlink:type="simple" xlink:show="embed" xlink:actuate="onLoad" draw:mime-type="image/png"/></draw:frame></text:p>
      <text:p text:style-name="P53">ПРИЛОЖЕНИЕ Б</text:p>
      <text:p text:style-name="P65">КОД ПРОГРАММЫ</text:p>
      <text:p text:style-name="P65"/>
      <text:p text:style-name="P66"><text:tab/><text:span text:style-name="T74">Файл menu.hpp</text:span></text:p>
      <text:p text:style-name="P69">#ifndef MENU_H</text:p>
      <text:p text:style-name="P69">#define MENU_H</text:p>
      <text:p text:style-name="P69"/>
      <text:p text:style-name="P69">#include "avltree.hpp"</text:p>
      <text:p text:style-name="P69"/>
      <text:p text:style-name="P69">enum User{</text:p>
      <text:p text:style-name="P69"><text:s text:c="4"/>ADMIN,</text:p>
      <text:p text:style-name="P69"><text:s text:c="4"/>CUSTOMER</text:p>
      <text:p text:style-name="P69">};</text:p>
      <text:p text:style-name="P69"/>
      <text:p text:style-name="P69">class Menu{</text:p>
      <text:p text:style-name="P69"><text:s text:c="4"/>User user;</text:p>
      <text:p text:style-name="P69"><text:s text:c="4"/>AvlTree menu;</text:p>
      <text:p text:style-name="P69"><text:s text:c="4"/>AvlTree customer;</text:p>
      <text:p text:style-name="P69"><text:s text:c="4"/>int KEY = 1503;</text:p>
      <text:p text:style-name="P69"/>
      <text:p text:style-name="P69"><text:s text:c="4"/>void help();</text:p>
      <text:p text:style-name="P69"><text:s text:c="4"/>void checkRights();</text:p>
      <text:p text:style-name="P69"><text:s text:c="4"/>int stringToInt(std::string str);</text:p>
      <text:p text:style-name="P69"/>
      <text:p text:style-name="P69">public:</text:p>
      <text:p text:style-name="P69"><text:s text:c="4"/>Menu();</text:p>
      <text:p text:style-name="P69"><text:s text:c="4"/>void start();</text:p>
      <text:p text:style-name="P69">};</text:p>
      <text:p text:style-name="P69"/>
      <text:p text:style-name="P70">#endif<text:line-break/><text:line-break/><text:tab/><text:span text:style-name="T94">Файл menu.cpp</text:span></text:p>
      <text:p text:style-name="P69"/>
      <text:p text:style-name="P69">#include "menu.hpp"</text:p>
      <text:p text:style-name="P69"/>
      <text:p text:style-name="P69">Menu::Menu() : user(User::CUSTOMER), menu(AvlTree()), customer(AvlTree()) {}</text:p>
      <text:p text:style-name="P69"/>
      <text:p text:style-name="P69">void Menu::help(){</text:p>
      <text:p text:style-name="P69"><text:s text:c="4"/>switch (user){</text:p>
      <text:p text:style-name="P69"><text:s text:c="8"/>case ADMIN:</text:p>
      <text:p text:style-name="P69"><text:s text:c="12"/>std::cout &lt;&lt; "\nADMIN COMMAND SET\n";</text:p>
      <text:p text:style-name="P69"><text:s text:c="12"/>std::cout &lt;&lt; "del &lt;name&gt; -- delete dish from the menu.\n";</text:p>
      <text:p text:style-name="P69"><text:s text:c="12"/>std::cout &lt;&lt; "add &lt;name&gt; &lt;price&gt; -- add dish to the menu.\n";</text:p>
      <text:p text:style-name="P69"><text:s text:c="12"/>std::cout &lt;&lt; "add &lt;existing_name&gt; &lt;new_price&gt; -- if you want to change th price of the existing dish.\n";</text:p>
      <text:p text:style-name="P69"><text:s text:c="12"/>break;</text:p>
      <text:p text:style-name="P69"/>
      <text:p text:style-name="P69"><text:s text:c="8"/>case CUSTOMER:</text:p>
      <text:p text:style-name="P69"><text:soft-page-break/><text:s text:c="12"/>std::cout &lt;&lt; "\nCUSTOMER COMMAND SET\n";</text:p>
      <text:p text:style-name="P69"><text:s text:c="12"/>std::cout &lt;&lt; "select &lt;name&gt; -- add dish to cart.\n";</text:p>
      <text:p text:style-name="P69"><text:s text:c="12"/>std::cout &lt;&lt; "del &lt;name&gt; -- delete dish from the cart.\n";</text:p>
      <text:p text:style-name="P69"><text:s text:c="12"/>std::cout &lt;&lt; "cart -- show cart contents and total cost.\n";</text:p>
      <text:p text:style-name="P69"><text:s text:c="12"/>break;</text:p>
      <text:p text:style-name="P69"><text:s text:c="12"/></text:p>
      <text:p text:style-name="P69"><text:s text:c="8"/>default: break;</text:p>
      <text:p text:style-name="P69"><text:s text:c="4"/>}</text:p>
      <text:p text:style-name="P69"><text:s text:c="4"/>std::cout &lt;&lt; "menu -- show all available menu dishes.\n";</text:p>
      <text:p text:style-name="P69"><text:s text:c="4"/>std::cout &lt;&lt; "search &lt;name&gt; -- search price by dishname in the menu.\n";</text:p>
      <text:p text:style-name="P69"><text:s text:c="4"/>std::cout &lt;&lt; "help -- show command set.\n";</text:p>
      <text:p text:style-name="P69"><text:s text:c="4"/>std::cout &lt;&lt; "exit -- close program.\n";</text:p>
      <text:p text:style-name="P69"><text:s text:c="4"/>std::cout &lt;&lt; "admin -- if you are an admin, enter this command.\n\n";</text:p>
      <text:p text:style-name="P69">}</text:p>
      <text:p text:style-name="P69"/>
      <text:p text:style-name="P69">int Menu::stringToInt(std::string str){</text:p>
      <text:p text:style-name="P69"><text:s text:c="4"/>int res = 0;</text:p>
      <text:p text:style-name="P69"><text:s text:c="4"/>for (char symb : str){</text:p>
      <text:p text:style-name="P69"><text:s text:c="8"/>if (symb &gt; '9' || symb &lt; '0')</text:p>
      <text:p text:style-name="P69"><text:s text:c="12"/>return -1;</text:p>
      <text:p text:style-name="P69"><text:s text:c="8"/>res = res*10 + (symb - '0');</text:p>
      <text:p text:style-name="P69"><text:s text:c="4"/>}</text:p>
      <text:p text:style-name="P69"><text:s text:c="4"/>return res;</text:p>
      <text:p text:style-name="P69">}</text:p>
      <text:p text:style-name="P69"/>
      <text:p text:style-name="P69">void Menu::checkRights(){</text:p>
      <text:p text:style-name="P69"><text:s text:c="4"/>if (user != ADMIN){</text:p>
      <text:p text:style-name="P69"><text:s text:c="8"/>std::string code;</text:p>
      <text:p text:style-name="P69"><text:s text:c="8"/>std::cout &lt;&lt; "Password: ";</text:p>
      <text:p text:style-name="P69"><text:s text:c="8"/>if (std::getline(std::cin, code)){</text:p>
      <text:p text:style-name="P69"><text:s text:c="12"/>if (stringToInt(code) == KEY){</text:p>
      <text:p text:style-name="P69"><text:s text:c="16"/>std::cout &lt;&lt; "Success!\nIf you want to return to the customer mode, enter 'admin' again.\n";</text:p>
      <text:p text:style-name="P69"><text:s text:c="16"/>user = ADMIN; <text:s/></text:p>
      <text:p text:style-name="P69"><text:s text:c="12"/>} else std::cout &lt;&lt; "Wrong password, try again.\n";</text:p>
      <text:p text:style-name="P69"><text:s text:c="8"/>}</text:p>
      <text:p text:style-name="P69"><text:s text:c="4"/>} else {</text:p>
      <text:p text:style-name="P69"><text:s text:c="8"/>std::cout &lt;&lt; "Success! Change user to customer.\n";</text:p>
      <text:p text:style-name="P69"><text:s text:c="8"/>user = CUSTOMER; </text:p>
      <text:p text:style-name="P69"><text:s text:c="4"/>}</text:p>
      <text:p text:style-name="P69">}</text:p>
      <text:p text:style-name="P69"/>
      <text:p text:style-name="P69">void Menu::start(){</text:p>
      <text:p text:style-name="P69"><text:s text:c="4"/>std::string inputData;</text:p>
      <text:p text:style-name="P69"><text:s text:c="4"/>help();</text:p>
      <text:p text:style-name="P69"/>
      <text:p text:style-name="P69"><text:s text:c="4"/>while (std::getline(std::cin, inputData)){</text:p>
      <text:p text:style-name="P69"><text:s text:c="8"/>if (inputData.empty()) continue;</text:p>
      <text:p text:style-name="P69"/>
      <text:p text:style-name="P69"><text:s text:c="8"/>int firstSpace = (int)inputData.find(' ');</text:p>
      <text:p text:style-name="P69"/>
      <text:p text:style-name="P69"><text:s text:c="8"/>if (firstSpace == (int)std::string::npos){</text:p>
      <text:p text:style-name="P69"><text:soft-page-break/><text:s text:c="12"/>if (inputData == "menu") menu.show(inputData);</text:p>
      <text:p text:style-name="P69"><text:s text:c="12"/>else if (inputData == "exit") break;</text:p>
      <text:p text:style-name="P69"><text:s text:c="12"/>else if (inputData == "help") help();</text:p>
      <text:p text:style-name="P69"><text:s text:c="12"/>else if (inputData == "admin") checkRights();</text:p>
      <text:p text:style-name="P69"><text:s text:c="12"/>else if (inputData == "cart" &amp;&amp; user == CUSTOMER) customer.show(inputData);</text:p>
      <text:p text:style-name="P69"><text:s text:c="12"/>else std::cout &lt;&lt; "Unknown command. Print 'help' to get more information.\n";</text:p>
      <text:p text:style-name="P69"/>
      <text:p text:style-name="P69"><text:s text:c="8"/>} else {</text:p>
      <text:p text:style-name="P69"><text:s text:c="12"/>std::string command = inputData.substr(0, firstSpace);</text:p>
      <text:p text:style-name="P69"><text:s text:c="12"/>std::string args = inputData.substr(firstSpace + 1);</text:p>
      <text:p text:style-name="P69"/>
      <text:p text:style-name="P69"><text:s text:c="12"/>if (command == "search"){</text:p>
      <text:p text:style-name="P69"><text:s text:c="16"/>if (!args.empty()){</text:p>
      <text:p text:style-name="P69"><text:s text:c="20"/>int cost = menu.searchByName(args);</text:p>
      <text:p text:style-name="P69"><text:s text:c="20"/>if (cost != -1) std::cout &lt;&lt; "&gt; " &lt;&lt; args &lt;&lt; " costs " &lt;&lt; cost &lt;&lt; ".\n";</text:p>
      <text:p text:style-name="P69"><text:s text:c="16"/>} else std::cout &lt;&lt; "Search error: enter the dishname.\n";</text:p>
      <text:p text:style-name="P69"><text:s text:c="12"/></text:p>
      <text:p text:style-name="P69"><text:s text:c="12"/>} else if (command == "del"){</text:p>
      <text:p text:style-name="P69"><text:s text:c="16"/>if (!args.empty()){</text:p>
      <text:p text:style-name="P69"><text:s text:c="20"/>if (user == ADMIN) menu.remove(args);</text:p>
      <text:p text:style-name="P69"><text:s text:c="20"/>else if (user == CUSTOMER) customer.remove(args);</text:p>
      <text:p text:style-name="P69"><text:s text:c="20"/>else std::cout &lt;&lt; "User not defined.\n";</text:p>
      <text:p text:style-name="P69"/>
      <text:p text:style-name="P69"><text:s text:c="16"/>} else std::cout &lt;&lt; "Delete error: enter the dishname.\n";</text:p>
      <text:p text:style-name="P69"/>
      <text:p text:style-name="P69"><text:s text:c="12"/>} else if (command == "add" &amp;&amp; user == ADMIN){</text:p>
      <text:p text:style-name="P69"><text:s text:c="16"/>int lastSpace = args.find_last_of(' ');</text:p>
      <text:p text:style-name="P69"/>
      <text:p text:style-name="P69"><text:s text:c="16"/>if (lastSpace == (int)std::string::npos)</text:p>
      <text:p text:style-name="P69"><text:s text:c="20"/>std::cout &lt;&lt; "Add error: enter the dishname and price.\n";</text:p>
      <text:p text:style-name="P69"><text:s text:c="16"/>else {</text:p>
      <text:p text:style-name="P69"><text:s text:c="20"/>std::string dishName = args.substr(0, lastSpace);</text:p>
      <text:p text:style-name="P69"><text:s text:c="20"/>int cost = stringToInt(args.substr(lastSpace + 1));</text:p>
      <text:p text:style-name="P69"/>
      <text:p text:style-name="P69"><text:s text:c="20"/>if (dishName.empty()) </text:p>
      <text:p text:style-name="P69"><text:s text:c="24"/>std::cout &lt;&lt; "Add error: dishname can`t be skipped.\n";</text:p>
      <text:p text:style-name="P69"><text:s text:c="20"/>else if (cost == -1)</text:p>
      <text:p text:style-name="P69"><text:s text:c="24"/>std::cout &lt;&lt; "Add error: invalid cost.\n";</text:p>
      <text:p text:style-name="P69"><text:s text:c="20"/>else menu.insert(dishName, cost);</text:p>
      <text:p text:style-name="P69"><text:s text:c="16"/>}</text:p>
      <text:p text:style-name="P69"/>
      <text:p text:style-name="P69"><text:s text:c="12"/>} else if (command == "select" &amp;&amp; user == CUSTOMER){</text:p>
      <text:p text:style-name="P69"><text:s text:c="16"/>if (!args.empty()){</text:p>
      <text:p text:style-name="P69"><text:s text:c="20"/>int cost = menu.searchByName(args);</text:p>
      <text:p text:style-name="P69"><text:s text:c="20"/>if (cost != -1) customer.insert(args, cost);</text:p>
      <text:p text:style-name="P69"><text:soft-page-break/><text:s text:c="16"/>} else std::cout &lt;&lt; "Select error: enter the dishname.\n";</text:p>
      <text:p text:style-name="P69"/>
      <text:p text:style-name="P69"><text:s text:c="12"/>} else <text:s/>std::cout &lt;&lt; "Unknown command. Print 'help' to get more information.\n";</text:p>
      <text:p text:style-name="P69"><text:s text:c="8"/>}</text:p>
      <text:p text:style-name="P69"><text:s text:c="4"/>}</text:p>
      <text:p text:style-name="P69">}</text:p>
      <text:p text:style-name="P69"/>
      <text:p text:style-name="P70"><text:tab/><text:span text:style-name="T94">Файл avltree.hpp</text:span></text:p>
      <text:p text:style-name="P69"/>
      <text:p text:style-name="P69">#ifndef MENU_TREE_H</text:p>
      <text:p text:style-name="P69">#define MENU_TREE_H</text:p>
      <text:p text:style-name="P69"/>
      <text:p text:style-name="P69">#include &lt;string&gt;</text:p>
      <text:p text:style-name="P69">#include &lt;iostream&gt;</text:p>
      <text:p text:style-name="P69"/>
      <text:p text:style-name="P69">struct Node{</text:p>
      <text:p text:style-name="P69"><text:s text:c="4"/>std::string name;</text:p>
      <text:p text:style-name="P69"><text:s text:c="4"/>int cost;</text:p>
      <text:p text:style-name="P69"><text:s text:c="4"/>int height;</text:p>
      <text:p text:style-name="P69"><text:s text:c="4"/>Node* left;</text:p>
      <text:p text:style-name="P69"><text:s text:c="4"/>Node* right;</text:p>
      <text:p text:style-name="P69"/>
      <text:p text:style-name="P69"><text:s text:c="4"/>Node(std::string name, int cost) : </text:p>
      <text:p text:style-name="P69"><text:s text:c="8"/>name(name), cost(cost), height(1), left(nullptr), right(nullptr) {}</text:p>
      <text:p text:style-name="P69">};</text:p>
      <text:p text:style-name="P69"/>
      <text:p text:style-name="P69">class AvlTree{</text:p>
      <text:p text:style-name="P69"><text:s text:c="4"/>Node* rootNode;</text:p>
      <text:p text:style-name="P69"><text:s text:c="4"/>int resultCost;</text:p>
      <text:p text:style-name="P69"/>
      <text:p text:style-name="P69"><text:s text:c="4"/>Node* balance(Node* root);</text:p>
      <text:p text:style-name="P69"><text:s text:c="4"/>int getBF(Node* root);</text:p>
      <text:p text:style-name="P69"><text:s text:c="4"/>void update(Node* root);</text:p>
      <text:p text:style-name="P69"><text:s text:c="4"/>Node* rotateLeft(Node* root);</text:p>
      <text:p text:style-name="P69"><text:s text:c="4"/>Node* rotateRight(Node* root);</text:p>
      <text:p text:style-name="P69"><text:s text:c="4"/>Node* minimum(Node* root);</text:p>
      <text:p text:style-name="P69"><text:s text:c="4"/>Node* deleteNode(Node* root, std::string key);</text:p>
      <text:p text:style-name="P69"><text:s text:c="4"/>Node* insertNode(Node* root, std::string name, int cost);</text:p>
      <text:p text:style-name="P69"><text:s text:c="4"/>Node* search(Node* root, std::string name);</text:p>
      <text:p text:style-name="P69"><text:s text:c="4"/>void inOrderTraversal(Node* node);</text:p>
      <text:p text:style-name="P69"><text:s text:c="4"/>void destroyTree(Node* node);</text:p>
      <text:p text:style-name="P69"/>
      <text:p text:style-name="P69">public:</text:p>
      <text:p text:style-name="P69"><text:s text:c="4"/>AvlTree();</text:p>
      <text:p text:style-name="P69"><text:s text:c="4"/>void insert(std::string name, int cost);</text:p>
      <text:p text:style-name="P69"><text:s text:c="4"/>void remove(std::string name);</text:p>
      <text:p text:style-name="P69"><text:s text:c="4"/>void show(std::string item);</text:p>
      <text:p text:style-name="P69"><text:s text:c="4"/>int searchByName(std::string name);</text:p>
      <text:p text:style-name="P69"><text:s text:c="4"/>~AvlTree();</text:p>
      <text:p text:style-name="P69">};</text:p>
      <text:p text:style-name="P69"><text:soft-page-break/></text:p>
      <text:p text:style-name="P69">#endif</text:p>
      <text:p text:style-name="P69"/>
      <text:p text:style-name="P70"><text:tab/><text:span text:style-name="T94">Файл avltree.cpp</text:span></text:p>
      <text:p text:style-name="P69"/>
      <text:p text:style-name="P69">#include "avltree.hpp"</text:p>
      <text:p text:style-name="P69"/>
      <text:p text:style-name="P69">AvlTree::AvlTree():rootNode(nullptr), resultCost(0) {}</text:p>
      <text:p text:style-name="P69"/>
      <text:p text:style-name="P69">Node* AvlTree::balance(Node* root){</text:p>
      <text:p text:style-name="P69"><text:s text:c="4"/>if (!root)</text:p>
      <text:p text:style-name="P69"><text:s text:c="8"/>return root;</text:p>
      <text:p text:style-name="P69"><text:s text:c="4"/>update(root);</text:p>
      <text:p text:style-name="P69"><text:s text:c="4"/>int balanceFactor = getBF(root);</text:p>
      <text:p text:style-name="P69"/>
      <text:p text:style-name="P69"><text:s text:c="4"/>if (balanceFactor &lt; -1){</text:p>
      <text:p text:style-name="P69"><text:s text:c="8"/>if (getBF(root-&gt;left) &gt; 0)</text:p>
      <text:p text:style-name="P69"><text:s text:c="12"/>root-&gt;left = rotateLeft(root-&gt;left);</text:p>
      <text:p text:style-name="P69"><text:s text:c="8"/>return rotateRight(root);</text:p>
      <text:p text:style-name="P69"><text:s text:c="4"/>}</text:p>
      <text:p text:style-name="P69"><text:s text:c="4"/>else if (balanceFactor &gt; 1){</text:p>
      <text:p text:style-name="P69"><text:s text:c="8"/>if (getBF(root-&gt;right) &lt; 0)</text:p>
      <text:p text:style-name="P69"><text:s text:c="12"/>root-&gt;right = rotateRight(root-&gt;right);</text:p>
      <text:p text:style-name="P69"><text:s text:c="8"/>return rotateLeft(root);</text:p>
      <text:p text:style-name="P69"><text:s text:c="4"/>}</text:p>
      <text:p text:style-name="P69"/>
      <text:p text:style-name="P69"><text:s text:c="4"/>return root;</text:p>
      <text:p text:style-name="P69">}</text:p>
      <text:p text:style-name="P69"/>
      <text:p text:style-name="P69">int AvlTree::getBF(Node* root){</text:p>
      <text:p text:style-name="P69"><text:s text:c="4"/>if (!root) return 0;</text:p>
      <text:p text:style-name="P69"><text:s text:c="4"/>int leftHeight = root-&gt;left ? root-&gt;left-&gt;height : 0;</text:p>
      <text:p text:style-name="P69"><text:s text:c="4"/>int rightHeight = root-&gt;right ? root-&gt;right-&gt;height : 0;</text:p>
      <text:p text:style-name="P69"><text:s text:c="4"/>return rightHeight - leftHeight;</text:p>
      <text:p text:style-name="P69">}</text:p>
      <text:p text:style-name="P69"/>
      <text:p text:style-name="P69">void AvlTree::update(Node* root){</text:p>
      <text:p text:style-name="P69"><text:s text:c="4"/>if (!root) return;</text:p>
      <text:p text:style-name="P69"><text:s text:c="4"/>int lh = (root-&gt;left) ? root-&gt;left-&gt;height : 0;</text:p>
      <text:p text:style-name="P69"><text:s text:c="4"/>int rh = (root-&gt;right) ? root-&gt;right-&gt;height : 0;</text:p>
      <text:p text:style-name="P69"><text:s text:c="4"/>root-&gt;height = (lh &gt; rh) ? lh + 1 : rh + 1;</text:p>
      <text:p text:style-name="P69">}</text:p>
      <text:p text:style-name="P69"/>
      <text:p text:style-name="P69">Node* AvlTree::rotateLeft(Node* root){</text:p>
      <text:p text:style-name="P69"><text:s text:c="4"/>Node* rightChild = root-&gt;right;</text:p>
      <text:p text:style-name="P69"><text:s text:c="4"/></text:p>
      <text:p text:style-name="P69"><text:s text:c="4"/>root-&gt;right = rightChild-&gt;left;</text:p>
      <text:p text:style-name="P69"><text:s text:c="4"/>rightChild-&gt;left = root;</text:p>
      <text:p text:style-name="P69"/>
      <text:p text:style-name="P69"><text:s text:c="4"/>update(root);</text:p>
      <text:p text:style-name="P69"><text:s text:c="4"/>update(rightChild);</text:p>
      <text:p text:style-name="P69"><text:s text:c="4"/>return rightChild;</text:p>
      <text:p text:style-name="P69">}</text:p>
      <text:p text:style-name="P69"><text:soft-page-break/></text:p>
      <text:p text:style-name="P69">Node* AvlTree::rotateRight(Node* root){</text:p>
      <text:p text:style-name="P69"><text:s text:c="4"/>Node* leftChild = root-&gt;left;</text:p>
      <text:p text:style-name="P69"><text:s text:c="4"/></text:p>
      <text:p text:style-name="P69"><text:s text:c="4"/>root-&gt;left = leftChild-&gt;right;</text:p>
      <text:p text:style-name="P69"><text:s text:c="4"/>leftChild-&gt;right = root;</text:p>
      <text:p text:style-name="P69"/>
      <text:p text:style-name="P69"><text:s text:c="4"/>update(root);</text:p>
      <text:p text:style-name="P69"><text:s text:c="4"/>update(leftChild);</text:p>
      <text:p text:style-name="P69"><text:s text:c="4"/>return leftChild;</text:p>
      <text:p text:style-name="P69">}</text:p>
      <text:p text:style-name="P69"/>
      <text:p text:style-name="P69">Node* AvlTree::insertNode(Node* root, std::string name, int cost){</text:p>
      <text:p text:style-name="P69"><text:s text:c="4"/>if (root == nullptr){</text:p>
      <text:p text:style-name="P69"><text:s text:c="8"/>root = new Node(name, cost);</text:p>
      <text:p text:style-name="P69"><text:s text:c="8"/>return root;</text:p>
      <text:p text:style-name="P69"><text:s text:c="4"/>}</text:p>
      <text:p text:style-name="P69"><text:s text:c="4"/>if (name.compare(root-&gt;name) &lt; 0)</text:p>
      <text:p text:style-name="P69"><text:s text:c="8"/>root-&gt;left = insertNode(root-&gt;left, name, cost);</text:p>
      <text:p text:style-name="P69"><text:s text:c="4"/>else if (name.compare(root-&gt;name) &gt; 0)</text:p>
      <text:p text:style-name="P69"><text:s text:c="8"/>root-&gt;right = insertNode(root-&gt;right, name, cost);</text:p>
      <text:p text:style-name="P69"><text:s text:c="4"/>else root-&gt;cost = cost;</text:p>
      <text:p text:style-name="P69"/>
      <text:p text:style-name="P69"><text:s text:c="4"/>return balance(root);</text:p>
      <text:p text:style-name="P69">}</text:p>
      <text:p text:style-name="P69"/>
      <text:p text:style-name="P69">Node* AvlTree::deleteNode(Node* root, std::string key){</text:p>
      <text:p text:style-name="P69"><text:s text:c="4"/>if (!root) return root;</text:p>
      <text:p text:style-name="P69"><text:s text:c="4"/>if (key.compare(root-&gt;name) &lt; 0)</text:p>
      <text:p text:style-name="P69"><text:s text:c="8"/>root-&gt;left = deleteNode(root-&gt;left, key);</text:p>
      <text:p text:style-name="P69"><text:s text:c="4"/>else if (key.compare(root-&gt;name) &gt; 0)</text:p>
      <text:p text:style-name="P69"><text:s text:c="8"/>root-&gt;right = deleteNode(root-&gt;right, key);</text:p>
      <text:p text:style-name="P69"><text:s text:c="4"/>else if (root-&gt;left != nullptr &amp;&amp; root-&gt;right != nullptr){</text:p>
      <text:p text:style-name="P69"><text:s text:c="8"/>Node* minRight = minimum(root-&gt;right);</text:p>
      <text:p text:style-name="P69"><text:s text:c="8"/>root-&gt;name = minRight-&gt;name;</text:p>
      <text:p text:style-name="P69"><text:s text:c="8"/>root-&gt;cost = minRight-&gt;cost;</text:p>
      <text:p text:style-name="P69"><text:s text:c="8"/>root-&gt;right = deleteNode(root-&gt;right, root-&gt;name);</text:p>
      <text:p text:style-name="P69"><text:s text:c="4"/>} else {</text:p>
      <text:p text:style-name="P69"><text:s text:c="8"/>Node* tmp = root;</text:p>
      <text:p text:style-name="P69"><text:s text:c="8"/>if (root-&gt;left == nullptr)</text:p>
      <text:p text:style-name="P69"><text:s text:c="12"/>root = root-&gt;right;</text:p>
      <text:p text:style-name="P69"><text:s text:c="8"/>else root = root-&gt;left;</text:p>
      <text:p text:style-name="P69"><text:s text:c="8"/>delete tmp;</text:p>
      <text:p text:style-name="P69"><text:s text:c="4"/>}</text:p>
      <text:p text:style-name="P69"><text:s text:c="4"/>return balance(root);</text:p>
      <text:p text:style-name="P69">}</text:p>
      <text:p text:style-name="P69"/>
      <text:p text:style-name="P69">Node* AvlTree::minimum(Node* root){</text:p>
      <text:p text:style-name="P69"><text:s text:c="4"/>if (root) {</text:p>
      <text:p text:style-name="P69"><text:s text:c="4"/>while (root-&gt;left){</text:p>
      <text:p text:style-name="P69"><text:s text:c="8"/>root = root-&gt;left;</text:p>
      <text:p text:style-name="P69"><text:s text:c="8"/>}</text:p>
      <text:p text:style-name="P69"><text:s text:c="4"/>}</text:p>
      <text:p text:style-name="P69"><text:soft-page-break/><text:s text:c="4"/>return root;</text:p>
      <text:p text:style-name="P69">}</text:p>
      <text:p text:style-name="P69"/>
      <text:p text:style-name="P69">Node* AvlTree::search(Node* root, std::string name){</text:p>
      <text:p text:style-name="P69"><text:s text:c="4"/>if (!root) return nullptr;</text:p>
      <text:p text:style-name="P69"/>
      <text:p text:style-name="P69"><text:s text:c="4"/>if (name.compare(root-&gt;name) &lt; 0)</text:p>
      <text:p text:style-name="P69"><text:s text:c="8"/>return search(root-&gt;left, name);</text:p>
      <text:p text:style-name="P69"><text:s text:c="4"/>else if (name.compare(root-&gt;name) &gt; 0) </text:p>
      <text:p text:style-name="P69"><text:s text:c="8"/>return search(root-&gt;right, name);</text:p>
      <text:p text:style-name="P69"><text:s text:c="4"/></text:p>
      <text:p text:style-name="P69"><text:s text:c="4"/>return root;</text:p>
      <text:p text:style-name="P69">}</text:p>
      <text:p text:style-name="P69"/>
      <text:p text:style-name="P69">void AvlTree::destroyTree(Node* node){</text:p>
      <text:p text:style-name="P69"><text:s text:c="4"/>if (!node) return;</text:p>
      <text:p text:style-name="P69"><text:s text:c="4"/>destroyTree(node-&gt;left);</text:p>
      <text:p text:style-name="P69"><text:s text:c="4"/>destroyTree(node-&gt;right);</text:p>
      <text:p text:style-name="P69"><text:s text:c="4"/>delete node;</text:p>
      <text:p text:style-name="P69">}</text:p>
      <text:p text:style-name="P69"/>
      <text:p text:style-name="P69">void AvlTree::inOrderTraversal(Node* node){</text:p>
      <text:p text:style-name="P69"><text:s text:c="4"/>if (!node) return;</text:p>
      <text:p text:style-name="P69"><text:s text:c="4"/>inOrderTraversal(node-&gt;left);</text:p>
      <text:p text:style-name="P69"><text:s text:c="4"/>resultCost += node-&gt;cost;</text:p>
      <text:p text:style-name="P69"><text:s text:c="4"/>std::cout &lt;&lt; node-&gt;name &lt;&lt; ' ' &lt;&lt; "--" &lt;&lt; ' ' &lt;&lt; node-&gt;cost &lt;&lt; '\n';</text:p>
      <text:p text:style-name="P69"><text:s text:c="4"/>inOrderTraversal(node-&gt;right);</text:p>
      <text:p text:style-name="P69">}</text:p>
      <text:p text:style-name="P69"/>
      <text:p text:style-name="P69">void AvlTree::insert(std::string name, int cost){</text:p>
      <text:p text:style-name="P69"><text:s text:c="4"/>rootNode = insertNode(rootNode, name, cost);</text:p>
      <text:p text:style-name="P69">}</text:p>
      <text:p text:style-name="P69"/>
      <text:p text:style-name="P69">void AvlTree::remove(std::string name){</text:p>
      <text:p text:style-name="P69"><text:s text:c="4"/>if (!search(rootNode, name)) </text:p>
      <text:p text:style-name="P69"><text:s text:c="8"/>std::cout &lt;&lt; "Delete error: dish not exist.\n";</text:p>
      <text:p text:style-name="P69"><text:s text:c="4"/>else rootNode = deleteNode(rootNode, name);</text:p>
      <text:p text:style-name="P69">}</text:p>
      <text:p text:style-name="P69"/>
      <text:p text:style-name="P69">void AvlTree::show(std::string item){</text:p>
      <text:p text:style-name="P69"><text:s text:c="4"/>if (item == "menu") std::cout &lt;&lt; "\nCANTEEN MARIA MENU\n";</text:p>
      <text:p text:style-name="P69"><text:s text:c="4"/>else if (item == "cart") std::cout &lt;&lt; "\nCART\n";</text:p>
      <text:p text:style-name="P69"/>
      <text:p text:style-name="P69"><text:s text:c="4"/>inOrderTraversal(rootNode);</text:p>
      <text:p text:style-name="P69"><text:s text:c="4"/></text:p>
      <text:p text:style-name="P69"><text:s text:c="4"/>if (item == "cart") std::cout &lt;&lt; "Result cost: " &lt;&lt; resultCost &lt;&lt; '\n';</text:p>
      <text:p text:style-name="P69"><text:s text:c="4"/>std::cout &lt;&lt; '\n';</text:p>
      <text:p text:style-name="P69"><text:s text:c="4"/>resultCost = 0;</text:p>
      <text:p text:style-name="P69">}</text:p>
      <text:p text:style-name="P69"/>
      <text:p text:style-name="P69">int AvlTree::searchByName(std::string name){</text:p>
      <text:p text:style-name="P69"><text:s text:c="4"/>Node* node = search(rootNode, name);</text:p>
      <text:p text:style-name="P69"><text:soft-page-break/><text:s text:c="4"/>if (node == nullptr){</text:p>
      <text:p text:style-name="P69"><text:s text:c="8"/>std::cout &lt;&lt; "Search error: dish is not on the menu.\n";</text:p>
      <text:p text:style-name="P69"><text:s text:c="8"/>return -1;</text:p>
      <text:p text:style-name="P69"><text:s text:c="4"/>} else return node-&gt;cost; </text:p>
      <text:p text:style-name="P69">}</text:p>
      <text:p text:style-name="P69"/>
      <text:p text:style-name="P69">AvlTree::~AvlTree(){</text:p>
      <text:p text:style-name="P69"><text:s text:c="4"/>destroyTree(rootNode);</text:p>
      <text:p text:style-name="P69"><text:s text:c="4"/>rootNode = nullptr;</text:p>
      <text:p text:style-name="P69">}</text:p>
      <text:p text:style-name="P69"/>
      <text:p text:style-name="P71"><text:span text:style-name="T94"><text:tab/>Файл </text:span><text:span text:style-name="T95">main</text:span><text:span text:style-name="T94">.cpp</text:span></text:p>
      <text:p text:style-name="P69"/>
      <text:p text:style-name="P69">#include "menu.hpp"</text:p>
      <text:p text:style-name="P69"/>
      <text:p text:style-name="P69">int main(){</text:p>
      <text:p text:style-name="P69"><text:s text:c="4"/>Menu Maria;</text:p>
      <text:p text:style-name="P69"><text:s text:c="4"/>Maria.start();</text:p>
      <text:p text:style-name="P69"><text:s text:c="4"/>return 0;</text:p>
      <text:p text:style-name="P69">}</text:p>
      <text:p text:style-name="P69"/>
      <text:p text:style-name="P72">ПРИЛОЖЕНИЕ С</text:p>
      <text:p text:style-name="P73">ПРИМЕРЫ РАБОТЫ ПРОГРАММЫ</text:p>
      <text:p text:style-name="P74"/>
      <table:table table:name="Таблица7" table:style-name="Таблица7">
        <table:table-column table:style-name="Таблица7.A"/>
        <table:table-row>
          <table:table-cell table:style-name="Таблица7.A1" office:value-type="string">
            <text:p text:style-name="P164"><draw:frame draw:style-name="fr1" draw:name="Изображение2" text:anchor-type="char" svg:width="17cm" svg:height="10.619cm" draw:z-index="3"><draw:image xlink:href="Pictures/10000001000002CA000001BE74CFA7DF.png" xlink:type="simple" xlink:show="embed" xlink:actuate="onLoad" draw:mime-type="image/png"/></draw:frame></text:p>
          </table:table-cell>
        </table:table-row>
        <table:table-row>
          <table:table-cell table:style-name="Таблица7.A1" office:value-type="string">
            <text:p text:style-name="P160">Рисунок 3 — Смена пользователя</text:p>
          </table:table-cell>
        </table:table-row>
      </table:table>
      <text:p text:style-name="P74"/>
      <table:table table:name="Таблица8" table:style-name="Таблица8">
        <table:table-column table:style-name="Таблица8.A"/>
        <table:table-row table:style-name="Таблица8.1">
          <table:table-cell table:style-name="Таблица8.A1" office:value-type="string">
            <text:p text:style-name="P164"><draw:frame draw:style-name="fr2" draw:name="Изображение3" text:anchor-type="char" svg:x="5.918cm" svg:y="0cm" svg:width="4.683cm" svg:height="5.292cm" draw:z-index="4"><draw:image xlink:href="Pictures/10000001000000B1000000C88C7F792A.png" xlink:type="simple" xlink:show="embed" xlink:actuate="onLoad" draw:mime-type="image/png"/></draw:frame></text:p>
          </table:table-cell>
        </table:table-row>
        <table:table-row>
          <table:table-cell table:style-name="Таблица8.A1" office:value-type="string">
            <text:p text:style-name="P17">Рисунок 4 — Добавлени<text:span text:style-name="T98">е</text:span> блюд и вывод меню</text:p>
          </table:table-cell>
        </table:table-row>
      </table:table>
      <text:p text:style-name="P74"/>
      <table:table table:name="Таблица9" table:style-name="Таблица9">
        <table:table-column table:style-name="Таблица9.A"/>
        <text:soft-page-break/>
        <table:table-row table:style-name="Таблица9.1">
          <table:table-cell table:style-name="Таблица9.A1" office:value-type="string">
            <text:p text:style-name="P165"><draw:frame draw:style-name="fr1" draw:name="Изображение4" text:anchor-type="char" svg:width="4.207cm" svg:height="3.493cm" draw:z-index="5"><draw:image xlink:href="Pictures/100000010000009F000000841D66284B.png" xlink:type="simple" xlink:show="embed" xlink:actuate="onLoad" draw:mime-type="image/png"/></draw:frame></text:p>
          </table:table-cell>
        </table:table-row>
        <table:table-row>
          <table:table-cell table:style-name="Таблица9.A1" office:value-type="string">
            <text:p text:style-name="P84">Рисунок <text:span text:style-name="T98">5</text:span> — <text:span text:style-name="T98">Удаление блюда</text:span></text:p>
          </table:table-cell>
        </table:table-row>
      </table:table>
      <text:p text:style-name="P74"/>
      <table:table table:name="Таблица10" table:style-name="Таблица10">
        <table:table-column table:style-name="Таблица10.A"/>
        <table:table-row table:style-name="Таблица10.1">
          <table:table-cell table:style-name="Таблица10.A1" office:value-type="string">
            <text:p text:style-name="P165"><draw:frame draw:style-name="fr1" draw:name="Изображение5" text:anchor-type="char" svg:width="4.419cm" svg:height="1.349cm" draw:z-index="6"><draw:image xlink:href="Pictures/10000001000000A7000000339C0C1EFE.png" xlink:type="simple" xlink:show="embed" xlink:actuate="onLoad" draw:mime-type="image/png"/></draw:frame></text:p>
          </table:table-cell>
        </table:table-row>
        <table:table-row table:style-name="Таблица10.2">
          <table:table-cell table:style-name="Таблица10.A1" office:value-type="string">
            <text:p text:style-name="P84">Рисунок <text:span text:style-name="T98">6</text:span> — <text:span text:style-name="T98">Поиск цены блюда</text:span></text:p>
          </table:table-cell>
        </table:table-row>
      </table:table>
      <text:p text:style-name="P74"/>
      <table:table table:name="Таблица11" table:style-name="Таблица11">
        <table:table-column table:style-name="Таблица11.A"/>
        <table:table-row table:style-name="Таблица11.1">
          <table:table-cell table:style-name="Таблица11.A1" office:value-type="string">
            <text:p text:style-name="P166"><draw:frame draw:style-name="fr1" draw:name="Изображение6" text:anchor-type="char" svg:width="3.942cm" svg:height="3.704cm" draw:z-index="7"><draw:image xlink:href="Pictures/10000001000000950000008C532D0D87.png" xlink:type="simple" xlink:show="embed" xlink:actuate="onLoad" draw:mime-type="image/png"/></draw:frame></text:p>
          </table:table-cell>
        </table:table-row>
        <table:table-row>
          <table:table-cell table:style-name="Таблица11.A1" office:value-type="string">
            <text:p text:style-name="P85">Рисунок <text:span text:style-name="T98">7</text:span> — <text:span text:style-name="T98">Вывод корзины и общей стоимости покупки</text:span></text:p>
          </table:table-cell>
        </table:table-row>
      </table:table>
      <text:p text:style-name="P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monospace" style:font-family-generic="modern" style:font-pitch="fixed"/>
    <style:font-face style:name="Droid Sans Mono" svg:font-family="'Droid Sans Mono', monospace, monospace"/>
    <style:font-face style:name="Helvetica" svg:font-family="Helvetica"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nlo" svg:font-family="Menlo, Monaco, Consolas, 'Cascadia Mono', 'Ubuntu Mono', 'DejaVu Sans Mono', 'Liberation Mono', 'JetBrains Mono', 'Fira Code', Cousine, 'Roboto Mono', 'Courier New', Courier, sans-serif, system-ui"/>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face style:name="Times New" svg:font-family="'Times New'"/>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Verdana" svg:font-family="Verdana" style:font-family-generic="swiss" style:font-pitch="variable"/>
    <style:font-face style:name="Wingdings" svg:font-family="Wingdings" style:font-pitch="variable"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2" fo:font-family="'Times New Roman'" style:font-family-generic="roman" style:font-pitch="variable" fo:font-size="12pt" fo:language="ru" fo:country="RU"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Times New Roman2" style:font-family-asian="'Times New Roman'" style:font-family-generic-asian="roman" style:font-pitch-asian="variable" style:font-weight-asian="bold" style:font-name-complex="Times New Roman2"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loext:opacity="100%"/>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1.27cm" fo:margin-right="0cm" fo:margin-top="0.494cm" fo:margin-bottom="0.494cm" style:contextual-spacing="false" fo:text-indent="0cm"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style:contextual-spacing="false" fo:text-align="justify" style:justify-single-word="false" fo:text-indent="-1.249cm"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style: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style: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style: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style: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1.27cm" fo:margin-right="0cm" fo:margin-top="0cm" fo:margin-bottom="0cm" style:contextual-spacing="true" fo:text-indent="0cm" style:auto-text-indent="false"/>
    </style:style>
    <style:style style:name="ConsPlusNormal" style:family="paragraph">
      <style:paragraph-properties fo:margin-left="0cm" fo:margin-right="0cm" fo:orphans="0" fo:widows="0" fo:text-indent="1.27cm" style:auto-text-indent="false" style:text-autospace="none" style:writing-mode="lr-tb"/>
      <style:text-properties style:use-window-font-color="true" loext:opacity="0%" style:font-name="Arial" fo:font-family="Arial" style:font-family-generic="swiss" style:font-pitch="variable" fo:font-size="10pt" fo:language="ru" fo:country="RU" style:font-name-asian="Times New Roman2"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423cm" fo:text-align="justify" style:justify-single-word="false" fo:orphans="0" fo:widows="0" style:writing-mode="lr-tb"/>
      <style:text-properties fo:color="#000000" loext:opacity="1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loext:graphic-properties draw:fill="solid" draw:fill-color="#ffffff"/>
      <style:paragraph-properties fo:margin-top="0.494cm" fo:margin-bottom="0cm" style:contextual-spacing="false" fo:line-height="0.483cm" fo:text-align="justify" style:justify-single-word="false" fo:orphans="0" fo:widows="0" fo:background-color="#ffffff"/>
      <style:text-properties fo:font-size="10pt" style:font-size-asian="10pt" style:font-size-complex="10pt"/>
    </style:style>
    <style:style style:name="Обычный1" style:family="paragraph">
      <style:paragraph-properties fo:margin-top="0cm" fo:margin-bottom="0.353cm" style:contextual-spacing="false" fo:line-height="115%" fo:orphans="2" fo:widows="2" style:writing-mode="lr-tb"/>
      <style:text-properties fo:color="#000000" loext:opacity="100%" style:font-name="Times New Roman2"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2"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writing-mode="lr-tb"/>
      <style:text-properties style:use-window-font-color="true" loext:opacity="0%" style:text-position="-4% 100%" style:font-name="Times New Roman2" fo:font-family="'Times New Roman'" style:font-family-generic="roman" style:font-pitch="variable" fo:font-size="12pt" fo:letter-spacing="-0.002cm" fo:language="en" fo:country="US" style:letter-kerning="true"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cm" fo:margin-bottom="0.212cm" style: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writing-mode="lr-tb"/>
      <style:text-properties fo:color="#000000" loext:opacity="100%" style:font-name="Times New Roman2" fo:font-family="'Times New Roman'" style:font-family-generic="roman" style:font-pitch="variable" fo:font-size="12pt" fo:language="ru" fo:country="RU"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cm" fo:margin-bottom="0.212cm" style: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1.094cm" fo:border="none" style:shadow="none" style:writing-mode="lr-tb"/>
      <style:text-properties fo:color="#000000" loext:opacity="100%" style:font-name="Helvetica" fo:font-family="Helvetica" style:font-family-generic="swiss" style:font-pitch="variable" fo:font-size="10pt" fo:language="ru" fo:country="RU" style:font-name-asian="Times New Roman2"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49cm" fo:text-align="justify" style:justify-single-word="false" fo:orphans="0" fo:widows="0" fo:padding="1.094cm" fo:border="none" style:shadow="none" style:writing-mode="lr-tb"/>
      <style:text-properties fo:color="#000000" loext:opacity="100%" style:font-name="Arial Unicode MS" fo:font-family="'Arial Unicode MS'" style:font-family-generic="swiss" style:font-pitch="variable" fo:font-size="12pt" fo:language="ru" fo:country="RU" style:font-name-asian="Times New Roman2"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494cm" fo:margin-bottom="0.494cm" style:contextual-spacing="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style>
    <style:style style:name="Маркированный_20_список_20_4" style:display-name="Маркированный список 4" style:family="paragraph" style:parent-style-name="Standard">
      <style:paragraph-properties fo:margin-left="2.133cm" fo:margin-right="0cm" fo:text-align="justify" style:justify-single-word="false" fo:text-indent="-0.635cm" style:auto-text-indent="false"/>
      <style:text-properties style:font-size-complex="10pt"/>
    </style:style>
    <style:style style:name="Маркированный_20_список_20_3" style:display-name="Маркированный список 3" style:family="paragraph" style:parent-style-name="Standard">
      <style:paragraph-properties fo:margin-left="1.633cm" fo:margin-right="0cm" fo:margin-top="0cm" fo:margin-bottom="0cm" style:contextual-spacing="true" fo:text-indent="-0.635cm" style:auto-text-indent="false"/>
    </style:style>
    <style:style style:name="for_5f_tables_5f_12" style:display-name="for_tables_12" style:family="paragraph" style:parent-style-name="Standard">
      <style:paragraph-properties fo:line-height="0.564cm"/>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writing-mode="lr-tb"/>
      <style:text-properties style:use-window-font-color="true" loext:opacity="0%" style:font-name="Times New Roman2" fo:font-family="'Times New Roman'" style:font-family-generic="roman" style:font-pitch="variable" fo:font-size="10pt" fo:language="ru" fo:country="RU" style:font-name-asian="Times New Roman2" style:font-family-asian="'Times New Roman'" style:font-family-generic-asian="roman" style:font-pitch-asian="variable" style:font-size-asian="10pt" style:font-name-complex="Times New Roman2"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494cm" fo:margin-bottom="0.494cm" style: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style: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501cm" fo:margin-right="0cm" fo:line-height="120%" fo:text-align="justify" style:justify-single-word="false" fo:text-indent="0cm" style:auto-text-indent="false"/>
      <style:text-properties fo:font-size="14pt" fo:letter-spacing="-0.004cm" style:font-size-asian="14pt" style:font-size-complex="10pt"/>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style:contextual-spacing="false"/>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style:contextual-spacing="true" fo:text-indent="0cm"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style:contextual-spacing="true" fo:text-indent="0cm"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text-position="0% 100%" style:font-name-complex="Times New Roman2" style:font-family-complex="'Times New Roman'" style:font-family-generic-complex="roman" style:font-pitch-complex="variable"/>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2" fo:font-family="'Times New Roman'" style:font-family-generic="roman" style:font-pitch="variable" fo:font-size="12pt" fo:font-style="italic" style:font-size-asian="12pt" style:font-style-asian="italic" style:font-name-complex="Times New Roman2"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loext:opacity="100%" style:font-name="Cambria" fo:font-family="Cambria" style:font-family-generic="roman" style:font-pitch="variable" fo:font-size="13pt" fo:font-weight="bold" style:font-size-asian="13pt" style:font-weight-asian="bold" style:font-name-complex="Times New Roman2"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2" fo:font-family="'Times New Roman'" style:font-family-generic="roman" style:font-pitch="variable" fo:font-size="14pt" fo:font-weight="bold" style:font-size-asian="14pt" style:font-weight-asian="bold" style:font-name-complex="Times New Roman2"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2" fo:font-family="'Times New Roman'" style:font-family-generic="roman" style:font-pitch="variable" fo:font-size="13pt" fo:font-style="italic" fo:font-weight="bold" style:font-size-asian="13pt" style:font-style-asian="italic" style:font-weight-asian="bold" style:font-name-complex="Times New Roman2"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loext:opacity="100%" style:font-name="Cambria" fo:font-family="Cambria" style:font-family-generic="roman" style:font-pitch="variable" fo:font-size="12pt" fo:font-style="italic" style:font-size-asian="12pt" style:font-style-asian="italic" style:font-name-complex="Times New Roman2"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loext:opacity="100%" style:font-name="Cambria" fo:font-family="Cambria" style:font-family-generic="roman" style:font-pitch="variable" fo:font-size="12pt" fo:font-style="italic" style:font-size-asian="12pt" style:font-style-asian="italic" style:font-name-complex="Times New Roman2"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loext:opacity="100%" style:font-name="Cambria" fo:font-family="Cambria" style:font-family-generic="roman" style:font-pitch="variable" fo:font-style="italic" style:font-style-asian="italic" style:font-name-complex="Times New Roman2"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2" fo:font-family="'Times New Roman'" style:font-family-generic="roman" style:font-pitch="variable" fo:font-size="12pt" fo:font-weight="bold" style:font-size-asian="12pt" style:font-weight-asian="bold" style:font-name-complex="Times New Roman2"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loext:opacity="100%" style:font-name="Times New Roman2" fo:font-family="'Times New Roman'" style:font-family-generic="roman" style:font-pitch="variable" fo:font-size="12pt" style:font-size-asian="12pt" style:font-name-complex="Times New Roman2"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2" fo:font-family="'Times New Roman'" style:font-family-generic="roman" style:font-pitch="variable" fo:font-size="12pt" fo:font-weight="bold" style:font-size-asian="12pt" style:font-weight-asian="bold" style:font-name-complex="Times New Roman2"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2" fo:font-family="'Times New Roman'" style:font-family-generic="roman" style:font-pitch="variable" fo:font-size="12pt" fo:font-weight="bold" style:font-size-asian="12pt" style:font-weight-asian="bold" style:font-name-complex="Times New Roman2"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2" fo:font-family="'Times New Roman'" style:font-family-generic="roman" style:font-pitch="variable" fo:font-size="12pt" fo:font-weight="bold" style:font-size-asian="12pt" style:font-weight-asian="bold" style:font-name-complex="Times New Roman2"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2" fo:font-family="'Times New Roman'" style:font-family-generic="roman" style:font-pitch="variable" fo:font-size="12pt" style:font-size-asian="12pt" style:font-name-complex="Times New Roman2"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2" fo:font-family="'Times New Roman'" style:font-family-generic="roman" style:font-pitch="variable" fo:font-size="12pt" style:font-size-asian="12pt" style:font-name-complex="Times New Roman2"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2" fo:font-family="'Times New Roman'" style:font-family-generic="roman" style:font-pitch="variable" fo:font-size="12pt" fo:font-weight="bold" style:font-size-asian="12pt" style:font-weight-asian="bold" style:font-name-complex="Times New Roman2"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2" fo:font-family="'Times New Roman'" style:font-family-generic="roman" style:font-pitch="variable" fo:font-size="12pt" style:font-size-asian="12pt" style:font-name-complex="Times New Roman2"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2" fo:font-family="'Times New Roman'" style:font-family-generic="roman" style:font-pitch="variable" style:text-underline-style="none" style:font-name-complex="Times New Roman2"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loext:opacity="100%" style:text-position="0% 100%" style:font-name="Times New Roman2"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2"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loext:opacity="100%" style:text-position="0% 100%" style:font-name="Times New Roman2" fo:font-family="'Times New Roman'" style:font-family-generic="roman" style:font-pitch="variable" fo:font-size="12pt" fo:letter-spacing="normal" fo:language="ru" fo:country="RU" style:text-underline-style="none" fo:font-weight="bold" style:font-size-asian="12pt" style:font-weight-asian="bold" style:font-name-complex="Times New Roman2"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2"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font-name-complex="Times New Roman2"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2" fo:font-family="'Times New Roman'" style:font-family-generic="roman" style:font-pitch="variable" fo:background-color="#ffffff" style:font-name-complex="Times New Roman2"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2" style:font-family-asian="'Times New Roman'" style:font-family-generic-asian="roman" style:font-pitch-asian="variable" style:font-size-asian="11pt" style:font-name-complex="Times New Roman2"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2" style:font-family-asian="'Times New Roman'" style:font-family-generic-asian="roman" style:font-pitch-asian="variable" style:font-size-asian="8pt" style:font-name-complex="Times New Roman2"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2" style:font-family-complex="'Times New Roman'" style:font-family-generic-complex="roman" style:font-pitch-complex="variable"/>
    </style:style>
    <style:style style:name="hps" style:family="text" style:parent-style-name="Основной_20_шрифт_20_абзаца">
      <style:text-properties style:font-name-complex="Times New Roman2"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2"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loext:opacity="100%" fo:font-size="10pt" style:text-underline-style="solid" style:text-underline-width="auto" style:text-underline-color="font-color" style:font-size-asian="10pt" style:font-name-complex="Times New Roman2"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2"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2"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2"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2" fo:font-family="'Times New Roman'" style:font-family-generic="roman" style:font-pitch="variable" fo:font-size="8pt" fo:font-weight="bold" style:font-size-asian="8pt" style:font-weight-asian="bold" style:font-name-complex="Times New Roman2"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2"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2"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2"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2" fo:font-family="'Times New Roman'" style:font-family-generic="roman" style:font-pitch="variable" fo:font-size="14pt" style:font-name-asian="Times New Roman2" style:font-family-asian="'Times New Roman'" style:font-family-generic-asian="roman" style:font-pitch-asian="variable" style:font-size-asian="14pt" style:font-name-complex="Times New Roman2"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2"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loext:opacity="100%" style:font-name="Cambria" fo:font-family="Cambria" style:font-family-generic="roman" style:font-pitch="variable" fo:font-size="12pt" fo:font-weight="bold" style:font-name-asian="Times New Roman2" style:font-family-asian="'Times New Roman'" style:font-family-generic-asian="roman" style:font-pitch-asian="variable" style:font-size-asian="12pt" style:font-weight-asian="bold" style:font-name-complex="Times New Roman2"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ff" loext:opacity="100%" style:font-name="Times New Roman" fo:font-family="'Times New Roman'" style:font-pitch="variable" fo:font-size="12pt" style:text-underline-style="solid" style:text-underline-width="auto" style:text-underline-color="font-color" style:font-name-asian="Times New Roman3" style:font-family-asian="'Times New Roman'" style:font-family-generic-asian="system" style:font-pitch-asian="variable" style:font-size-asian="12pt"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WW8Num1z0" loext:num-list-format="%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0" loext:num-list-format="%3%." style:num-suffix="." style:num-format="i">
        <style:list-level-properties text:list-level-position-and-space-mode="label-alignment">
          <style:list-level-label-alignment text:label-followed-by="listtab"/>
        </style:list-level-properties>
      </text:list-level-style-number>
      <text:list-level-style-number text:level="4" text:style-name="WW8Num1z0"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WW8Num1z0" loext:num-list-format="%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1z0" loext:num-list-format="%6%." style:num-suffix="." style:num-format="i">
        <style:list-level-properties text:list-level-position-and-space-mode="label-alignment">
          <style:list-level-label-alignment text:label-followed-by="listtab"/>
        </style:list-level-properties>
      </text:list-level-style-number>
      <text:list-level-style-number text:level="7" text:style-name="WW8Num1z0"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WW8Num1z0" loext:num-list-format="%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1z0" loext:num-list-format="%9%." style:num-suffix="." style:num-format="i">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3.10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914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724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right="-0.002cm"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officeooo:paragraph-rsid="00410b01"/>
    </style:style>
    <style:page-layout style:name="Mpm1">
      <style:page-layout-properties fo:page-width="21.001cm" fo:page-height="29.7cm" style:num-format="1" style:print-orientation="portrait" fo:margin-top="2cm" fo:margin-bottom="2cm" fo:margin-left="3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5"/></text:p>
      </style:header>
      <style:header-first>
        <text:p text:style-name="Header"/>
      </style:header-first>
      <style:footer>
        <text:p text:style-name="MP2"><text:page-number text:select-page="current">35</text:page-number></text:p>
        <text:p text:style-name="MP3"/>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ПРОЕКТ ЛЭТИ</dc:title>
    <dc:subject/>
    <meta:keyword/>
    <meta:initial-creator>SAP</meta:initial-creator>
    <meta:creation-date>2015-11-10T19:53:00</meta:creation-date>
    <dc:date>2025-12-20T23:48:26.820360711</dc:date>
    <meta:print-date>2015-07-17T12:06:00</meta:print-date>
    <meta:editing-cycles>17</meta:editing-cycles>
    <meta:editing-duration>PT4H6M5S</meta:editing-duration>
    <meta:generator>LibreOffice/24.2.7.2$Linux_X86_64 LibreOffice_project/420$Build-2</meta:generator>
    <meta:document-statistic meta:table-count="12" meta:image-count="8" meta:object-count="0" meta:page-count="35" meta:paragraph-count="657" meta:word-count="4183" meta:character-count="33045" meta:non-whitespace-character-count="27638"/>
  </office:meta>
</office:document-meta>
</file>