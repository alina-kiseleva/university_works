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775A39AB2C.png" manifest:media-type="image/png"/>
  <manifest:file-entry manifest:full-path="Pictures/10000000000001F4000001779D7B6AE4.png" manifest:media-type="image/png"/>
  <manifest:file-entry manifest:full-path="Pictures/10000000000001F40000017730BACD3F.png" manifest:media-type="image/png"/>
  <manifest:file-entry manifest:full-path="Pictures/1000000000000200000002005058F68F.png" manifest:media-type="image/png"/>
  <manifest:file-entry manifest:full-path="Pictures/10000000000001F400000177F573185C.png" manifest:media-type="image/png"/>
  <manifest:file-entry manifest:full-path="Pictures/1000000000000200000002005BA74D46.png" manifest:media-type="image/png"/>
  <manifest:file-entry manifest:full-path="Pictures/10000000000001F4000001778908586A.png" manifest:media-type="image/png"/>
  <manifest:file-entry manifest:full-path="Pictures/10000000000001F400000177A4047260.png" manifest:media-type="image/png"/>
  <manifest:file-entry manifest:full-path="Pictures/10000000000001F4000001772F8ED33D.png" manifest:media-type="image/png"/>
  <manifest:file-entry manifest:full-path="Pictures/10000000000001F400000177284A9D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monospace"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cm" table:align="left" style:writing-mode="lr-tb"/>
    </style:style>
    <style:style style:name="Таблица2.A" style:family="table-column">
      <style:table-column-properties style:column-width="7.357cm" style:rel-column-width="4171*"/>
    </style:style>
    <style:style style:name="Таблица2.B" style:family="table-column">
      <style:table-column-properties style:column-width="4.203cm" style:rel-column-width="2383*"/>
    </style:style>
    <style:style style:name="Таблица2.C" style:family="table-column">
      <style:table-column-properties style:column-width="5.44cm" style:rel-column-width="3084*"/>
    </style:style>
    <style:style style:name="Таблица2.1" style:family="table-row">
      <style:table-row-properties style:min-row-height="1.191cm" fo:keep-together="auto"/>
    </style:style>
    <style:style style:name="Таблица2.A1" style:family="table-cell">
      <style:table-cell-properties style:vertical-align="middle"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236cm" fo:keep-together="auto"/>
    </style:style>
    <style:style style:name="Таблица2.4" style:family="table-row">
      <style:table-row-properties style:min-row-height="3.567cm" fo:keep-together="auto"/>
    </style:style>
    <style:style style:name="Таблица2.5" style:family="table-row">
      <style:table-row-properties style:min-row-height="3.844cm" fo:keep-together="auto"/>
    </style:style>
    <style:style style:name="Таблица2.6" style:family="table-row">
      <style:table-row-properties style:min-row-height="1.725cm" fo:keep-together="auto"/>
    </style:style>
    <style:style style:name="Таблица2.7" style:family="table-row">
      <style:table-row-properties style:min-row-height="1.487cm" fo:keep-together="auto"/>
    </style:style>
    <style:style style:name="Таблица2.8" style:family="table-row">
      <style:table-row-properties style:min-row-height="1.459cm" fo:keep-together="auto"/>
    </style:style>
    <style:style style:name="Таблица2.9" style:family="table-row">
      <style:table-row-properties style:min-row-height="1.125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1" style:family="table-cell">
      <style:table-cell-properties style:vertical-align="bottom" fo:padding-left="0.191cm" fo:padding-right="0.191cm" fo:padding-top="0cm" fo:padding-bottom="0cm" fo:border-left="none" fo:border-right="none" fo:border-top="0.05pt solid #000000" fo:border-bottom="0.05pt solid #000000" style:writing-mode="lr-tb"/>
    </style:style>
    <style:style style:name="Таблица3" style:family="table">
      <style:table-properties style:width="17.38cm" fo:margin-left="-0.191cm" table:align="left" style:writing-mode="lr-tb"/>
    </style:style>
    <style:style style:name="Таблица3.A" style:family="table-column">
      <style:table-column-properties style:column-width="1.415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middle" fo:padding-left="0.191cm" fo:padding-right="0.191cm" fo:padding-top="0cm" fo:padding-bottom="0cm" fo:border="none" style:writing-mode="lr-tb"/>
    </style:style>
    <style:style style:name="Таблица4" style:family="table">
      <style:table-properties style:width="17cm" table:align="margins" style:writing-mode="lr-tb"/>
    </style:style>
    <style:style style:name="Таблица4.A" style:family="table-column">
      <style:table-column-properties style:column-width="2.011cm" style:rel-column-width="7751*"/>
    </style:style>
    <style:style style:name="Таблица4.B" style:family="table-column">
      <style:table-column-properties style:column-width="14.99cm" style:rel-column-width="57784*"/>
    </style:style>
    <style:style style:name="Таблица4.1" style:family="table-row">
      <style:table-row-properties style:min-row-height="1.111cm"/>
    </style:style>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B1" style:family="table-cell">
      <style:table-cell-properties style:vertical-align="middle" fo:padding="0.097cm" fo:border="0.5pt solid #000000"/>
    </style:style>
    <style:style style:name="Таблица4.2" style:family="table-row">
      <style:table-row-properties style:min-row-height="1.191cm"/>
    </style:style>
    <style:style style:name="Таблица4.A2" style:family="table-cell">
      <style:table-cell-properties style:vertical-align="middle" fo:padding="0.097cm" fo:border-left="0.5pt solid #000000" fo:border-right="none" fo:border-top="none" fo:border-bottom="0.5pt solid #000000"/>
    </style:style>
    <style:style style:name="Таблица4.B2" style:family="table-cell">
      <style:table-cell-properties style:vertical-align="middle" fo:padding="0.097cm" fo:border-left="0.5pt solid #000000" fo:border-right="0.5pt solid #000000" fo:border-top="none" fo:border-bottom="0.5pt solid #000000"/>
    </style:style>
    <style:style style:name="Таблица6" style:family="table">
      <style:table-properties style:width="17cm" table:align="margins" style:writing-mode="lr-tb"/>
    </style:style>
    <style:style style:name="Таблица6.A" style:family="table-column">
      <style:table-column-properties style:column-width="2.011cm" style:rel-column-width="7751*"/>
    </style:style>
    <style:style style:name="Таблица6.B" style:family="table-column">
      <style:table-column-properties style:column-width="14.99cm" style:rel-column-width="57784*"/>
    </style:style>
    <style:style style:name="Таблица6.1" style:family="table-row">
      <style:table-row-properties style:min-row-height="1.111cm"/>
    </style:style>
    <style:style style:name="Таблица6.A1" style:family="table-cell">
      <style:table-cell-properties style:vertical-align="middle" fo:padding="0.097cm" fo:border-left="0.5pt solid #000000" fo:border-right="none" fo:border-top="0.5pt solid #000000" fo:border-bottom="0.5pt solid #000000"/>
    </style:style>
    <style:style style:name="Таблица6.B1" style:family="table-cell">
      <style:table-cell-properties style:vertical-align="middle" fo:padding="0.097cm" fo:border="0.5pt solid #000000"/>
    </style:style>
    <style:style style:name="Таблица6.2" style:family="table-row">
      <style:table-row-properties style:min-row-height="1.191cm"/>
    </style:style>
    <style:style style:name="Таблица6.A2" style:family="table-cell">
      <style:table-cell-properties style:vertical-align="middle" fo:padding="0.097cm" fo:border-left="0.5pt solid #000000" fo:border-right="none" fo:border-top="none" fo:border-bottom="0.5pt solid #000000"/>
    </style:style>
    <style:style style:name="Таблица6.B2" style:family="table-cell">
      <style:table-cell-properties style:vertical-align="middle" fo:padding="0.097cm" fo:border-left="0.5pt solid #000000" fo:border-right="0.5pt solid #000000" fo:border-top="none" fo:border-bottom="0.5pt solid #000000"/>
    </style:style>
    <style:style style:name="Таблица5" style:family="table">
      <style:table-properties style:width="17cm" table:align="margins" style:writing-mode="lr-tb"/>
    </style:style>
    <style:style style:name="Таблица5.A" style:family="table-column">
      <style:table-column-properties style:column-width="2.011cm" style:rel-column-width="7751*"/>
    </style:style>
    <style:style style:name="Таблица5.B" style:family="table-column">
      <style:table-column-properties style:column-width="14.99cm" style:rel-column-width="57784*"/>
    </style:style>
    <style:style style:name="Таблица5.1" style:family="table-row">
      <style:table-row-properties style:min-row-height="2.593cm"/>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B1" style:family="table-cell">
      <style:table-cell-properties style:vertical-align="middle" fo:padding="0.097cm" fo:border="0.5pt solid #000000"/>
    </style:style>
    <style:style style:name="Таблица5.2" style:family="table-row">
      <style:table-row-properties style:min-row-height="1.905cm"/>
    </style:style>
    <style:style style:name="Таблица5.A2" style:family="table-cell">
      <style:table-cell-properties style:vertical-align="middle" fo:padding="0.097cm" fo:border-left="0.5pt solid #000000" fo:border-right="none" fo:border-top="none" fo:border-bottom="0.5pt solid #000000"/>
    </style:style>
    <style:style style:name="Таблица5.B2" style:family="table-cell">
      <style:table-cell-properties style:vertical-align="middle" fo:padding="0.097cm" fo:border-left="0.5pt solid #000000" fo:border-right="0.5pt solid #000000" fo:border-top="none" fo:border-bottom="0.5pt solid #000000"/>
    </style:style>
    <style:style style:name="Таблица7" style:family="table">
      <style:table-properties style:width="17cm" table:align="margins" style:writing-mode="lr-tb"/>
    </style:style>
    <style:style style:name="Таблица7.A" style:family="table-column">
      <style:table-column-properties style:column-width="2.011cm" style:rel-column-width="7751*"/>
    </style:style>
    <style:style style:name="Таблица7.B" style:family="table-column">
      <style:table-column-properties style:column-width="14.99cm" style:rel-column-width="57784*"/>
    </style:style>
    <style:style style:name="Таблица7.1" style:family="table-row">
      <style:table-row-properties style:min-row-height="2.805cm"/>
    </style:style>
    <style:style style:name="Таблица7.A1" style:family="table-cell">
      <style:table-cell-properties style:vertical-align="middle" fo:padding="0.097cm" fo:border-left="0.5pt solid #000000" fo:border-right="none" fo:border-top="0.5pt solid #000000" fo:border-bottom="0.5pt solid #000000"/>
    </style:style>
    <style:style style:name="Таблица7.B1" style:family="table-cell">
      <style:table-cell-properties style:vertical-align="middle" fo:padding="0.097cm" fo:border="0.5pt solid #000000"/>
    </style:style>
    <style:style style:name="Таблица7.2" style:family="table-row">
      <style:table-row-properties style:min-row-height="1.905cm"/>
    </style:style>
    <style:style style:name="Таблица7.A2" style:family="table-cell">
      <style:table-cell-properties style:vertical-align="middle" fo:padding="0.097cm" fo:border-left="0.5pt solid #000000" fo:border-right="none" fo:border-top="none" fo:border-bottom="0.5pt solid #000000"/>
    </style:style>
    <style:style style:name="Таблица7.B2" style:family="table-cell">
      <style:table-cell-properties style:vertical-align="middle" fo:padding="0.097cm" fo:border-left="0.5pt solid #000000" fo:border-right="0.5pt solid #000000" fo:border-top="none" fo:border-bottom="0.5pt solid #000000"/>
    </style:style>
    <style:style style:name="Таблица8" style:family="table">
      <style:table-properties style:width="17cm" table:align="margins" style:writing-mode="lr-tb"/>
    </style:style>
    <style:style style:name="Таблица8.A" style:family="table-column">
      <style:table-column-properties style:column-width="2.011cm" style:rel-column-width="7751*"/>
    </style:style>
    <style:style style:name="Таблица8.B" style:family="table-column">
      <style:table-column-properties style:column-width="14.99cm" style:rel-column-width="57784*"/>
    </style:style>
    <style:style style:name="Таблица8.1" style:family="table-row">
      <style:table-row-properties style:min-row-height="2.593cm"/>
    </style:style>
    <style:style style:name="Таблица8.A1" style:family="table-cell">
      <style:table-cell-properties style:vertical-align="middle" fo:padding="0.097cm" fo:border-left="0.5pt solid #000000" fo:border-right="none" fo:border-top="0.5pt solid #000000" fo:border-bottom="0.5pt solid #000000"/>
    </style:style>
    <style:style style:name="Таблица8.B1" style:family="table-cell">
      <style:table-cell-properties style:vertical-align="middle" fo:padding="0.097cm" fo:border="0.5pt solid #000000"/>
    </style:style>
    <style:style style:name="Таблица8.2" style:family="table-row">
      <style:table-row-properties style:min-row-height="1.905cm"/>
    </style:style>
    <style:style style:name="Таблица8.A2" style:family="table-cell">
      <style:table-cell-properties style:vertical-align="middle" fo:padding="0.097cm" fo:border-left="0.5pt solid #000000" fo:border-right="none" fo:border-top="none" fo:border-bottom="0.5pt solid #000000"/>
    </style:style>
    <style:style style:name="Таблица8.B2" style:family="table-cell">
      <style:table-cell-properties style:vertical-align="middle" fo:padding="0.097cm" fo:border-left="0.5pt solid #000000" fo:border-right="0.5pt solid #000000" fo:border-top="none" fo:border-bottom="0.5pt solid #000000"/>
    </style:style>
    <style:style style:name="Таблица9" style:family="table">
      <style:table-properties style:width="17cm" table:align="margins" style:writing-mode="lr-tb"/>
    </style:style>
    <style:style style:name="Таблица9.A" style:family="table-column">
      <style:table-column-properties style:column-width="2.011cm" style:rel-column-width="7751*"/>
    </style:style>
    <style:style style:name="Таблица9.B" style:family="table-column">
      <style:table-column-properties style:column-width="14.99cm" style:rel-column-width="57784*"/>
    </style:style>
    <style:style style:name="Таблица9.1" style:family="table-row">
      <style:table-row-properties style:min-row-height="2.011cm"/>
    </style:style>
    <style:style style:name="Таблица9.A1" style:family="table-cell">
      <style:table-cell-properties style:vertical-align="middle" fo:padding="0.097cm" fo:border-left="0.5pt solid #000000" fo:border-right="none" fo:border-top="0.5pt solid #000000" fo:border-bottom="0.5pt solid #000000"/>
    </style:style>
    <style:style style:name="Таблица9.B1" style:family="table-cell">
      <style:table-cell-properties style:vertical-align="middle" fo:padding="0.097cm" fo:border="0.5pt solid #000000"/>
    </style:style>
    <style:style style:name="Таблица9.2" style:family="table-row">
      <style:table-row-properties style:min-row-height="1.905cm"/>
    </style:style>
    <style:style style:name="Таблица9.A2" style:family="table-cell">
      <style:table-cell-properties style:vertical-align="middle" fo:padding="0.097cm" fo:border-left="0.5pt solid #000000" fo:border-right="none" fo:border-top="none" fo:border-bottom="0.5pt solid #000000"/>
    </style:style>
    <style:style style:name="Таблица9.B2" style:family="table-cell">
      <style:table-cell-properties style:vertical-align="middle" fo:padding="0.097cm" fo:border-left="0.5pt solid #000000" fo:border-right="0.5pt solid #000000" fo:border-top="none" fo:border-bottom="0.5pt solid #000000"/>
    </style:style>
    <style:style style:name="Таблица10" style:family="table">
      <style:table-properties style:width="17cm" table:align="margins" style:writing-mode="lr-tb"/>
    </style:style>
    <style:style style:name="Таблица10.A" style:family="table-column">
      <style:table-column-properties style:column-width="2.011cm" style:rel-column-width="7751*"/>
    </style:style>
    <style:style style:name="Таблица10.B" style:family="table-column">
      <style:table-column-properties style:column-width="14.99cm" style:rel-column-width="57784*"/>
    </style:style>
    <style:style style:name="Таблица10.1" style:family="table-row">
      <style:table-row-properties style:min-row-height="1.402cm"/>
    </style:style>
    <style:style style:name="Таблица10.A1" style:family="table-cell">
      <style:table-cell-properties style:vertical-align="middle" fo:padding="0.097cm" fo:border-left="0.5pt solid #000000" fo:border-right="none" fo:border-top="0.5pt solid #000000" fo:border-bottom="0.5pt solid #000000"/>
    </style:style>
    <style:style style:name="Таблица10.B1" style:family="table-cell">
      <style:table-cell-properties style:vertical-align="middle" fo:padding="0.097cm" fo:border="0.5pt solid #000000"/>
    </style:style>
    <style:style style:name="Таблица10.2" style:family="table-row">
      <style:table-row-properties style:min-row-height="1.693cm"/>
    </style:style>
    <style:style style:name="Таблица10.A2" style:family="table-cell">
      <style:table-cell-properties style:vertical-align="middle" fo:padding="0.097cm" fo:border-left="0.5pt solid #000000" fo:border-right="none" fo:border-top="none" fo:border-bottom="0.5pt solid #000000"/>
    </style:style>
    <style:style style:name="Таблица10.B2" style:family="table-cell">
      <style:table-cell-properties style:vertical-align="middle" fo:padding="0.097cm" fo:border-left="0.5pt solid #000000" fo:border-right="0.5pt solid #000000" fo:border-top="none" fo:border-bottom="0.5pt solid #000000"/>
    </style:style>
    <style:style style:name="Таблица11" style:family="table">
      <style:table-properties style:width="17cm" table:align="margins" style:writing-mode="lr-tb"/>
    </style:style>
    <style:style style:name="Таблица11.A" style:family="table-column">
      <style:table-column-properties style:column-width="2.011cm" style:rel-column-width="7751*"/>
    </style:style>
    <style:style style:name="Таблица11.B" style:family="table-column">
      <style:table-column-properties style:column-width="14.99cm" style:rel-column-width="57784*"/>
    </style:style>
    <style:style style:name="Таблица11.1" style:family="table-row">
      <style:table-row-properties style:min-row-height="1.614cm"/>
    </style:style>
    <style:style style:name="Таблица11.A1" style:family="table-cell">
      <style:table-cell-properties style:vertical-align="middle" fo:padding="0.097cm" fo:border-left="0.5pt solid #000000" fo:border-right="none" fo:border-top="0.5pt solid #000000" fo:border-bottom="0.5pt solid #000000"/>
    </style:style>
    <style:style style:name="Таблица11.B1" style:family="table-cell">
      <style:table-cell-properties style:vertical-align="middle" fo:padding="0.097cm" fo:border="0.5pt solid #000000"/>
    </style:style>
    <style:style style:name="Таблица11.2" style:family="table-row">
      <style:table-row-properties style:min-row-height="1.905cm"/>
    </style:style>
    <style:style style:name="Таблица11.A2" style:family="table-cell">
      <style:table-cell-properties style:vertical-align="middle" fo:padding="0.097cm" fo:border-left="0.5pt solid #000000" fo:border-right="none" fo:border-top="none" fo:border-bottom="0.5pt solid #000000"/>
    </style:style>
    <style:style style:name="Таблица11.B2" style:family="table-cell">
      <style:table-cell-properties style:vertical-align="middle" fo:padding="0.097cm" fo:border-left="0.5pt solid #000000" fo:border-right="0.5pt solid #000000" fo:border-top="none" fo:border-bottom="0.5pt solid #000000"/>
    </style:style>
    <style:style style:name="Таблица12" style:family="table">
      <style:table-properties style:width="17cm" table:align="margins" style:writing-mode="lr-tb"/>
    </style:style>
    <style:style style:name="Таблица12.A" style:family="table-column">
      <style:table-column-properties style:column-width="2.011cm" style:rel-column-width="7751*"/>
    </style:style>
    <style:style style:name="Таблица12.B" style:family="table-column">
      <style:table-column-properties style:column-width="14.99cm" style:rel-column-width="57784*"/>
    </style:style>
    <style:style style:name="Таблица12.1" style:family="table-row">
      <style:table-row-properties style:min-row-height="1.296cm"/>
    </style:style>
    <style:style style:name="Таблица12.A1" style:family="table-cell">
      <style:table-cell-properties style:vertical-align="middle" fo:padding="0.097cm" fo:border-left="0.5pt solid #000000" fo:border-right="none" fo:border-top="0.5pt solid #000000" fo:border-bottom="0.5pt solid #000000"/>
    </style:style>
    <style:style style:name="Таблица12.B1" style:family="table-cell">
      <style:table-cell-properties style:vertical-align="middle" fo:padding="0.097cm" fo:border="0.5pt solid #000000"/>
    </style:style>
    <style:style style:name="Таблица12.A2" style:family="table-cell">
      <style:table-cell-properties style:vertical-align="middle" fo:padding="0.097cm" fo:border-left="0.5pt solid #000000" fo:border-right="none" fo:border-top="none" fo:border-bottom="0.5pt solid #000000"/>
    </style:style>
    <style:style style:name="Таблица12.B2" style:family="table-cell">
      <style:table-cell-properties style:vertical-align="middle" fo:padding="0.097cm" fo:border-left="0.5pt solid #000000" fo:border-right="0.5pt solid #000000" fo:border-top="none" fo:border-bottom="0.5pt solid #000000"/>
    </style:style>
    <style:style style:name="Таблица13" style:family="table">
      <style:table-properties style:width="17cm" table:align="margins" style:writing-mode="lr-tb"/>
    </style:style>
    <style:style style:name="Таблица13.A" style:family="table-column">
      <style:table-column-properties style:column-width="2.011cm" style:rel-column-width="7751*"/>
    </style:style>
    <style:style style:name="Таблица13.B" style:family="table-column">
      <style:table-column-properties style:column-width="14.99cm" style:rel-column-width="57784*"/>
    </style:style>
    <style:style style:name="Таблица13.1" style:family="table-row">
      <style:table-row-properties style:min-row-height="1.296cm"/>
    </style:style>
    <style:style style:name="Таблица13.A1" style:family="table-cell">
      <style:table-cell-properties style:vertical-align="middle" fo:padding="0.097cm" fo:border-left="0.5pt solid #000000" fo:border-right="none" fo:border-top="0.5pt solid #000000" fo:border-bottom="0.5pt solid #000000"/>
    </style:style>
    <style:style style:name="Таблица13.B1" style:family="table-cell">
      <style:table-cell-properties style:vertical-align="middle" fo:padding="0.097cm" fo:border="0.5pt solid #000000"/>
    </style:style>
    <style:style style:name="Таблица13.A2" style:family="table-cell">
      <style:table-cell-properties style:vertical-align="middle" fo:padding="0.097cm" fo:border-left="0.5pt solid #000000" fo:border-right="none" fo:border-top="none" fo:border-bottom="0.5pt solid #000000"/>
    </style:style>
    <style:style style:name="Таблица13.B2" style:family="table-cell">
      <style:table-cell-properties style:vertical-align="middle" fo:padding="0.097cm" fo:border-left="0.5pt solid #000000" fo:border-right="0.5pt solid #000000" fo:border-top="none" fo:border-bottom="0.5pt solid #000000"/>
    </style:style>
    <style:style style:name="Таблица14" style:family="table">
      <style:table-properties style:width="17cm" table:align="margins" style:writing-mode="lr-tb"/>
    </style:style>
    <style:style style:name="Таблица14.A" style:family="table-column">
      <style:table-column-properties style:column-width="2.011cm" style:rel-column-width="7751*"/>
    </style:style>
    <style:style style:name="Таблица14.B" style:family="table-column">
      <style:table-column-properties style:column-width="14.99cm" style:rel-column-width="57784*"/>
    </style:style>
    <style:style style:name="Таблица14.1" style:family="table-row">
      <style:table-row-properties style:min-row-height="1.296cm"/>
    </style:style>
    <style:style style:name="Таблица14.A1" style:family="table-cell">
      <style:table-cell-properties style:vertical-align="middle" fo:padding="0.097cm" fo:border-left="0.5pt solid #000000" fo:border-right="none" fo:border-top="0.5pt solid #000000" fo:border-bottom="0.5pt solid #000000"/>
    </style:style>
    <style:style style:name="Таблица14.B1" style:family="table-cell">
      <style:table-cell-properties style:vertical-align="middle" fo:padding="0.097cm" fo:border="0.5pt solid #000000"/>
    </style:style>
    <style:style style:name="Таблица14.2" style:family="table-row">
      <style:table-row-properties style:min-row-height="2.514cm"/>
    </style:style>
    <style:style style:name="Таблица14.A2" style:family="table-cell">
      <style:table-cell-properties style:vertical-align="middle" fo:padding="0.097cm" fo:border-left="0.5pt solid #000000" fo:border-right="none" fo:border-top="none" fo:border-bottom="0.5pt solid #000000"/>
    </style:style>
    <style:style style:name="Таблица14.B2" style:family="table-cell">
      <style:table-cell-properties style:vertical-align="middle" fo:padding="0.097cm" fo:border-left="0.5pt solid #000000" fo:border-right="0.5pt solid #000000" fo:border-top="none" fo:border-bottom="0.5pt solid #000000"/>
    </style:style>
    <style:style style:name="Таблица15" style:family="table">
      <style:table-properties style:width="17cm" table:align="margins" style:writing-mode="lr-tb"/>
    </style:style>
    <style:style style:name="Таблица15.A" style:family="table-column">
      <style:table-column-properties style:column-width="2.011cm" style:rel-column-width="7751*"/>
    </style:style>
    <style:style style:name="Таблица15.B" style:family="table-column">
      <style:table-column-properties style:column-width="14.99cm" style:rel-column-width="57784*"/>
    </style:style>
    <style:style style:name="Таблица15.1" style:family="table-row">
      <style:table-row-properties style:min-row-height="1.217cm"/>
    </style:style>
    <style:style style:name="Таблица15.A1" style:family="table-cell">
      <style:table-cell-properties style:vertical-align="middle" fo:padding="0.097cm" fo:border-left="0.5pt solid #000000" fo:border-right="none" fo:border-top="0.5pt solid #000000" fo:border-bottom="0.5pt solid #000000"/>
    </style:style>
    <style:style style:name="Таблица15.B1" style:family="table-cell">
      <style:table-cell-properties style:vertical-align="middle" fo:padding="0.097cm" fo:border="0.5pt solid #000000"/>
    </style:style>
    <style:style style:name="Таблица15.2" style:family="table-row">
      <style:table-row-properties style:min-row-height="1.296cm"/>
    </style:style>
    <style:style style:name="Таблица15.A2" style:family="table-cell">
      <style:table-cell-properties style:vertical-align="middle" fo:padding="0.097cm" fo:border-left="0.5pt solid #000000" fo:border-right="none" fo:border-top="none" fo:border-bottom="0.5pt solid #000000"/>
    </style:style>
    <style:style style:name="Таблица15.B2" style:family="table-cell">
      <style:table-cell-properties style:vertical-align="middle" fo:padding="0.097cm" fo:border-left="0.5pt solid #000000" fo:border-right="0.5pt solid #000000" fo:border-top="none" fo:border-bottom="0.5pt solid #000000"/>
    </style:style>
    <style:style style:name="Таблица16" style:family="table">
      <style:table-properties style:width="17cm" table:align="margins" style:writing-mode="lr-tb"/>
    </style:style>
    <style:style style:name="Таблица16.A" style:family="table-column">
      <style:table-column-properties style:column-width="17cm" style:rel-column-width="65535*"/>
    </style:style>
    <style:style style:name="Таблица16.1" style:family="table-row">
      <style:table-row-properties style:min-row-height="13.203cm"/>
    </style:style>
    <style:style style:name="Таблица16.A1" style:family="table-cell">
      <style:table-cell-properties fo:padding="0.097cm" fo:border="0.05pt solid #000000"/>
    </style:style>
    <style:style style:name="Таблица17" style:family="table">
      <style:table-properties style:width="17cm" table:align="margins" style:writing-mode="lr-tb"/>
    </style:style>
    <style:style style:name="Таблица17.A" style:family="table-column">
      <style:table-column-properties style:column-width="8.5cm" style:rel-column-width="32767*"/>
    </style:style>
    <style:style style:name="Таблица17.B" style:family="table-column">
      <style:table-column-properties style:column-width="8.5cm" style:rel-column-width="32768*"/>
    </style:style>
    <style:style style:name="Таблица17.1" style:family="table-row">
      <style:table-row-properties style:min-row-height="4.101cm"/>
    </style:style>
    <style:style style:name="Таблица17.A1" style:family="table-cell">
      <style:table-cell-properties fo:padding="0.097cm" fo:border="none"/>
    </style:style>
    <style:style style:name="Таблица18" style:family="table">
      <style:table-properties style:width="17cm" table:align="margins" style:writing-mode="lr-tb"/>
    </style:style>
    <style:style style:name="Таблица18.A" style:family="table-column">
      <style:table-column-properties style:column-width="8.5cm" style:rel-column-width="32767*"/>
    </style:style>
    <style:style style:name="Таблица18.B" style:family="table-column">
      <style:table-column-properties style:column-width="8.5cm" style:rel-column-width="32768*"/>
    </style:style>
    <style:style style:name="Таблица18.1" style:family="table-row">
      <style:table-row-properties style:min-row-height="8.308cm"/>
    </style:style>
    <style:style style:name="Таблица18.A1" style:family="table-cell">
      <style:table-cell-properties fo:padding="0.097cm" fo:border="none"/>
    </style:style>
    <style:style style:name="Таблица19" style:family="table">
      <style:table-properties style:width="17cm" table:align="margins" style:writing-mode="lr-tb"/>
    </style:style>
    <style:style style:name="Таблица19.A" style:family="table-column">
      <style:table-column-properties style:column-width="8.498cm" style:rel-column-width="32760*"/>
    </style:style>
    <style:style style:name="Таблица19.B" style:family="table-column">
      <style:table-column-properties style:column-width="8.502cm" style:rel-column-width="32775*"/>
    </style:style>
    <style:style style:name="Таблица19.1" style:family="table-row">
      <style:table-row-properties style:min-row-height="5.794cm"/>
    </style:style>
    <style:style style:name="Таблица19.A1" style:family="table-cell">
      <style:table-cell-properties fo:padding="0.097cm" fo:border="none"/>
    </style:style>
    <style:style style:name="Таблица20" style:family="table">
      <style:table-properties style:width="17cm" table:align="margins" style:writing-mode="lr-tb"/>
    </style:style>
    <style:style style:name="Таблица20.A" style:family="table-column">
      <style:table-column-properties style:column-width="8.498cm" style:rel-column-width="32760*"/>
    </style:style>
    <style:style style:name="Таблица20.B" style:family="table-column">
      <style:table-column-properties style:column-width="8.502cm" style:rel-column-width="32775*"/>
    </style:style>
    <style:style style:name="Таблица20.1" style:family="table-row">
      <style:table-row-properties style:min-row-height="6.588cm"/>
    </style:style>
    <style:style style:name="Таблица20.A1" style:family="table-cell">
      <style:table-cell-properties fo:padding="0.097cm" fo:border="none"/>
    </style:style>
    <style:style style:name="Таблица20.2" style:family="table-row">
      <style:table-row-properties style:min-row-height="0.711cm"/>
    </style:style>
    <style:style style:name="Таблица21" style:family="table">
      <style:table-properties style:width="17cm" table:align="margins" style:writing-mode="lr-tb"/>
    </style:style>
    <style:style style:name="Таблица21.A" style:family="table-column">
      <style:table-column-properties style:column-width="8.498cm" style:rel-column-width="32760*"/>
    </style:style>
    <style:style style:name="Таблица21.B" style:family="table-column">
      <style:table-column-properties style:column-width="8.502cm" style:rel-column-width="32775*"/>
    </style:style>
    <style:style style:name="Таблица21.1" style:family="table-row">
      <style:table-row-properties style:min-row-height="6.006cm"/>
    </style:style>
    <style:style style:name="Таблица21.A1" style:family="table-cell">
      <style:table-cell-properties fo:padding="0.097cm" fo:border="none"/>
    </style:style>
    <style:style style:name="Таблица21.2" style:family="table-row">
      <style:table-row-properties style:min-row-height="0.693cm"/>
    </style:style>
    <style:style style:name="P1"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Times14_5f_РИО2">
      <style:paragraph-properties fo:margin-right="0cm" fo:line-height="150%" fo:text-align="center" style:justify-single-word="false" fo:text-indent="0cm" style:auto-text-indent="false">
        <style:tab-stops/>
      </style:paragraph-properties>
    </style:style>
    <style:style style:name="P5" style:family="paragraph" style:parent-style-name="Standard">
      <style:paragraph-properties style:snap-to-layout-grid="false"/>
      <style:text-properties fo:font-size="14pt" style:font-size-asian="14pt" style:font-size-complex="14pt"/>
    </style:style>
    <style:style style:name="P6" style:family="paragraph" style:parent-style-name="Standard">
      <style:paragraph-properties fo:text-align="center" style:justify-single-word="false"/>
      <style:text-properties fo:color="#000000" loext:opacity="100%" fo:font-size="14pt" officeooo:rsid="00058a87" officeooo:paragraph-rsid="00058a87"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text-properties fo:color="#000000" loext:opacity="100%" fo:font-size="14pt" officeooo:rsid="00301c24" officeooo:paragraph-rsid="00301c24"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0" style:family="paragraph" style:parent-style-name="Standard">
      <style:paragraph-properties fo:line-height="150%" fo:text-align="center" style:justify-single-word="false"/>
      <style:text-properties fo:color="#000000" loext:opacity="100%" fo:font-size="14pt" officeooo:rsid="00058a87" officeooo:paragraph-rsid="00058a87" style:font-size-asian="14pt" style:font-size-complex="14pt" style:font-weight-complex="bold"/>
    </style:style>
    <style:style style:name="P11"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12" style:family="paragraph" style:parent-style-name="Standard">
      <style:text-properties fo:text-transform="uppercase" fo:font-size="14pt" fo:font-weight="bold" style:font-size-asian="14pt" style:font-weight-asian="bold" style:font-size-complex="14pt"/>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start" style:justify-single-word="false"/>
      <style:text-properties fo:font-size="14pt" style:font-size-asian="14pt" style:font-size-complex="14pt"/>
    </style:style>
    <style:style style:name="P15" style:family="paragraph" style:parent-style-name="Standard">
      <style:paragraph-properties fo:line-height="150%" fo:text-align="justify" style:justify-single-word="false"/>
      <style:text-properties fo:color="#000000" loext:opacity="100%" fo:font-size="14pt" officeooo:rsid="0005fe9c" officeooo:paragraph-rsid="0005fe9c" style:font-size-asian="14pt" style:font-size-complex="14pt"/>
    </style:style>
    <style:style style:name="P16" style:family="paragraph" style:parent-style-name="Standard">
      <style:paragraph-properties fo:line-height="150%" fo:text-align="justify" style:justify-single-word="false"/>
      <style:text-properties fo:color="#000000" loext:opacity="100%" fo:font-size="14pt" style:font-size-asian="14pt" style:font-size-complex="14pt"/>
    </style:style>
    <style:style style:name="P17" style:family="paragraph" style:parent-style-name="Standard">
      <style:paragraph-properties fo:line-height="100%" fo:text-align="start" style:justify-single-word="false"/>
      <style:text-properties fo:language="ru" fo:country="RU"/>
    </style:style>
    <style:style style:name="P18" style:family="paragraph" style:parent-style-name="Standard">
      <style:paragraph-properties fo:line-height="150%" fo:text-align="start" style:justify-single-word="false" style:snap-to-layout-grid="false"/>
      <style:text-properties fo:font-size="14pt" fo:language="en" fo:country="US" style:font-size-asian="14pt" style:font-size-complex="14pt"/>
    </style:style>
    <style:style style:name="P19" style:family="paragraph" style:parent-style-name="Standard">
      <style:paragraph-properties fo:line-height="100%" fo:text-align="center" style:justify-single-word="false"/>
      <style:text-properties fo:color="#000000" loext:opacity="100%" fo:font-size="14pt" officeooo:rsid="00058a87" officeooo:paragraph-rsid="00058a87" style:font-size-asian="14pt" style:font-size-complex="14pt"/>
    </style:style>
    <style:style style:name="P20" style:family="paragraph" style:parent-style-name="Standard">
      <style:paragraph-properties fo:line-height="100%" fo:text-align="start" style:justify-single-word="false"/>
      <style:text-properties fo:font-size="14pt" style:font-size-asian="14pt" style:font-size-complex="14pt"/>
    </style:style>
    <style:style style:name="P21" style:family="paragraph" style:parent-style-name="Standard">
      <style:paragraph-properties fo:line-height="150%" fo:text-align="start" style:justify-single-word="false" style:snap-to-layout-grid="false"/>
      <style:text-properties fo:font-size="14pt" style:font-size-asian="14pt" style:font-size-complex="14pt"/>
    </style:style>
    <style:style style:name="P22" style:family="paragraph" style:parent-style-name="Standard">
      <style:paragraph-properties fo:line-height="100%" fo:text-align="center" style:justify-single-word="false"/>
      <style:text-properties fo:color="#000000" loext:opacity="100%" fo:font-size="14pt" officeooo:rsid="00301c24" officeooo:paragraph-rsid="00301c24" style:font-size-asian="14pt" style:font-size-complex="14pt"/>
    </style:style>
    <style:style style:name="P23" style:family="paragraph" style:parent-style-name="Standard">
      <style:paragraph-properties fo:margin-right="0cm" fo:line-height="150%" fo:text-align="justify" style:justify-single-word="false" fo:text-indent="1.251cm" style:auto-text-indent="false"/>
      <style:text-properties fo:color="#ff0000" loext:opacity="100%" fo:font-size="14pt" style:font-size-asian="14pt" style:font-size-complex="14pt"/>
    </style:style>
    <style:style style:name="P24"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25" style:family="paragraph" style:parent-style-name="Standard">
      <style:paragraph-properties fo:margin-right="0cm" fo:line-height="150%" fo:text-align="justify" style:justify-single-word="false" fo:text-indent="1.251cm" style:auto-text-indent="false"/>
      <style:text-properties fo:color="#000000" loext:opacity="100%" fo:font-size="14pt" fo:language="en" fo:country="US" style:font-size-asian="14pt" style:font-size-complex="14pt"/>
    </style:style>
    <style:style style:name="P26" style:family="paragraph" style:parent-style-name="Standard">
      <style:paragraph-properties fo:margin-right="0cm" fo:line-height="150%" fo:text-align="justify" style:justify-single-word="false" fo:hyphenation-ladder-count="no-limit" fo:hyphenation-keep="auto" loext:hyphenation-keep-type="column" fo:text-indent="1.251cm" style:auto-text-indent="false" style:text-autospace="none"/>
      <style:text-properties fo:color="#ff0000" loext:opacity="100%" fo:font-size="14pt" fo:language="en" fo:country="US" style:font-size-asian="14pt" style:font-size-complex="14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28" style:family="paragraph" style:parent-style-name="Standard">
      <style:paragraph-properties fo:line-height="150%" fo:text-align="center" style:justify-single-word="false" style:snap-to-layout-grid="false"/>
      <style:text-properties fo:color="#000000" loext:opacity="100%" fo:font-size="14pt" style:font-size-asian="14pt" style:font-size-complex="14pt" style:font-weight-complex="bold"/>
    </style:style>
    <style:style style:name="P29" style:family="paragraph" style:parent-style-name="Standard">
      <style:paragraph-properties fo:line-height="150%"/>
      <style:text-properties fo:color="#000000" loext:opacity="100%" fo:font-size="14pt" style:font-size-asian="14pt" style:font-size-complex="14pt" style:font-weight-complex="bold"/>
    </style:style>
    <style:style style:name="P30" style:family="paragraph" style:parent-style-name="Standard">
      <style:paragraph-properties fo:line-height="150%" fo:text-align="center" style:justify-single-word="false"/>
      <style:text-properties fo:color="#000000" loext:opacity="100%" fo:font-size="14pt" officeooo:rsid="000b4b8b" officeooo:paragraph-rsid="000b4b8b" style:font-size-asian="14pt" style:font-size-complex="14pt" style:font-weight-complex="bold"/>
    </style:style>
    <style:style style:name="P31" style:family="paragraph" style:parent-style-name="Standard">
      <style:paragraph-properties fo:line-height="150%" fo:text-align="center" style:justify-single-word="false"/>
      <style:text-properties fo:color="#000000" loext:opacity="100%" fo:font-size="14pt" style:font-size-asian="14pt" style:font-size-complex="14pt" style:font-weight-complex="bold"/>
    </style:style>
    <style:style style:name="P32" style:family="paragraph" style:parent-style-name="Standard">
      <style:paragraph-properties fo:line-height="150%" fo:text-align="start" style:justify-single-word="false"/>
      <style:text-properties fo:color="#000000" loext:opacity="100%" fo:font-size="14pt" officeooo:rsid="0009f83a" officeooo:paragraph-rsid="0009f83a" style:font-size-asian="14pt" style:font-size-complex="14pt" style:font-weight-complex="bold"/>
    </style:style>
    <style:style style:name="P33" style:family="paragraph" style:parent-style-name="Standard">
      <style:paragraph-properties fo:line-height="150%" fo:text-align="center" style:justify-single-word="false"/>
      <style:text-properties fo:color="#000000" loext:opacity="100%" fo:font-size="14pt" officeooo:rsid="002e5180" officeooo:paragraph-rsid="002e5180" style:font-size-asian="14pt" style:font-size-complex="14pt" style:font-weight-complex="bold"/>
    </style:style>
    <style:style style:name="P34" style:family="paragraph" style:parent-style-name="Standard">
      <style:paragraph-properties fo:line-height="150%" fo:text-align="center" style:justify-single-word="false"/>
      <style:text-properties fo:color="#000000" loext:opacity="100%" fo:font-size="14pt" officeooo:rsid="002d0d22" officeooo:paragraph-rsid="002d0d22" style:font-size-asian="14pt" style:font-size-complex="14pt" style:font-weight-complex="bold"/>
    </style:style>
    <style:style style:name="P35" style:family="paragraph" style:parent-style-name="Standard">
      <style:paragraph-properties fo:line-height="150%" fo:text-align="start" style:justify-single-word="false"/>
      <style:text-properties fo:color="#000000" loext:opacity="100%" fo:font-size="14pt" officeooo:rsid="0009f83a" officeooo:paragraph-rsid="002d9130" style:font-size-asian="14pt" style:font-size-complex="14pt" style:font-weight-complex="bold"/>
    </style:style>
    <style:style style:name="P36" style:family="paragraph" style:parent-style-name="Standard">
      <style:paragraph-properties fo:line-height="150%" fo:text-align="center" style:justify-single-word="false"/>
      <style:text-properties fo:color="#000000" loext:opacity="100%" fo:font-size="14pt" officeooo:rsid="0009f83a" officeooo:paragraph-rsid="0009f83a" style:font-size-asian="14pt" style:font-size-complex="14pt" style:font-weight-complex="bold"/>
    </style:style>
    <style:style style:name="P37" style:family="paragraph" style:parent-style-name="Standard">
      <style:paragraph-properties fo:line-height="150%" fo:text-align="start" style:justify-single-word="false"/>
      <style:text-properties fo:color="#000000" loext:opacity="100%" fo:font-size="14pt" officeooo:rsid="002d0d22" officeooo:paragraph-rsid="002d9130" style:font-size-asian="14pt" style:font-size-complex="14pt" style:font-weight-complex="bold"/>
    </style:style>
    <style:style style:name="P38" style:family="paragraph" style:parent-style-name="Standard">
      <style:paragraph-properties fo:margin-right="0cm" fo:line-height="150%" fo:text-align="center" style:justify-single-word="false" fo:text-indent="0cm" style:auto-text-indent="false"/>
      <style:text-properties fo:color="#000000" loext:opacity="100%" fo:font-size="14pt" officeooo:rsid="000b4b8b" officeooo:paragraph-rsid="000b4b8b" style:font-size-asian="14pt" style:font-size-complex="14pt" style:font-weight-complex="bold"/>
    </style:style>
    <style:style style:name="P39" style:family="paragraph" style:parent-style-name="Standard">
      <style:paragraph-properties fo:line-height="150%" fo:text-align="start" style:justify-single-word="false" style:snap-to-layout-grid="false"/>
      <style:text-properties fo:color="#000000" loext:opacity="100%" fo:font-size="14pt" officeooo:rsid="000b4b8b" officeooo:paragraph-rsid="000b4b8b" style:font-size-asian="14pt" style:font-size-complex="14pt" style:font-weight-complex="bold"/>
    </style:style>
    <style:style style:name="P40" style:family="paragraph" style:parent-style-name="Standard">
      <style:paragraph-properties fo:margin-right="0cm" fo:line-height="150%" fo:text-align="center" style:justify-single-word="false" fo:text-indent="0cm" style:auto-text-indent="false"/>
      <style:text-properties fo:color="#000000" loext:opacity="100%" fo:font-size="14pt" style:font-size-asian="14pt" style:font-size-complex="14pt" style:font-weight-complex="bold"/>
    </style:style>
    <style:style style:name="P41" style:family="paragraph" style:parent-style-name="Standard">
      <style:paragraph-properties fo:line-height="150%" fo:text-align="start" style:justify-single-word="false" style:snap-to-layout-grid="false"/>
      <style:text-properties fo:color="#000000" loext:opacity="100%" fo:font-size="14pt" officeooo:rsid="0009f83a" officeooo:paragraph-rsid="0009f83a" style:font-size-asian="14pt" style:font-size-complex="14pt" style:font-weight-complex="bold"/>
    </style:style>
    <style:style style:name="P42" style:family="paragraph" style:parent-style-name="Standard">
      <style:paragraph-properties fo:line-height="150%" fo:text-align="center" style:justify-single-word="false"/>
      <style:text-properties fo:color="#000000" loext:opacity="100%" fo:font-size="14pt" fo:language="ru" fo:country="RU" officeooo:rsid="002e5180" officeooo:paragraph-rsid="002e5180" style:font-size-asian="14pt" style:font-size-complex="14pt" style:font-weight-complex="bold"/>
    </style:style>
    <style:style style:name="P43" style:family="paragraph" style:parent-style-name="Standard">
      <style:paragraph-properties fo:margin-right="0cm" fo:line-height="150%" fo:text-align="center" style:justify-single-word="false" fo:text-indent="0cm" style:auto-text-indent="false"/>
      <style:text-properties fo:color="#000000" loext:opacity="100%" fo:font-size="14pt" officeooo:rsid="0009f83a" officeooo:paragraph-rsid="0009f83a" style:font-size-asian="14pt" style:font-size-complex="14pt" style:font-weight-complex="bold"/>
    </style:style>
    <style:style style:name="P44" style:family="paragraph" style:parent-style-name="Standard">
      <style:paragraph-properties fo:line-height="150%" fo:text-align="center" style:justify-single-word="false"/>
      <style:text-properties fo:color="#000000" loext:opacity="100%" fo:font-size="14pt" fo:language="en" fo:country="US" officeooo:rsid="003c4fd2" officeooo:paragraph-rsid="003c4fd2" style:font-size-asian="14pt" style:font-size-complex="14pt" style:font-weight-complex="bold"/>
    </style:style>
    <style:style style:name="P45" style:family="paragraph" style:parent-style-name="Standard">
      <style:paragraph-properties fo:line-height="150%" fo:text-align="center" style:justify-single-word="false"/>
      <style:text-properties fo:color="#000000" loext:opacity="100%" fo:font-size="14pt" officeooo:rsid="003c4fd2" officeooo:paragraph-rsid="003c4fd2" style:font-size-asian="14pt" style:font-size-complex="14pt" style:font-weight-complex="bold"/>
    </style:style>
    <style:style style:name="P46" style:family="paragraph" style:parent-style-name="Standard">
      <style:paragraph-properties fo:line-height="150%" style:snap-to-layout-grid="false"/>
      <style:text-properties fo:color="#000000" loext:opacity="100%" fo:font-size="14pt" officeooo:rsid="000b4b8b" officeooo:paragraph-rsid="000b4b8b" style:font-size-asian="14pt" style:font-size-complex="14pt" style:font-weight-complex="bold"/>
    </style:style>
    <style:style style:name="P47" style:family="paragraph" style:parent-style-name="Standard">
      <style:paragraph-properties fo:line-height="150%" fo:text-align="center" style:justify-single-word="false" style:snap-to-layout-grid="false"/>
      <style:text-properties fo:color="#000000" loext:opacity="100%" fo:font-size="14pt" fo:language="en" fo:country="US" style:font-size-asian="14pt" style:font-size-complex="14pt" style:font-weight-complex="bold"/>
    </style:style>
    <style:style style:name="P48" style:family="paragraph" style:parent-style-name="Standard">
      <style:paragraph-properties fo:line-height="150%"/>
      <style:text-properties fo:color="#000000" loext:opacity="100%" fo:font-size="14pt" officeooo:rsid="003bfd0e" officeooo:paragraph-rsid="003bfd0e" style:font-size-asian="14pt" style:font-size-complex="14pt" style:font-weight-complex="bold"/>
    </style:style>
    <style:style style:name="P49" style:family="paragraph" style:parent-style-name="Standard">
      <style:paragraph-properties fo:line-height="150%" fo:text-align="center" style:justify-single-word="false"/>
      <style:text-properties fo:color="#000000" loext:opacity="100%" fo:font-size="14pt" fo:language="en" fo:country="US" officeooo:rsid="00426425" officeooo:paragraph-rsid="00426425" style:font-size-asian="14pt" style:font-size-complex="14pt" style:font-weight-complex="bold"/>
    </style:style>
    <style:style style:name="P50" style:family="paragraph" style:parent-style-name="Standard">
      <style:paragraph-properties fo:margin-right="0cm" fo:line-height="150%" fo:text-align="justify" style:justify-single-word="false" fo:text-indent="0cm" style:auto-text-indent="false"/>
      <style:text-properties fo:color="#000000" loext:opacity="100%" fo:font-size="14pt" officeooo:rsid="000b4c66" officeooo:paragraph-rsid="000b4c66" style:font-size-asian="14pt" style:font-size-complex="14pt"/>
    </style:style>
    <style:style style:name="P51" style:family="paragraph" style:parent-style-name="Standard">
      <style:paragraph-properties fo:margin-right="0cm" fo:line-height="150%" fo:text-align="justify" style:justify-single-word="false" fo:text-indent="0cm" style:auto-text-indent="false"/>
      <style:text-properties officeooo:paragraph-rsid="000b4c66"/>
    </style:style>
    <style:style style:name="P52" style:family="paragraph" style:parent-style-name="Standard">
      <style:paragraph-properties fo:margin-right="0cm" fo:line-height="150%" fo:text-align="justify" style:justify-single-word="false" fo:text-indent="0cm" style:auto-text-indent="false"/>
      <style:text-properties fo:color="#000000" loext:opacity="100%" style:font-name="Times New Roman1" fo:font-size="14pt" officeooo:rsid="000b4c66" officeooo:paragraph-rsid="000b4c66" style:font-size-asian="14pt" style:font-size-complex="14pt"/>
    </style:style>
    <style:style style:name="P53" style:family="paragraph" style:parent-style-name="Standard" style:list-style-name="L1">
      <style:paragraph-properties fo:line-height="150%" fo:text-align="justify" style:justify-single-word="false"/>
      <style:text-properties fo:color="#000000" loext:opacity="100%" style:font-name="Times New Roman1" fo:font-size="14pt" officeooo:rsid="000b4c66" officeooo:paragraph-rsid="000b4c66" style:font-size-asian="14pt" style:font-size-complex="14pt"/>
    </style:style>
    <style:style style:name="P54" style:family="paragraph" style:parent-style-name="Standard" style:list-style-name="L1">
      <style:paragraph-properties fo:line-height="150%" fo:text-align="justify" style:justify-single-word="false"/>
      <style:text-properties fo:color="#000000" loext:opacity="100%" style:font-name="Times New Roman1" fo:font-size="14pt" officeooo:rsid="000b5ec4" officeooo:paragraph-rsid="000b5ec4" style:font-size-asian="14pt" style:font-size-complex="14pt"/>
    </style:style>
    <style:style style:name="P55" style:family="paragraph" style:parent-style-name="Standard">
      <style:paragraph-properties fo:line-height="150%" fo:text-align="center" style:justify-single-word="false" fo:break-before="page"/>
      <style:text-properties officeooo:paragraph-rsid="002d9130"/>
    </style:style>
    <style:style style:name="P56" style:family="paragraph" style:parent-style-name="Standard">
      <style:paragraph-properties fo:line-height="150%" fo:text-align="center" style:justify-single-word="false"/>
      <style:text-properties officeooo:paragraph-rsid="002d9130"/>
    </style:style>
    <style:style style:name="P57" style:family="paragraph" style:parent-style-name="Standard">
      <style:paragraph-properties fo:margin-right="0cm" fo:line-height="150%" fo:text-indent="1.251cm" style:auto-text-indent="false"/>
      <style:text-properties officeooo:rsid="002d9130" officeooo:paragraph-rsid="002d9130"/>
    </style:style>
    <style:style style:name="P58" style:family="paragraph" style:parent-style-name="Standard">
      <style:paragraph-properties fo:margin-right="0cm" fo:line-height="150%" fo:text-align="justify" style:justify-single-word="false" fo:text-indent="1.251cm" style:auto-text-indent="false"/>
      <style:text-properties fo:color="#000000" loext:opacity="100%" fo:font-size="14pt" fo:font-weight="normal" officeooo:rsid="000b8b91" officeooo:paragraph-rsid="000ef405" style:font-size-asian="14pt" style:font-weight-asian="normal" style:font-size-complex="14pt" style:font-weight-complex="normal"/>
    </style:style>
    <style:style style:name="P59" style:family="paragraph" style:parent-style-name="Standard">
      <style:paragraph-properties fo:margin-right="0cm" fo:line-height="150%" fo:text-align="justify" style:justify-single-word="false" fo:text-indent="0cm" style:auto-text-indent="false"/>
      <style:text-properties fo:font-weight="normal" officeooo:paragraph-rsid="000ef405"/>
    </style:style>
    <style:style style:name="P60" style:family="paragraph" style:parent-style-name="Standard">
      <style:paragraph-properties fo:margin-right="0cm" fo:line-height="150%" fo:text-align="justify" style:justify-single-word="false" fo:text-indent="1.251cm" style:auto-text-indent="false"/>
      <style:text-properties fo:font-weight="normal" officeooo:paragraph-rsid="000ef405"/>
    </style:style>
    <style:style style:name="P61" style:family="paragraph" style:parent-style-name="Standard">
      <style:paragraph-properties fo:margin-right="0cm" fo:line-height="150%" fo:text-align="justify" style:justify-single-word="false" fo:text-indent="1.251cm" style:auto-text-indent="false"/>
      <style:text-properties fo:font-weight="normal" officeooo:rsid="000e3ead" officeooo:paragraph-rsid="00108d1d"/>
    </style:style>
    <style:style style:name="P62" style:family="paragraph" style:parent-style-name="Standard">
      <style:paragraph-properties fo:margin-right="0cm" fo:line-height="150%" fo:text-indent="0cm" style:auto-text-indent="false"/>
      <style:text-properties fo:font-weight="normal" officeooo:paragraph-rsid="000ef405"/>
    </style:style>
    <style:style style:name="P63" style:family="paragraph" style:parent-style-name="Standard">
      <style:paragraph-properties fo:margin-right="0cm" fo:line-height="150%" fo:text-align="justify" style:justify-single-word="false" fo:text-indent="0cm" style:auto-text-indent="false"/>
      <style:text-properties fo:font-weight="normal" officeooo:rsid="002d9130" officeooo:paragraph-rsid="002d9130"/>
    </style:style>
    <style:style style:name="P64" style:family="paragraph" style:parent-style-name="Standard">
      <style:paragraph-properties fo:margin-right="0cm" fo:line-height="150%" fo:text-align="justify" style:justify-single-word="false" fo:text-indent="0cm" style:auto-text-indent="false"/>
      <style:text-properties fo:color="#000000" loext:opacity="100%" style:font-name="Times New Roman1" fo:font-size="14pt" fo:language="ru" fo:country="RU" fo:font-weight="normal" officeooo:rsid="002d9130" officeooo:paragraph-rsid="002d9130" fo:background-color="#ffffff" style:font-size-asian="14pt" style:font-weight-asian="normal" style:font-size-complex="14pt" style:font-weight-complex="normal"/>
    </style:style>
    <style:style style:name="P65" style:family="paragraph" style:parent-style-name="Standard">
      <style:paragraph-properties fo:margin-right="0cm" fo:line-height="150%" fo:text-indent="0cm" style:auto-text-indent="false"/>
      <style:text-properties fo:color="#000000" loext:opacity="100%" style:font-name="Times New Roman1" fo:font-size="14pt" fo:language="ru" fo:country="RU" fo:font-weight="normal" officeooo:rsid="000ef405" officeooo:paragraph-rsid="000ef405" fo:background-color="#ffffff" style:font-size-asian="14pt" style:font-weight-asian="normal" style:font-size-complex="14pt" style:font-weight-complex="normal"/>
    </style:style>
    <style:style style:name="P66" style:family="paragraph" style:parent-style-name="Standard">
      <style:paragraph-properties fo:margin-right="0cm" fo:line-height="150%" fo:text-indent="1.251cm" style:auto-text-indent="false"/>
      <style:text-properties officeooo:paragraph-rsid="00108d1d"/>
    </style:style>
    <style:style style:name="P67" style:family="paragraph" style:parent-style-name="Standard">
      <style:paragraph-properties fo:margin-right="0cm" fo:line-height="150%" fo:text-align="justify" style:justify-single-word="false" fo:text-indent="1.251cm" style:auto-text-indent="false"/>
      <style:text-properties fo:font-weight="normal" officeooo:rsid="0011ed28" officeooo:paragraph-rsid="0011ed28" style:font-weight-asian="normal" style:font-weight-complex="normal"/>
    </style:style>
    <style:style style:name="P68" style:family="paragraph" style:parent-style-name="Standard">
      <style:paragraph-properties fo:margin-right="0cm" fo:line-height="150%" fo:text-align="justify" style:justify-single-word="false" fo:text-indent="1.251cm" style:auto-text-indent="false"/>
      <style:text-properties fo:color="#000000" loext:opacity="100%" style:font-name="Times New Roman1" fo:font-size="14pt" fo:language="ru" fo:country="RU" fo:font-weight="normal" officeooo:rsid="00120195" officeooo:paragraph-rsid="00120195" fo:background-color="#ffffff" style:font-size-asian="14pt" style:font-weight-asian="normal" style:font-size-complex="14pt" style:font-weight-complex="normal"/>
    </style:style>
    <style:style style:name="P69" style:family="paragraph" style:parent-style-name="Standard" style:list-style-name="L2">
      <style:paragraph-properties fo:line-height="150%" fo:text-align="justify" style:justify-single-word="false"/>
      <style:text-properties fo:color="#000000" loext:opacity="100%" style:font-name="Times New Roman1" fo:font-size="14pt" officeooo:paragraph-rsid="00139466" style:font-size-asian="14pt" style:font-size-complex="14pt"/>
    </style:style>
    <style:style style:name="P70" style:family="paragraph" style:parent-style-name="Standard" style:list-style-name="L2">
      <style:paragraph-properties fo:line-height="150%" fo:text-align="justify" style:justify-single-word="false"/>
      <style:text-properties officeooo:paragraph-rsid="00120195"/>
    </style:style>
    <style:style style:name="P71" style:family="paragraph" style:parent-style-name="Standard" style:list-style-name="L2">
      <style:paragraph-properties fo:line-height="150%" fo:text-align="justify" style:justify-single-word="false"/>
      <style:text-properties officeooo:paragraph-rsid="0014c2ef"/>
    </style:style>
    <style:style style:name="P72" style:family="paragraph" style:parent-style-name="Standard" style:list-style-name="L2">
      <style:paragraph-properties fo:line-height="150%" fo:text-align="justify" style:justify-single-word="false"/>
      <style:text-properties officeooo:paragraph-rsid="00170e60"/>
    </style:style>
    <style:style style:name="P73" style:family="paragraph" style:parent-style-name="Standard" style:list-style-name="L2">
      <style:paragraph-properties fo:line-height="150%" fo:text-align="justify" style:justify-single-word="false"/>
      <style:text-properties fo:color="#000000" loext:opacity="100%" style:font-name="Times New Roman1" fo:font-size="14pt" fo:language="ru" fo:country="RU" fo:font-weight="normal" officeooo:rsid="001643aa" officeooo:paragraph-rsid="00170e60" fo:background-color="#ffffff" style:font-size-asian="14pt" style:font-weight-asian="normal" style:font-size-complex="14pt" style:font-weight-complex="normal"/>
    </style:style>
    <style:style style:name="P74" style:family="paragraph" style:parent-style-name="Standard">
      <style:paragraph-properties fo:line-height="150%" fo:text-align="justify" style:justify-single-word="false"/>
      <style:text-properties officeooo:rsid="00170e60" officeooo:paragraph-rsid="00170e60"/>
    </style:style>
    <style:style style:name="P75" style:family="paragraph" style:parent-style-name="Standard">
      <style:paragraph-properties fo:line-height="150%"/>
      <style:text-properties officeooo:paragraph-rsid="0014c2ef"/>
    </style:style>
    <style:style style:name="P76" style:family="paragraph" style:parent-style-name="Standard">
      <style:paragraph-properties fo:line-height="150%"/>
      <style:text-properties fo:font-weight="bold" officeooo:rsid="00190b76" officeooo:paragraph-rsid="00190b76" style:font-weight-asian="bold" style:font-weight-complex="bold"/>
    </style:style>
    <style:style style:name="P77" style:family="paragraph" style:parent-style-name="Standard">
      <style:paragraph-properties fo:line-height="150%" fo:text-align="justify" style:justify-single-word="false"/>
      <style:text-properties officeooo:rsid="00190b76" officeooo:paragraph-rsid="00190b76"/>
    </style:style>
    <style:style style:name="P78"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190b76" officeooo:paragraph-rsid="00190b76" style:text-blinking="false" fo:background-color="transparent" style:font-size-asian="14pt" style:font-weight-asian="bold" style:font-size-complex="14pt" style:font-weight-complex="bold"/>
    </style:style>
    <style:style style:name="P79"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190b76" officeooo:paragraph-rsid="001c52fc" style:text-blinking="false" fo:background-color="transparent" style:font-size-asian="14pt" style:font-weight-asian="bold" style:font-size-complex="14pt" style:font-weight-complex="bold"/>
    </style:style>
    <style:style style:name="P80"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1f199e" officeooo:paragraph-rsid="001f199e" style:text-blinking="false" fo:background-color="transparent"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1f199e" officeooo:paragraph-rsid="0024590e" style:text-blinking="false" fo:background-color="transparent"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1f199e" officeooo:paragraph-rsid="0025a617" style:text-blinking="false" fo:background-color="transparent" style:font-size-asian="14pt" style:font-weight-asian="bold" style:font-size-complex="14pt" style:font-weight-complex="bold"/>
    </style:style>
    <style:style style:name="P83"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25a617" officeooo:paragraph-rsid="003c4fd2" style:text-blinking="false" fo:background-color="transparent" style:font-size-asian="14pt" style:font-weight-asian="normal" style:font-size-complex="14pt" style:font-weight-complex="normal"/>
    </style:style>
    <style:style style:name="P84"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29082e" officeooo:paragraph-rsid="002af4e3" style:text-blinking="false" fo:background-color="transparent" style:font-size-asian="14pt" style:font-weight-asian="bold" style:font-size-complex="14pt" style:font-weight-complex="bold"/>
    </style:style>
    <style:style style:name="P85"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29082e" officeooo:paragraph-rsid="0029082e" style:text-blinking="false" fo:background-color="transparent" style:font-size-asian="14pt" style:font-weight-asian="bold" style:font-size-complex="14pt" style:font-weight-complex="bold"/>
    </style:style>
    <style:style style:name="P86"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2b488c" officeooo:paragraph-rsid="002b488c" style:text-blinking="false" fo:background-color="transparent" style:font-size-asian="14pt" style:font-weight-asian="bold" style:font-size-complex="14pt" style:font-weight-complex="bold"/>
    </style:style>
    <style:style style:name="P87"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2b488c" officeooo:paragraph-rsid="003c4fd2" style:text-blinking="false" fo:background-color="transparent" style:font-size-asian="14pt" style:font-weight-asian="bold" style:font-size-complex="14pt" style:font-weight-complex="bold"/>
    </style:style>
    <style:style style:name="P88"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2d0d22" officeooo:paragraph-rsid="002d0d22" style:text-blinking="false" fo:background-color="transparent" style:font-size-asian="14pt" style:font-weight-asian="normal" style:font-size-complex="14pt" style:font-weight-complex="normal"/>
    </style:style>
    <style:style style:name="P89" style:family="paragraph" style:parent-style-name="Standard">
      <style:paragraph-properties fo:line-height="150%" fo:text-align="center" style:justify-single-word="false" fo:break-before="page"/>
      <style:text-properties officeooo:paragraph-rsid="000e3ead"/>
    </style:style>
    <style:style style:name="P90" style:family="paragraph" style:parent-style-name="Standard">
      <style:paragraph-properties fo:margin-right="0cm" fo:line-height="150%" fo:text-align="center" style:justify-single-word="false" fo:text-indent="0cm" style:auto-text-indent="false"/>
      <style:text-properties fo:text-transform="uppercase" fo:font-size="14pt" fo:font-weight="bold" officeooo:rsid="00301c24" officeooo:paragraph-rsid="00301c24" style:font-size-asian="14pt" style:font-weight-asian="bold" style:font-size-complex="14pt"/>
    </style:style>
    <style:style style:name="P91" style:family="paragraph" style:parent-style-name="Standard">
      <style:paragraph-properties fo:margin-right="0cm" fo:line-height="150%" fo:text-align="center" style:justify-single-word="false" fo:text-indent="0cm" style:auto-text-indent="false"/>
      <style:text-properties officeooo:rsid="003154d7" officeooo:paragraph-rsid="003154d7"/>
    </style:style>
    <style:style style:name="P92" style:family="paragraph" style:parent-style-name="Standard">
      <style:paragraph-properties fo:line-height="150%"/>
      <style:text-properties fo:font-size="14pt" fo:font-weight="bold" officeooo:paragraph-rsid="003154d7" style:font-size-asian="14pt" style:font-weight-asian="bold" style:font-size-complex="14pt" style:font-weight-complex="bold"/>
    </style:style>
    <style:style style:name="P93" style:family="paragraph" style:parent-style-name="Standard">
      <style:paragraph-properties fo:line-height="150%"/>
      <style:text-properties fo:font-size="14pt" fo:language="ru" fo:country="RU" fo:font-weight="normal" officeooo:rsid="003154d7" officeooo:paragraph-rsid="003154d7" style:font-size-asian="14pt" style:font-weight-asian="normal" style:font-size-complex="14pt" style:font-weight-complex="normal"/>
    </style:style>
    <style:style style:name="P94" style:family="paragraph" style:parent-style-name="Standard">
      <style:paragraph-properties fo:line-height="150%"/>
      <style:text-properties fo:font-size="14pt" fo:language="ru" fo:country="RU" fo:font-style="normal" fo:font-weight="normal" officeooo:rsid="004e5889" officeooo:paragraph-rsid="0037480c" style:font-size-asian="14pt" style:font-style-asian="normal" style:font-weight-asian="normal" style:font-size-complex="14pt" style:font-style-complex="normal" style:font-weight-complex="normal"/>
    </style:style>
    <style:style style:name="P95" style:family="paragraph" style:parent-style-name="Table_20_Contents">
      <style:text-properties fo:font-size="14pt" officeooo:rsid="003154d7" officeooo:paragraph-rsid="003154d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text-properties style:font-name="Courier New2" fo:font-size="14pt" officeooo:rsid="003154d7" officeooo:paragraph-rsid="003154d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text-properties fo:font-size="14pt" fo:language="ru" fo:country="RU" officeooo:rsid="003154d7" officeooo:paragraph-rsid="003154d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text-properties fo:font-size="14pt" fo:font-style="normal" officeooo:rsid="004e5889" officeooo:paragraph-rsid="0037480c" style:font-size-asian="12.25pt" style:font-style-asian="normal" style:font-size-complex="14pt" style:font-style-complex="normal"/>
    </style:style>
    <style:style style:name="P99" style:family="paragraph" style:parent-style-name="Table_20_Contents">
      <style:text-properties fo:font-size="14pt" officeooo:rsid="003154d7" officeooo:paragraph-rsid="003340e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text-properties style:font-name="Courier New2" fo:font-size="14pt" officeooo:rsid="003154d7" officeooo:paragraph-rsid="003340e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text-properties fo:font-size="14pt" fo:language="ru" fo:country="RU" officeooo:rsid="003154d7" officeooo:paragraph-rsid="003340e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text-properties officeooo:paragraph-rsid="003340ea"/>
    </style:style>
    <style:style style:name="P103" style:family="paragraph" style:parent-style-name="Standard">
      <style:text-properties fo:font-size="14pt" officeooo:rsid="00324e98" officeooo:paragraph-rsid="0038d40f" style:font-size-asian="12.25pt" style:font-size-complex="14pt"/>
    </style:style>
    <style:style style:name="P104" style:family="paragraph" style:parent-style-name="Standard">
      <style:text-properties fo:font-size="14pt" fo:font-style="normal" officeooo:rsid="00324e98" officeooo:paragraph-rsid="0038d40f" style:font-size-asian="12.25pt" style:font-style-asian="normal" style:font-size-complex="14pt" style:font-style-complex="normal"/>
    </style:style>
    <style:style style:name="P105" style:family="paragraph" style:parent-style-name="Table_20_Contents">
      <style:text-properties fo:font-size="14pt" officeooo:rsid="003154d7" officeooo:paragraph-rsid="00324e9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text-properties style:font-name="Courier New2" fo:font-size="14pt" officeooo:rsid="003154d7" officeooo:paragraph-rsid="00324e9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text-properties style:font-name="Courier New2" fo:font-size="14pt" fo:language="ru" fo:country="RU" officeooo:rsid="003154d7" officeooo:paragraph-rsid="00324e9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font-size="14pt" officeooo:rsid="003154d7" officeooo:paragraph-rsid="0038d40f" style:font-size-asian="14pt" style:font-size-complex="14pt"/>
    </style:style>
    <style:style style:name="P109" style:family="paragraph" style:parent-style-name="Table_20_Contents">
      <style:paragraph-properties fo:text-align="start" style:justify-single-word="false"/>
      <style:text-properties fo:font-size="14pt" fo:font-style="normal" officeooo:rsid="0038d40f" officeooo:paragraph-rsid="004f7bbd" style:font-size-asian="14pt" style:font-style-asian="normal" style:font-size-complex="14pt" style:font-style-complex="normal"/>
    </style:style>
    <style:style style:name="P110" style:family="paragraph" style:parent-style-name="Table_20_Contents">
      <style:text-properties fo:font-size="14pt" officeooo:rsid="003154d7" officeooo:paragraph-rsid="0034126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text-properties style:font-name="Courier New2" fo:font-size="14pt" officeooo:rsid="003154d7" officeooo:paragraph-rsid="0034126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text-properties style:font-name="Courier New2" fo:font-size="14pt" fo:language="ru" fo:country="RU" officeooo:rsid="003154d7" officeooo:paragraph-rsid="0034126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7480c" officeooo:paragraph-rsid="0034126c" style:text-blinking="false"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7480c" officeooo:paragraph-rsid="0037480c" style:text-blinking="false"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italic" style:text-underline-style="none" fo:font-weight="normal" officeooo:rsid="0039a2b4" officeooo:paragraph-rsid="004f7bbd" style:text-blinking="false" fo:background-color="transparent" style:font-size-asian="14pt" style:font-style-asian="italic" style:font-weight-asian="normal" style:font-size-complex="14pt" style:font-style-complex="italic" style:font-weight-complex="normal"/>
    </style:style>
    <style:style style:name="P116" style:family="paragraph" style:parent-style-name="Table_20_Contents">
      <style:text-properties fo:font-size="14pt" officeooo:rsid="003154d7" officeooo:paragraph-rsid="0037480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text-properties style:font-name="Courier New2" fo:font-size="14pt" officeooo:rsid="003154d7" officeooo:paragraph-rsid="0037480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text-properties style:font-name="Courier New2" fo:font-size="14pt" fo:language="ru" fo:country="RU" officeooo:rsid="003154d7" officeooo:paragraph-rsid="0037480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9a2b4" officeooo:paragraph-rsid="004f7bbd" style:text-blinking="false" fo:background-color="transparent" style:font-size-asian="14pt" style:font-style-asian="normal" style:font-weight-asian="normal" style:font-size-complex="14pt" style:font-style-complex="normal" style:font-weight-complex="normal"/>
    </style:style>
    <style:style style:name="P120" style:family="paragraph" style:parent-style-name="Table_20_Contents">
      <style:text-properties fo:font-size="14pt" officeooo:rsid="003154d7" officeooo:paragraph-rsid="0039a2b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text-properties style:font-name="Courier New2" fo:font-size="14pt" officeooo:rsid="003154d7" officeooo:paragraph-rsid="0039a2b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text-properties style:font-name="Courier New2" fo:font-size="14pt" fo:language="ru" fo:country="RU" officeooo:rsid="003154d7" officeooo:paragraph-rsid="0039a2b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7480c" officeooo:paragraph-rsid="0039a2b4" style:text-blinking="false"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9a2b4" officeooo:paragraph-rsid="0039a2b4" style:text-blinking="false"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officeooo:rsid="003b69ff" officeooo:paragraph-rsid="0039a2b4" style:text-blinking="false" fo:background-color="transparent" style:font-size-asian="14pt" style:font-weight-asian="bold" style:font-size-complex="14pt" style:font-weight-complex="bold"/>
    </style:style>
    <style:style style:name="P126"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9a2b4" officeooo:paragraph-rsid="003b69ff" style:text-blinking="false" fo:background-color="transparent" style:font-size-asian="14pt" style:font-style-asian="normal" style:font-weight-asian="normal" style:font-size-complex="14pt" style:font-style-complex="normal" style:font-weight-complex="normal"/>
    </style:style>
    <style:style style:name="P127" style:family="paragraph" style:parent-style-name="Table_20_Contents">
      <style:text-properties fo:font-size="14pt" officeooo:rsid="003154d7" officeooo:paragraph-rsid="003b69f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text-properties style:font-name="Courier New2" fo:font-size="14pt" officeooo:rsid="003154d7" officeooo:paragraph-rsid="003b69f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text-properties style:font-name="Courier New2" fo:font-size="14pt" fo:language="ru" fo:country="RU" officeooo:rsid="003154d7" officeooo:paragraph-rsid="003b69f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italic" style:text-underline-style="none" fo:font-weight="normal" officeooo:rsid="0039a2b4" officeooo:paragraph-rsid="003b69ff" style:text-blinking="false" fo:background-color="transparent" style:font-size-asian="14pt" style:font-style-asian="italic" style:font-weight-asian="normal" style:font-size-complex="14pt" style:font-style-complex="italic" style:font-weight-complex="normal"/>
    </style:style>
    <style:style style:name="P131"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9a2b4" officeooo:paragraph-rsid="003bfd0e" style:text-blinking="false" fo:background-color="transparent" style:font-size-asian="14pt" style:font-style-asian="normal" style:font-weight-asian="normal" style:font-size-complex="14pt" style:font-style-complex="normal" style:font-weight-complex="normal"/>
    </style:style>
    <style:style style:name="P132" style:family="paragraph" style:parent-style-name="Table_20_Contents">
      <style:text-properties fo:font-size="14pt" officeooo:rsid="003154d7" officeooo:paragraph-rsid="003bfd0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text-properties style:font-name="Courier New2" fo:font-size="14pt" officeooo:rsid="003154d7" officeooo:paragraph-rsid="003bfd0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text-properties style:font-name="Courier New2" fo:font-size="14pt" officeooo:paragraph-rsid="003bfd0e" style:font-size-asian="14pt" style:font-size-complex="14pt"/>
    </style:style>
    <style:style style:name="P135"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7480c" officeooo:paragraph-rsid="003bfd0e" style:text-blinking="false" fo:background-color="transparent" style:font-size-asian="14pt" style:font-weight-asian="normal" style:font-size-complex="14pt" style:font-weight-complex="normal"/>
    </style:style>
    <style:style style:name="P136" style:family="paragraph" style:parent-style-name="Standard">
      <style:paragraph-properties fo:line-height="150%"/>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39a2b4" officeooo:paragraph-rsid="004e5889" style:text-blinking="false"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138" style:family="paragraph" style:parent-style-name="Standard">
      <style:paragraph-properties fo:margin-right="0cm" fo:line-height="150%" fo:text-align="justify" style:justify-single-word="false" fo:text-indent="0cm" style:auto-text-indent="false"/>
    </style:style>
    <style:style style:name="P139" style:family="paragraph" style:parent-style-name="Standard">
      <style:paragraph-properties fo:margin-right="0cm" fo:line-height="150%" fo:text-align="justify" style:justify-single-word="false" fo:text-indent="1.251cm" style:auto-text-indent="false"/>
      <style:text-properties fo:color="#000000" loext:opacity="100%" style:font-name="Times New Roman1" fo:font-size="14pt" officeooo:paragraph-rsid="003d8a2c" style:font-size-asian="14pt" style:font-size-complex="14pt"/>
    </style:style>
    <style:style style:name="P140" style:family="paragraph" style:parent-style-name="Standard">
      <style:paragraph-properties fo:margin-right="0cm" fo:line-height="150%" fo:text-align="justify" style:justify-single-word="false" fo:text-indent="1.251cm" style:auto-text-indent="false"/>
      <style:text-properties officeooo:paragraph-rsid="003d8a2c"/>
    </style:style>
    <style:style style:name="P141" style:family="paragraph" style:parent-style-name="Standard">
      <style:paragraph-properties fo:margin-right="0cm" fo:line-height="150%" fo:text-align="justify" style:justify-single-word="false" fo:text-indent="1.251cm" style:auto-text-indent="false"/>
      <style:text-properties officeooo:paragraph-rsid="00471338"/>
    </style:style>
    <style:style style:name="P142" style:family="paragraph" style:parent-style-name="Standard">
      <style:text-properties fo:color="#ff0000" loext:opacity="100%" style:font-name="Times New Roman1" fo:font-size="14pt" fo:letter-spacing="-0.004cm" fo:font-weight="normal" style:font-size-asian="14pt" style:font-weight-asian="normal" style:font-size-complex="14pt" style:font-weight-complex="normal"/>
    </style:style>
    <style:style style:name="P143" style:family="paragraph" style:parent-style-name="Standard">
      <style:paragraph-properties fo:line-height="150%" fo:text-align="center" style:justify-single-word="false"/>
      <style:text-properties fo:text-transform="uppercase" fo:font-size="14pt" fo:font-weight="bold" officeooo:rsid="003d8a2c" officeooo:paragraph-rsid="003d8a2c" style:font-size-asian="14pt" style:font-weight-asian="bold" style:font-size-complex="14pt"/>
    </style:style>
    <style:style style:name="P144" style:family="paragraph" style:parent-style-name="Standard">
      <style:paragraph-properties fo:line-height="150%" fo:text-align="center" style:justify-single-word="false"/>
      <style:text-properties fo:font-size="14pt" officeooo:rsid="003d8a2c" officeooo:paragraph-rsid="003d8a2c" style:font-size-asian="14pt" style:font-size-complex="14pt"/>
    </style:style>
    <style:style style:name="P145" style:family="paragraph" style:parent-style-name="Standard">
      <style:paragraph-properties fo:line-height="150%" fo:text-align="start" style:justify-single-word="false"/>
      <style:text-properties fo:font-size="14pt" officeooo:rsid="004e5889" officeooo:paragraph-rsid="004918bf" style:font-size-asian="14pt" style:font-size-complex="14pt"/>
    </style:style>
    <style:style style:name="P146" style:family="paragraph" style:parent-style-name="Table_20_Contents">
      <style:text-properties style:font-name="Courier New2" fo:font-size="14pt" style:font-size-asian="14pt" style:font-size-complex="14pt"/>
    </style:style>
    <style:style style:name="P147" style:family="paragraph" style:parent-style-name="Table_20_Contents">
      <style:paragraph-properties fo:text-align="center" style:justify-single-word="false"/>
      <style:text-properties fo:font-size="14pt" fo:language="ru" fo:country="RU" officeooo:rsid="0047ec89" officeooo:paragraph-rsid="0047ec89" style:font-size-asian="14pt" style:font-size-complex="14pt"/>
    </style:style>
    <style:style style:name="P148" style:family="paragraph" style:parent-style-name="Standard">
      <style:text-properties officeooo:paragraph-rsid="0047ec89"/>
    </style:style>
    <style:style style:name="P149" style:family="paragraph" style:parent-style-name="Table_20_Contents">
      <style:text-properties officeooo:paragraph-rsid="004066e8"/>
    </style:style>
    <style:style style:name="P150" style:family="paragraph" style:parent-style-name="Table_20_Contents">
      <style:paragraph-properties fo:text-align="center" style:justify-single-word="false"/>
      <style:text-properties fo:font-size="14pt" officeooo:rsid="003e6b87" officeooo:paragraph-rsid="004066e8" style:font-size-asian="14pt" style:font-size-complex="14pt"/>
    </style:style>
    <style:style style:name="P151" style:family="paragraph" style:parent-style-name="Table_20_Contents">
      <style:paragraph-properties fo:text-align="center" style:justify-single-word="false"/>
      <style:text-properties fo:font-size="14pt" officeooo:rsid="003e6b87" officeooo:paragraph-rsid="0047ec89" style:font-size-asian="14pt" style:font-size-complex="14pt"/>
    </style:style>
    <style:style style:name="P152" style:family="paragraph" style:parent-style-name="Standard">
      <style:text-properties fo:font-size="14pt" officeooo:rsid="003e6b87" officeooo:paragraph-rsid="004066e8" style:font-size-asian="12.25pt" style:font-size-complex="14pt"/>
    </style:style>
    <style:style style:name="P153" style:family="paragraph" style:parent-style-name="Table_20_Contents">
      <style:paragraph-properties fo:text-align="center" style:justify-single-word="false"/>
      <style:text-properties fo:font-size="14pt" officeooo:rsid="003e6b87" officeooo:paragraph-rsid="004e5889" style:font-size-asian="14pt" style:font-size-complex="14pt"/>
    </style:style>
    <style:style style:name="P154" style:family="paragraph" style:parent-style-name="Table_20_Contents">
      <style:text-properties officeooo:paragraph-rsid="00457189"/>
    </style:style>
    <style:style style:name="P155" style:family="paragraph" style:parent-style-name="Standard">
      <style:text-properties fo:font-size="14pt" officeooo:rsid="003e6b87" officeooo:paragraph-rsid="00457189" style:font-size-asian="12.25pt" style:font-size-complex="14pt"/>
    </style:style>
    <style:style style:name="P156" style:family="paragraph" style:parent-style-name="Standard">
      <style:paragraph-properties fo:line-height="150%" fo:text-align="center" style:justify-single-word="false" fo:break-before="page"/>
      <style:text-properties fo:color="#000000" loext:opacity="100%" fo:font-size="14pt" fo:font-weight="bold" officeooo:rsid="00410b01" officeooo:paragraph-rsid="00410b01" style:font-size-asian="12.25pt" style:font-weight-asian="bold" style:font-size-complex="14pt" style:font-weight-complex="bold"/>
    </style:style>
    <style:style style:name="P157" style:family="paragraph" style:parent-style-name="Standard">
      <style:paragraph-properties fo:line-height="150%" fo:text-align="center" style:justify-single-word="false"/>
      <style:text-properties fo:color="#000000" loext:opacity="100%" fo:font-size="14pt" fo:font-weight="bold" officeooo:rsid="00410b01" officeooo:paragraph-rsid="00410b01" style:font-size-asian="12.25pt" style:font-weight-asian="bold" style:font-size-complex="14pt" style:font-weight-complex="bold"/>
    </style:style>
    <style:style style:name="P158" style:family="paragraph" style:parent-style-name="Preformatted_20_Text">
      <style:paragraph-properties fo:line-height="150%" fo:text-align="justify" style:justify-single-word="false"/>
      <style:text-properties fo:font-variant="normal" fo:text-transform="none" fo:color="#000000" loext:opacity="100%" style:font-name="Courier New2" fo:font-size="14pt" fo:letter-spacing="normal" fo:font-style="normal" fo:font-weight="normal" officeooo:rsid="00410b01" officeooo:paragraph-rsid="00410b01" fo:background-color="#ffffff" style:font-size-asian="14pt" style:font-weight-asian="bold" style:font-size-complex="14pt" style:font-weight-complex="bold"/>
    </style:style>
    <style:style style:name="P159" style:family="paragraph" style:parent-style-name="Preformatted_20_Text">
      <style:paragraph-properties fo:orphans="2" fo:widows="2" fo:text-indent="0cm" style:auto-text-indent="false"/>
      <style:text-properties fo:font-variant="normal" fo:text-transform="none" fo:color="#000000" loext:opacity="100%" style:font-name="Courier New2" fo:font-size="14pt" fo:letter-spacing="normal" fo:font-style="normal" fo:font-weight="normal" style:font-size-asian="14pt" style:font-size-complex="14pt"/>
    </style:style>
    <style:style style:name="P160" style:family="paragraph" style:parent-style-name="Preformatted_20_Text">
      <style:paragraph-properties fo:orphans="2" fo:widows="2" fo:text-indent="0cm" style:auto-text-indent="false"/>
      <style:text-properties fo:color="#000000" loext:opacity="100%" style:font-name="Courier New2" fo:font-size="14pt" style:font-size-asian="14pt" style:font-size-complex="14pt"/>
    </style:style>
    <style:style style:name="P161" style:family="paragraph" style:parent-style-name="Preformatted_20_Text">
      <style:paragraph-properties fo:orphans="2" fo:widows="2" fo:text-indent="0cm" style:auto-text-indent="false"/>
      <style:text-properties fo:font-variant="normal" fo:text-transform="none" fo:color="#000000" loext:opacity="100%" style:font-name="Courier New2" fo:font-size="14pt" fo:letter-spacing="normal" style:font-size-asian="14pt" style:font-size-complex="14pt"/>
    </style:style>
    <style:style style:name="P162"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000000" loext:opacity="100%" style:font-name="Courier New2" fo:font-size="14pt" fo:letter-spacing="normal" fo:font-style="normal" fo:font-weight="normal" style:font-size-asian="14pt" style:font-size-complex="14pt"/>
    </style:style>
    <style:style style:name="P163" style:family="paragraph" style:parent-style-name="Standard">
      <style:paragraph-properties fo:line-height="150%" fo:text-align="justify" style:justify-single-word="false"/>
      <style:text-properties fo:color="#000000" loext:opacity="100%" style:font-name="Courier New2" fo:font-size="14pt" fo:font-weight="bold" officeooo:rsid="00410b01" officeooo:paragraph-rsid="00410b01" fo:background-color="#ffffff"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style>
    <style:style style:name="T2" style:family="text">
      <style:text-properties fo:color="#000000" loext:opacity="100%" fo:font-size="14pt" fo:font-weight="bold" officeooo:rsid="00058a87" style:font-size-asian="14pt" style:font-weight-asian="bold" style:font-size-complex="14pt"/>
    </style:style>
    <style:style style:name="T3" style:family="text">
      <style:text-properties fo:text-transform="uppercase" style:font-size-complex="14pt"/>
    </style:style>
    <style:style style:name="T4" style:family="text">
      <style:text-properties fo:font-variant="normal" fo:text-transform="none" fo:font-size="14pt" style:font-size-asian="14pt" style:font-size-complex="14pt"/>
    </style:style>
    <style:style style:name="T5" style:family="text">
      <style:text-properties fo:font-variant="normal" fo:text-transform="none" fo:font-size="14pt" fo:language="ru" fo:country="RU" officeooo:rsid="00058a87" style:font-size-asian="14pt" style:font-size-complex="14pt"/>
    </style:style>
    <style:style style:name="T6" style:family="text">
      <style:text-properties fo:font-size="14pt" style:font-size-asian="14pt" style:font-size-complex="14pt"/>
    </style:style>
    <style:style style:name="T7" style:family="text">
      <style:text-properties fo:color="#000000" loext:opacity="100%" fo:font-size="14pt" officeooo:rsid="00058a87" style:font-size-asian="14pt" style:font-size-complex="14pt"/>
    </style:style>
    <style:style style:name="T8" style:family="text">
      <style:text-properties fo:color="#000000" loext:opacity="100%" fo:font-size="14pt" style:font-size-asian="14pt" style:font-size-complex="14pt"/>
    </style:style>
    <style:style style:name="T9" style:family="text">
      <style:text-properties fo:font-size="14pt" officeooo:rsid="00058a87" style:font-size-asian="14pt" style:font-size-complex="14pt"/>
    </style:style>
    <style:style style:name="T10" style:family="text">
      <style:text-properties fo:color="#000000" loext:opacity="100%" fo:font-size="14pt" fo:language="ru" fo:country="RU" officeooo:rsid="00058a87" style:font-size-asian="14pt" style:font-size-complex="14pt"/>
    </style:style>
    <style:style style:name="T11" style:family="text">
      <style:text-properties fo:language="en" fo:country="US" officeooo:rsid="0007cb0c"/>
    </style:style>
    <style:style style:name="T12" style:family="text">
      <style:text-properties fo:language="en" fo:country="US"/>
    </style:style>
    <style:style style:name="T13" style:family="text">
      <style:text-properties fo:language="ru" fo:country="RU"/>
    </style:style>
    <style:style style:name="T14" style:family="text">
      <style:text-properties fo:language="ru" fo:country="RU" officeooo:rsid="0007cb0c"/>
    </style:style>
    <style:style style:name="T15" style:family="text">
      <style:text-properties officeooo:rsid="0005fe9c"/>
    </style:style>
    <style:style style:name="T16" style:family="text">
      <style:text-properties officeooo:rsid="0007cb0c"/>
    </style:style>
    <style:style style:name="T17" style:family="text">
      <style:text-properties fo:color="#ff0000" loext:opacity="100%" fo:font-size="14pt" style:font-size-asian="14pt" style:font-size-complex="14pt"/>
    </style:style>
    <style:style style:name="T18" style:family="text">
      <style:text-properties fo:font-variant="normal" fo:text-transform="none" fo:color="#000000" loext:opacity="100%" style:font-name="Times New Roman1" fo:letter-spacing="normal" fo:font-style="normal" fo:font-weight="normal"/>
    </style:style>
    <style:style style:name="T19" style:family="text">
      <style:text-properties fo:font-variant="normal" fo:text-transform="none" fo:color="#000000" loext:opacity="100%" style:font-name="Times New Roman1" fo:letter-spacing="normal" fo:font-style="normal" fo:font-weight="normal" fo:background-color="#ffffff" loext:char-shading-value="0" loext:padding="0cm" loext:border="none"/>
    </style:style>
    <style:style style:name="T20" style:family="text">
      <style:text-properties fo:color="#000000" loext:opacity="100%" style:font-name="Times New Roman1"/>
    </style:style>
    <style:style style:name="T21" style:family="text">
      <style:text-properties officeooo:rsid="002d9130"/>
    </style:style>
    <style:style style:name="T22" style:family="text">
      <style:text-properties officeooo:rsid="00190b76"/>
    </style:style>
    <style:style style:name="T23" style:family="text">
      <style:text-properties officeooo:rsid="001f199e"/>
    </style:style>
    <style:style style:name="T24" style:family="text">
      <style:text-properties officeooo:rsid="0009f83a"/>
    </style:style>
    <style:style style:name="T25" style:family="text">
      <style:text-properties fo:language="ru" fo:country="RU" officeooo:rsid="003e6b87"/>
    </style:style>
    <style:style style:name="T26" style:family="text">
      <style:text-properties officeooo:rsid="003572fd"/>
    </style:style>
    <style:style style:name="T27" style:family="text">
      <style:text-properties fo:language="ru" fo:country="RU" officeooo:rsid="004918bf"/>
    </style:style>
    <style:style style:name="T28" style:family="text">
      <style:text-properties fo:color="#000000" loext:opacity="100%" fo:font-size="14pt" officeooo:rsid="000b4c66" style:font-size-asian="14pt" style:font-size-complex="14pt"/>
    </style:style>
    <style:style style:name="T29" style:family="text">
      <style:text-properties fo:color="#000000" loext:opacity="100%" style:font-name="Times New Roman1" fo:font-size="14pt" officeooo:rsid="000b4c66" style:font-size-asian="14pt" style:font-size-complex="14pt"/>
    </style:style>
    <style:style style:name="T30" style:family="text">
      <style:text-properties fo:font-variant="normal" fo:text-transform="none" fo:color="#000000" loext:opacity="100%" style:font-name="Times New Roman1" fo:font-size="14pt" fo:letter-spacing="normal" fo:font-style="normal" fo:font-weight="normal" style:font-size-asian="14pt" style:font-size-complex="14pt"/>
    </style:style>
    <style:style style:name="T31" style:family="text">
      <style:text-properties fo:font-variant="normal" fo:text-transform="none" fo:color="#000000" loext:opacity="100%" style:font-name="Times New Roman1" fo:font-size="14pt" fo:letter-spacing="normal" fo:font-style="normal" fo:font-weight="normal" officeooo:rsid="000b4c66" style:font-size-asian="14pt" style:font-size-complex="14pt"/>
    </style:style>
    <style:style style:name="T32" style:family="text">
      <style:text-properties fo:color="#000000" loext:opacity="100%" style:font-name="Times New Roman1" fo:font-size="14pt" style:font-size-asian="14pt" style:font-size-complex="14pt"/>
    </style:style>
    <style:style style:name="T33" style:family="text">
      <style:text-properties fo:text-transform="uppercase" fo:font-size="14pt" fo:font-weight="bold" style:font-size-asian="14pt" style:font-weight-asian="bold" style:font-size-complex="14pt"/>
    </style:style>
    <style:style style:name="T34" style:family="text">
      <style:text-properties fo:text-transform="uppercase" fo:color="#000000" loext:opacity="100%" fo:font-size="14pt" fo:language="ru" fo:country="RU" fo:font-weight="bold" officeooo:rsid="000b8b91" style:font-size-asian="14pt" style:font-weight-asian="bold"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color="#000000" loext:opacity="100%" fo:font-size="14pt" fo:font-weight="bold" officeooo:rsid="000b8b91" style:font-size-asian="14pt" style:font-weight-asian="bold" style:font-size-complex="14pt" style:font-weight-complex="bold"/>
    </style:style>
    <style:style style:name="T37" style:family="text">
      <style:text-properties fo:color="#000000" loext:opacity="100%" fo:font-size="14pt" fo:language="en" fo:country="US" officeooo:rsid="000b8b91" style:font-size-asian="14pt" style:font-weight-asian="normal" style:font-size-complex="14pt" style:font-weight-complex="normal"/>
    </style:style>
    <style:style style:name="T38" style:family="text">
      <style:text-properties fo:color="#000000" loext:opacity="100%" fo:font-size="14pt" fo:language="ru" fo:country="RU" officeooo:rsid="000b8b91" style:font-size-asian="14pt" style:font-weight-asian="normal" style:font-size-complex="14pt" style:font-weight-complex="normal"/>
    </style:style>
    <style:style style:name="T39" style:family="text">
      <style:text-properties fo:color="#000000" loext:opacity="100%" fo:font-size="14pt" fo:language="ru" fo:country="RU" officeooo:rsid="000cbbe8" style:font-size-asian="14pt" style:font-weight-asian="normal" style:font-size-complex="14pt" style:font-weight-complex="normal"/>
    </style:style>
    <style:style style:name="T40" style:family="text">
      <style:text-properties fo:color="#000000" loext:opacity="100%" style:font-name="Times New Roman1" fo:font-size="14pt" fo:language="ru" fo:country="RU" officeooo:rsid="000cbbe8" fo:background-color="#ffffff" loext:char-shading-value="0" style:font-size-asian="14pt" style:font-size-complex="14pt"/>
    </style:style>
    <style:style style:name="T41" style:family="text">
      <style:text-properties fo:color="#000000" loext:opacity="100%" style:font-name="Times New Roman1" fo:font-size="14pt" fo:language="ru" fo:country="RU" officeooo:rsid="000cbbe8" fo:background-color="#ffffff" loext:char-shading-value="0" style:font-size-asian="14pt" style:font-weight-asian="normal" style:font-size-complex="14pt" style:font-weight-complex="normal"/>
    </style:style>
    <style:style style:name="T42" style:family="text">
      <style:text-properties fo:color="#000000" loext:opacity="100%" style:font-name="Times New Roman1" fo:font-size="14pt" fo:language="ru" fo:country="RU" officeooo:rsid="00108d1d" fo:background-color="#ffffff" loext:char-shading-value="0" style:font-size-asian="14pt" style:font-weight-asian="normal" style:font-size-complex="14pt" style:font-weight-complex="normal"/>
    </style:style>
    <style:style style:name="T43" style:family="text">
      <style:text-properties fo:color="#000000" loext:opacity="100%" style:font-name="Times New Roman1" fo:font-size="14pt" fo:language="en" fo:country="US" officeooo:rsid="00108d1d" fo:background-color="#ffffff" loext:char-shading-value="0" style:font-size-asian="14pt" style:font-weight-asian="normal" style:font-size-complex="14pt" style:font-weight-complex="normal"/>
    </style:style>
    <style:style style:name="T44" style:family="text">
      <style:text-properties fo:color="#000000" loext:opacity="100%" style:font-name="Times New Roman1" fo:font-size="14pt" fo:language="ru" fo:country="RU" officeooo:rsid="000e3ead" fo:background-color="#ffffff" loext:char-shading-value="0" style:font-size-asian="14pt" style:font-weight-asian="normal" style:font-size-complex="14pt" style:font-weight-complex="normal"/>
    </style:style>
    <style:style style:name="T45" style:family="text">
      <style:text-properties fo:color="#000000" loext:opacity="100%" style:font-name="Times New Roman1" fo:font-size="14pt" fo:language="ru" fo:country="RU" fo:background-color="#ffffff" loext:char-shading-value="0" style:font-size-asian="14pt" style:font-weight-asian="normal" style:font-size-complex="14pt" style:font-weight-complex="normal"/>
    </style:style>
    <style:style style:name="T46" style:family="text">
      <style:text-properties fo:color="#000000" loext:opacity="100%" style:font-name="Times New Roman1" fo:font-size="14pt" fo:language="ru" fo:country="RU" officeooo:rsid="000ef405" fo:background-color="#ffffff" loext:char-shading-value="0" style:font-size-asian="14pt" style:font-weight-asian="normal" style:font-size-complex="14pt" style:font-weight-complex="normal"/>
    </style:style>
    <style:style style:name="T47" style:family="text">
      <style:text-properties fo:color="#000000" loext:opacity="100%" style:font-name="Times New Roman1" fo:font-size="14pt" fo:language="en" fo:country="US" officeooo:rsid="000ef405" fo:background-color="#ffffff" loext:char-shading-value="0" style:font-size-asian="14pt" style:font-weight-asian="normal" style:font-size-complex="14pt" style:font-weight-complex="normal"/>
    </style:style>
    <style:style style:name="T48" style:family="text">
      <style:text-properties fo:color="#000000" loext:opacity="100%" style:font-name="Times New Roman1" fo:font-size="14pt" fo:language="ru" fo:country="RU" fo:font-weight="bold" officeooo:rsid="000ef405" fo:background-color="#ffffff" loext:char-shading-value="0" style:font-size-asian="14pt" style:font-weight-asian="normal" style:font-size-complex="14pt" style:font-weight-complex="normal"/>
    </style:style>
    <style:style style:name="T49" style:family="text">
      <style:text-properties fo:color="#000000" loext:opacity="100%" style:font-name="Times New Roman1" fo:font-size="14pt" fo:language="ru" fo:country="RU" fo:font-weight="bold" officeooo:rsid="002d9130" fo:background-color="#ffffff" loext:char-shading-value="0" style:font-size-asian="14pt" style:font-weight-asian="bold" style:font-size-complex="14pt" style:font-weight-complex="bold"/>
    </style:style>
    <style:style style:name="T50" style:family="text">
      <style:text-properties fo:color="#000000" loext:opacity="100%" style:font-name="Times New Roman1" fo:font-size="14pt" fo:language="ru" fo:country="RU" officeooo:rsid="002d9130" fo:background-color="#ffffff" loext:char-shading-value="0" style:font-size-asian="14pt" style:font-weight-asian="normal" style:font-size-complex="14pt" style:font-weight-complex="normal"/>
    </style:style>
    <style:style style:name="T51" style:family="text">
      <style:text-properties fo:color="#000000" loext:opacity="100%" style:font-name="Times New Roman1" fo:font-size="14pt" fo:language="en" fo:country="US" fo:background-color="#ffffff" loext:char-shading-value="0" style:font-size-asian="14pt" style:font-weight-asian="normal" style:font-size-complex="14pt" style:font-weight-complex="normal"/>
    </style:style>
    <style:style style:name="T52" style:family="text">
      <style:text-properties fo:color="#000000" loext:opacity="100%" style:font-name="Times New Roman1" fo:font-size="14pt" fo:language="ru" fo:country="RU" fo:font-weight="bold" officeooo:rsid="000ef405" fo:background-color="#ffffff" loext:char-shading-value="0" style:font-size-asian="14pt" style:font-weight-asian="bold" style:font-size-complex="14pt" style:font-weight-complex="bold"/>
    </style:style>
    <style:style style:name="T53" style:family="text">
      <style:text-properties fo:color="#000000" loext:opacity="100%" style:font-name="Times New Roman1" fo:font-size="14pt" fo:language="ru" fo:country="RU" fo:font-weight="bold" officeooo:rsid="00108d1d" fo:background-color="#ffffff" loext:char-shading-value="0" style:font-size-asian="14pt" style:font-weight-asian="bold" style:font-size-complex="14pt" style:font-weight-complex="bold"/>
    </style:style>
    <style:style style:name="T54" style:family="text">
      <style:text-properties fo:color="#000000" loext:opacity="100%" style:font-name="Times New Roman1" fo:font-size="14pt" fo:language="ru" fo:country="RU" officeooo:rsid="00108d1d" fo:background-color="#ffffff" loext:char-shading-value="0" style:font-size-asian="14pt" style:font-size-complex="14pt"/>
    </style:style>
    <style:style style:name="T55" style:family="text">
      <style:text-properties fo:color="#000000" loext:opacity="100%" style:font-name="Times New Roman1" fo:font-size="14pt" fo:language="ru" fo:country="RU" fo:background-color="#ffffff" loext:char-shading-value="0" style:font-size-asian="14pt" style:font-size-complex="14pt"/>
    </style:style>
    <style:style style:name="T56" style:family="text">
      <style:text-properties fo:color="#000000" loext:opacity="100%" style:font-name="Times New Roman1" fo:font-size="14pt" fo:language="en" fo:country="US" fo:background-color="#ffffff" loext:char-shading-value="0" style:font-size-asian="14pt" style:font-size-complex="14pt"/>
    </style:style>
    <style:style style:name="T57" style:family="text">
      <style:text-properties fo:color="#000000" loext:opacity="100%" style:font-name="Times New Roman1" fo:font-size="14pt" fo:language="ru" fo:country="RU" officeooo:rsid="00120195" fo:background-color="#ffffff" loext:char-shading-value="0" style:font-size-asian="14pt" style:font-size-complex="14pt"/>
    </style:style>
    <style:style style:name="T58" style:family="text">
      <style:text-properties style:font-name="Courier New2" fo:language="ru" fo:country="RU" fo:font-weight="normal" officeooo:rsid="00120195" fo:background-color="#ffffff" loext:char-shading-value="0" style:font-weight-asian="normal" style:font-weight-complex="normal"/>
    </style:style>
    <style:style style:name="T59" style:family="text">
      <style:text-properties fo:language="ru" fo:country="RU" fo:font-weight="normal" officeooo:rsid="00120195" fo:background-color="#ffffff" loext:char-shading-value="0" style:font-weight-asian="normal" style:font-weight-complex="normal"/>
    </style:style>
    <style:style style:name="T60" style:family="text">
      <style:text-properties fo:language="ru" fo:country="RU" fo:font-weight="normal" officeooo:rsid="00139466" fo:background-color="#ffffff" loext:char-shading-value="0" style:font-weight-asian="normal" style:font-weight-complex="normal"/>
    </style:style>
    <style:style style:name="T61" style:family="text">
      <style:text-properties style:font-name="Courier New2"/>
    </style:style>
    <style:style style:name="T62" style:family="text">
      <style:text-properties officeooo:rsid="00139466"/>
    </style:style>
    <style:style style:name="T63" style:family="text">
      <style:text-properties fo:language="en" fo:country="US" officeooo:rsid="00139466"/>
    </style:style>
    <style:style style:name="T64" style:family="text">
      <style:text-properties fo:language="ru" fo:country="RU" officeooo:rsid="00139466"/>
    </style:style>
    <style:style style:name="T65" style:family="text">
      <style:text-properties fo:color="#000000" loext:opacity="100%" style:font-name="Courier New2" fo:font-size="14pt" fo:language="ru" fo:country="RU" fo:font-weight="normal" officeooo:rsid="00120195" fo:background-color="#ffffff" loext:char-shading-value="0" style:font-size-asian="14pt" style:font-weight-asian="normal" style:font-size-complex="14pt" style:font-weight-complex="normal"/>
    </style:style>
    <style:style style:name="T66" style:family="text">
      <style:text-properties fo:color="#000000" loext:opacity="100%" style:font-name="Courier New2" fo:font-size="14pt" fo:language="en" fo:country="US" fo:font-weight="normal" officeooo:rsid="00139466" fo:background-color="#ffffff" loext:char-shading-value="0" style:font-size-asian="14pt" style:font-weight-asian="normal" style:font-size-complex="14pt" style:font-weight-complex="normal"/>
    </style:style>
    <style:style style:name="T67" style:family="text">
      <style:text-properties fo:color="#000000" loext:opacity="100%" style:font-name="Times New Roman1" fo:font-size="14pt" fo:language="en" fo:country="US" fo:font-weight="normal" officeooo:rsid="00139466" fo:background-color="#ffffff" loext:char-shading-value="0" style:font-size-asian="14pt" style:font-weight-asian="normal" style:font-size-complex="14pt" style:font-weight-complex="normal"/>
    </style:style>
    <style:style style:name="T68" style:family="text">
      <style:text-properties fo:color="#000000" loext:opacity="100%" style:font-name="Times New Roman1" fo:font-size="14pt" fo:language="ru" fo:country="RU" fo:font-weight="normal" officeooo:rsid="00139466" fo:background-color="#ffffff" loext:char-shading-value="0" style:font-size-asian="14pt" style:font-weight-asian="normal" style:font-size-complex="14pt" style:font-weight-complex="normal"/>
    </style:style>
    <style:style style:name="T69" style:family="text">
      <style:text-properties fo:color="#000000" loext:opacity="100%" style:font-name="Times New Roman1" fo:font-size="14pt" fo:language="ru" fo:country="RU" fo:font-weight="normal" officeooo:rsid="0014c2ef" fo:background-color="#ffffff" loext:char-shading-value="0" style:font-size-asian="14pt" style:font-weight-asian="normal" style:font-size-complex="14pt" style:font-weight-complex="normal"/>
    </style:style>
    <style:style style:name="T70" style:family="text">
      <style:text-properties fo:color="#000000" loext:opacity="100%" style:font-name="Courier New2" fo:font-size="14pt" fo:language="ru" fo:country="RU" fo:font-weight="normal" officeooo:rsid="0014c2ef" fo:background-color="#ffffff" loext:char-shading-value="0" style:font-size-asian="14pt" style:font-weight-asian="normal" style:font-size-complex="14pt" style:font-weight-complex="normal"/>
    </style:style>
    <style:style style:name="T71" style:family="text">
      <style:text-properties fo:color="#000000" loext:opacity="100%" style:font-name="Courier New2" fo:font-size="14pt" fo:language="en" fo:country="US" fo:font-weight="normal" officeooo:rsid="0014c2ef" fo:background-color="#ffffff" loext:char-shading-value="0" style:font-size-asian="14pt" style:font-weight-asian="normal" style:font-size-complex="14pt" style:font-weight-complex="normal"/>
    </style:style>
    <style:style style:name="T72" style:family="text">
      <style:text-properties fo:color="#000000" loext:opacity="100%" style:font-name="Times New Roman1" fo:font-size="14pt" fo:language="en" fo:country="US" fo:font-weight="normal" officeooo:rsid="0014c2ef" fo:background-color="#ffffff" loext:char-shading-value="0"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14c2ef" style:text-blinking="false" fo:background-color="transparent" loext:char-shading-value="0"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Times New Roman1" fo:font-size="14pt" fo:language="en" fo:country="US" fo:font-style="normal" style:text-underline-style="none" fo:font-weight="normal" officeooo:rsid="0014c2ef" style:text-blinking="false" fo:background-color="transparent" loext:char-shading-value="0"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Times New Roman1" fo:font-size="14pt" fo:language="ru" fo:country="RU" style:text-underline-style="none" fo:font-weight="normal" officeooo:rsid="0014c2ef" style:text-blinking="false" fo:background-color="transparent" loext:char-shading-value="0" style:font-size-asian="14pt" style:font-weight-asian="normal" style:font-size-complex="14pt" style:font-weight-complex="normal"/>
    </style:style>
    <style:style style:name="T76" style:family="text">
      <style:text-properties fo:color="#000000" loext:opacity="100%" style:font-name="Times New Roman1" fo:font-size="14pt" fo:language="ru" fo:country="RU" fo:font-weight="normal" officeooo:rsid="001643aa" fo:background-color="#ffffff" loext:char-shading-value="0" style:font-size-asian="14pt" style:font-weight-asian="normal" style:font-size-complex="14pt" style:font-weight-complex="normal"/>
    </style:style>
    <style:style style:name="T77" style:family="text">
      <style:text-properties fo:color="#000000" loext:opacity="100%" style:font-name="Courier New2" fo:font-size="14pt" fo:language="en" fo:country="US" fo:font-weight="normal" officeooo:rsid="001643aa" fo:background-color="#ffffff" loext:char-shading-value="0" style:font-size-asian="14pt" style:font-weight-asian="normal" style:font-size-complex="14pt" style:font-weight-complex="normal"/>
    </style:style>
    <style:style style:name="T78" style:family="text">
      <style:text-properties fo:color="#000000" loext:opacity="100%" style:font-name="Times New Roman1" fo:font-size="14pt" fo:language="en" fo:country="US" fo:font-weight="normal" officeooo:rsid="001643aa" fo:background-color="#ffffff" loext:char-shading-value="0" style:font-size-asian="14pt" style:font-weight-asian="normal" style:font-size-complex="14pt" style:font-weight-complex="normal"/>
    </style:style>
    <style:style style:name="T79" style:family="text">
      <style:text-properties fo:color="#000000" loext:opacity="100%" style:font-name="Courier New2" fo:font-size="14pt" fo:language="ru" fo:country="RU" fo:font-weight="normal" officeooo:rsid="001643aa" fo:background-color="#ffffff" loext:char-shading-value="0" style:font-size-asian="14pt" style:font-weight-asian="normal" style:font-size-complex="14pt" style:font-weight-complex="normal"/>
    </style:style>
    <style:style style:name="T80" style:family="text">
      <style:text-properties fo:color="#000000" loext:opacity="100%" style:font-name="Times New Roman1" fo:font-size="14pt" fo:language="ru" fo:country="RU" fo:font-weight="normal" officeooo:rsid="00170e60" fo:background-color="#ffffff" loext:char-shading-value="0" style:font-size-asian="14pt" style:font-weight-asian="normal" style:font-size-complex="14pt" style:font-weight-complex="normal"/>
    </style:style>
    <style:style style:name="T81" style:family="text">
      <style:text-properties fo:color="#000000" loext:opacity="100%" style:font-name="Courier New2" fo:font-size="14pt" fo:language="en" fo:country="US" fo:font-weight="normal" officeooo:rsid="00170e60" fo:background-color="#ffffff" loext:char-shading-value="0" style:font-size-asian="14pt" style:font-weight-asian="normal" style:font-size-complex="14pt" style:font-weight-complex="normal"/>
    </style:style>
    <style:style style:name="T82" style:family="text">
      <style:text-properties fo:color="#000000" loext:opacity="100%" style:font-name="Times New Roman1" fo:font-size="14pt" fo:language="en" fo:country="US" fo:font-weight="normal" officeooo:rsid="00170e60" fo:background-color="#ffffff" loext:char-shading-value="0" style:font-size-asian="14pt" style:font-weight-asian="normal" style:font-size-complex="14pt" style:font-weight-complex="normal"/>
    </style:style>
    <style:style style:name="T83" style:family="text">
      <style:text-properties fo:color="#000000" loext:opacity="100%" style:font-name="Times New Roman1" fo:font-size="14pt" fo:language="ru" fo:country="RU" fo:font-weight="normal" fo:background-color="#ffffff" loext:char-shading-value="0" style:font-size-asian="14pt" style:font-weight-asian="normal" style:font-size-complex="14pt" style:font-weight-complex="normal"/>
    </style:style>
    <style:style style:name="T84" style:family="text">
      <style:text-properties fo:color="#000000" loext:opacity="100%" style:font-name="Times New Roman1" fo:font-size="14pt" fo:language="ru" fo:country="RU" fo:font-weight="normal" officeooo:rsid="00190b76" fo:background-color="#ffffff" loext:char-shading-value="0" style:font-size-asian="14pt" style:font-weight-asian="normal" style:font-size-complex="14pt" style:font-weight-complex="normal"/>
    </style:style>
    <style:style style:name="T85" style:family="text">
      <style:text-properties fo:color="#000000" loext:opacity="100%" style:font-name="Times New Roman1" fo:font-size="14pt" fo:language="en" fo:country="US" fo:font-weight="normal" fo:background-color="#ffffff"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officeooo:rsid="00170e60" style:text-blinking="false"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officeooo:rsid="00170e60" style:text-blinking="false" fo:background-color="transparent" loext:char-shading-value="0" style:font-size-asian="14pt" style:font-size-complex="14pt"/>
    </style:style>
    <style:style style:name="T88"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officeooo:rsid="002d9130" style:text-blinking="false" fo:background-color="transparent" loext:char-shading-value="0" style:font-size-asian="14pt" style:font-size-complex="14pt"/>
    </style:style>
    <style:style style:name="T89"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style:text-blinking="false" fo:background-color="transparent" loext:char-shading-value="0" style:font-size-asian="14pt" style:font-size-complex="14pt"/>
    </style:style>
    <style:style style:name="T90"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fo:font-weight="bold" style:text-blinking="false" fo:background-color="transparent" loext:char-shading-value="0" style:font-size-asian="14pt" style:font-weight-asian="bold" style:font-size-complex="14pt" style:font-weight-complex="bold"/>
    </style:style>
    <style:style style:name="T91" style:family="text">
      <style:text-properties fo:font-variant="normal" fo:text-transform="none" fo:color="#000000" loext:opacity="100%" style:text-line-through-style="none" style:text-line-through-type="none" style:font-name="Times New Roman1" fo:font-size="14pt" fo:language="ru" fo:country="RU" fo:font-style="normal" style:text-underline-style="none" fo:font-weight="normal" style:text-blinking="false" fo:background-color="transparent" loext:char-shading-value="0" style:font-size-asian="14pt" style:font-weight-asian="bold" style:font-size-complex="14pt" style:font-weight-complex="bold"/>
    </style:style>
    <style:style style:name="T92" style:family="text">
      <style:text-properties fo:font-variant="normal" fo:text-transform="none" fo:color="#000000" loext:opacity="100%" style:text-line-through-style="none" style:text-line-through-type="none" style:font-name="Times New Roman1" fo:font-size="14pt" fo:language="en" fo:country="US" fo:font-style="normal" style:text-underline-style="none" fo:font-weight="normal" style:text-blinking="false" fo:background-color="transparent" loext:char-shading-value="0" style:font-size-asian="14pt" style:font-weight-asian="bold" style:font-size-complex="14pt" style:font-weight-complex="bold"/>
    </style:style>
    <style:style style:name="T93" style:family="text">
      <style:text-properties fo:font-weight="bold" officeooo:rsid="001ab8ac"/>
    </style:style>
    <style:style style:name="T94" style:family="text">
      <style:text-properties fo:font-weight="bold" officeooo:rsid="002d9130"/>
    </style:style>
    <style:style style:name="T95" style:family="text">
      <style:text-properties officeooo:rsid="001ab8ac" style:font-weight-asian="normal" style:font-weight-complex="normal"/>
    </style:style>
    <style:style style:name="T96" style:family="text">
      <style:text-properties fo:language="en" fo:country="US" officeooo:rsid="001ab8ac" style:font-weight-asian="normal" style:font-weight-complex="normal"/>
    </style:style>
    <style:style style:name="T97" style:family="text">
      <style:text-properties officeooo:rsid="001d3737" style:font-weight-asian="normal" style:font-weight-complex="normal"/>
    </style:style>
    <style:style style:name="T98" style:family="text">
      <style:text-properties officeooo:rsid="001c52fc" style:font-weight-asian="normal" style:font-weight-complex="normal"/>
    </style:style>
    <style:style style:name="T99" style:family="text">
      <style:text-properties fo:language="en" fo:country="US" officeooo:rsid="001c52fc" style:font-weight-asian="normal" style:font-weight-complex="normal"/>
    </style:style>
    <style:style style:name="T100" style:family="text">
      <style:text-properties fo:language="en" fo:country="US" officeooo:rsid="001d3737" style:font-weight-asian="normal" style:font-weight-complex="normal"/>
    </style:style>
    <style:style style:name="T101" style:family="text">
      <style:text-properties officeooo:rsid="001f199e" style:font-weight-asian="normal" style:font-weight-complex="normal"/>
    </style:style>
    <style:style style:name="T102" style:family="text">
      <style:text-properties fo:language="en" fo:country="US" officeooo:rsid="001f199e" style:font-weight-asian="normal" style:font-weight-complex="normal"/>
    </style:style>
    <style:style style:name="T103" style:family="text">
      <style:text-properties fo:font-weight="normal" officeooo:rsid="0020e209" style:font-weight-asian="normal" style:font-weight-complex="normal"/>
    </style:style>
    <style:style style:name="T104" style:family="text">
      <style:text-properties fo:language="en" fo:country="US" fo:font-weight="normal" officeooo:rsid="0020e209" style:font-weight-asian="normal" style:font-weight-complex="normal"/>
    </style:style>
    <style:style style:name="T105" style:family="text">
      <style:text-properties fo:font-weight="normal" officeooo:rsid="00222797" style:font-weight-asian="normal" style:font-weight-complex="normal"/>
    </style:style>
    <style:style style:name="T106" style:family="text">
      <style:text-properties fo:font-weight="normal" officeooo:rsid="0023e388" style:font-weight-asian="normal" style:font-weight-complex="normal"/>
    </style:style>
    <style:style style:name="T107" style:family="text">
      <style:text-properties fo:language="en" fo:country="US" fo:font-weight="normal" officeooo:rsid="00222797" style:font-weight-asian="normal" style:font-weight-complex="normal"/>
    </style:style>
    <style:style style:name="T108" style:family="text">
      <style:text-properties fo:font-weight="normal" officeooo:rsid="00230cef" style:font-weight-asian="normal" style:font-weight-complex="normal"/>
    </style:style>
    <style:style style:name="T109" style:family="text">
      <style:text-properties fo:font-weight="normal" officeooo:rsid="0024590e" style:font-weight-asian="normal" style:font-weight-complex="normal"/>
    </style:style>
    <style:style style:name="T110" style:family="text">
      <style:text-properties fo:language="en" fo:country="US" fo:font-weight="normal" officeooo:rsid="0024590e" style:font-weight-asian="normal" style:font-weight-complex="normal"/>
    </style:style>
    <style:style style:name="T111" style:family="text">
      <style:text-properties fo:font-weight="normal" officeooo:rsid="0025a617" style:font-weight-asian="normal" style:font-weight-complex="normal"/>
    </style:style>
    <style:style style:name="T112" style:family="text">
      <style:text-properties fo:font-weight="bold" style:font-weight-asian="bold" style:font-weight-complex="bold"/>
    </style:style>
    <style:style style:name="T113" style:family="text">
      <style:text-properties fo:font-weight="bold" officeooo:rsid="002d9130" style:font-weight-asian="bold" style:font-weight-complex="bold"/>
    </style:style>
    <style:style style:name="T114" style:family="text">
      <style:text-properties fo:font-weight="normal" officeooo:rsid="0026db55" style:font-weight-asian="normal" style:font-weight-complex="normal"/>
    </style:style>
    <style:style style:name="T115" style:family="text">
      <style:text-properties fo:language="en" fo:country="US" fo:font-weight="normal" officeooo:rsid="0026db55" style:font-weight-asian="normal" style:font-weight-complex="normal"/>
    </style:style>
    <style:style style:name="T116" style:family="text">
      <style:text-properties fo:font-weight="normal" officeooo:rsid="0027d63f" style:font-weight-asian="normal" style:font-weight-complex="normal"/>
    </style:style>
    <style:style style:name="T117" style:family="text">
      <style:text-properties fo:font-weight="normal" officeooo:rsid="0028f371" style:font-weight-asian="normal" style:font-weight-complex="normal"/>
    </style:style>
    <style:style style:name="T118" style:family="text">
      <style:text-properties fo:language="en" fo:country="US" fo:font-weight="normal" officeooo:rsid="0028f371" style:font-weight-asian="normal" style:font-weight-complex="normal"/>
    </style:style>
    <style:style style:name="T119" style:family="text">
      <style:text-properties fo:font-weight="normal" officeooo:rsid="0029082e" style:font-weight-asian="normal" style:font-weight-complex="normal"/>
    </style:style>
    <style:style style:name="T120" style:family="text">
      <style:text-properties fo:font-weight="normal" style:font-weight-asian="normal" style:font-weight-complex="normal"/>
    </style:style>
    <style:style style:name="T121" style:family="text">
      <style:text-properties fo:font-weight="normal" officeooo:rsid="002af4e3" style:font-weight-asian="normal" style:font-weight-complex="normal"/>
    </style:style>
    <style:style style:name="T122" style:family="text">
      <style:text-properties fo:language="en" fo:country="US" fo:font-weight="normal" officeooo:rsid="002af4e3" style:font-weight-asian="normal" style:font-weight-complex="normal"/>
    </style:style>
    <style:style style:name="T123" style:family="text">
      <style:text-properties fo:language="en" fo:country="US" fo:font-weight="normal" style:font-weight-asian="normal" style:font-weight-complex="normal"/>
    </style:style>
    <style:style style:name="T124" style:family="text">
      <style:text-properties fo:font-weight="normal" officeooo:rsid="002c70e3" style:font-weight-asian="normal" style:font-weight-complex="normal"/>
    </style:style>
    <style:style style:name="T125" style:family="text">
      <style:text-properties fo:font-weight="normal" officeooo:rsid="002d0d22" style:font-weight-asian="normal" style:font-weight-complex="normal"/>
    </style:style>
    <style:style style:name="T126" style:family="text">
      <style:text-properties officeooo:rsid="002d0d22"/>
    </style:style>
    <style:style style:name="T127" style:family="text">
      <style:text-properties fo:text-transform="uppercase" fo:font-size="14pt" fo:font-weight="bold" officeooo:rsid="00301c24" style:font-size-asian="14pt" style:font-weight-asian="bold" style:font-size-complex="14pt"/>
    </style:style>
    <style:style style:name="T128" style:family="text">
      <style:text-properties fo:text-transform="uppercase" fo:color="#000000" loext:opacity="100%" style:text-line-through-style="none" style:text-line-through-type="none" style:font-name="Times New Roman1" fo:language="ru" fo:country="RU" fo:font-style="normal" style:text-underline-style="none" officeooo:rsid="002d0d22" style:text-blinking="false" fo:background-color="transparent" loext:char-shading-value="0"/>
    </style:style>
    <style:style style:name="T129" style:family="text">
      <style:text-properties officeooo:rsid="004f7bbd"/>
    </style:style>
    <style:style style:name="T130" style:family="text">
      <style:text-properties officeooo:rsid="0050a417"/>
    </style:style>
    <style:style style:name="T131" style:family="text">
      <style:text-properties fo:language="en" fo:country="US" officeooo:rsid="003340ea"/>
    </style:style>
    <style:style style:name="T132" style:family="text">
      <style:text-properties fo:language="ru" fo:country="RU" officeooo:rsid="00324e98" style:font-size-asian="12.25pt"/>
    </style:style>
    <style:style style:name="T133" style:family="text">
      <style:text-properties fo:language="ru" fo:country="RU" officeooo:rsid="003154d7" style:font-size-asian="14pt"/>
    </style:style>
    <style:style style:name="T134" style:family="text">
      <style:text-properties fo:language="ru" fo:country="RU" officeooo:rsid="004e5889" style:font-size-asian="14pt"/>
    </style:style>
    <style:style style:name="T135" style:family="text">
      <style:text-properties fo:language="ru" fo:country="RU" officeooo:rsid="0050a417" style:font-size-asian="14pt"/>
    </style:style>
    <style:style style:name="T136" style:family="text">
      <style:text-properties officeooo:rsid="0034126c" style:font-size-asian="14pt"/>
    </style:style>
    <style:style style:name="T137" style:family="text">
      <style:text-properties fo:language="ru" fo:country="RU" officeooo:rsid="003572fd" style:font-size-asian="14pt"/>
    </style:style>
    <style:style style:name="T138" style:family="text">
      <style:text-properties officeooo:rsid="004f7bbd" style:font-size-asian="14pt"/>
    </style:style>
    <style:style style:name="T139" style:family="text">
      <style:text-properties officeooo:rsid="0038d40f" style:font-size-asian="14pt"/>
    </style:style>
    <style:style style:name="T140" style:family="text">
      <style:text-properties officeooo:rsid="0047ec89" style:font-size-asian="14pt"/>
    </style:style>
    <style:style style:name="T141" style:family="text">
      <style:text-properties officeooo:rsid="00457189"/>
    </style:style>
    <style:style style:name="T142" style:family="text">
      <style:text-properties fo:language="en" fo:country="US" officeooo:rsid="00457189"/>
    </style:style>
    <style:style style:name="T143" style:family="text">
      <style:text-properties officeooo:rsid="003154d7"/>
    </style:style>
    <style:style style:name="T144" style:family="text">
      <style:text-properties officeooo:rsid="004e5889"/>
    </style:style>
    <style:style style:name="T145" style:family="text">
      <style:text-properties fo:language="en" fo:country="US" officeooo:rsid="0050a417"/>
    </style:style>
    <style:style style:name="T146" style:family="text">
      <style:text-properties fo:language="en" fo:country="US" officeooo:rsid="0034126c"/>
    </style:style>
    <style:style style:name="T147" style:family="text">
      <style:text-properties fo:language="ru" fo:country="RU" officeooo:rsid="0039a2b4"/>
    </style:style>
    <style:style style:name="T148" style:family="text">
      <style:text-properties fo:language="en" fo:country="US" officeooo:rsid="004e5889"/>
    </style:style>
    <style:style style:name="T149" style:family="text">
      <style:text-properties fo:language="en" fo:country="US" officeooo:rsid="003572fd"/>
    </style:style>
    <style:style style:name="T150" style:family="text">
      <style:text-properties fo:language="en" fo:country="US" officeooo:rsid="0047ec89"/>
    </style:style>
    <style:style style:name="T151" style:family="text">
      <style:text-properties fo:language="ru" fo:country="RU" officeooo:rsid="0047ec89"/>
    </style:style>
    <style:style style:name="T152" style:family="text">
      <style:text-properties officeooo:rsid="004066e8"/>
    </style:style>
    <style:style style:name="T153" style:family="text">
      <style:text-properties fo:font-style="normal" officeooo:rsid="003154d7" style:font-style-asian="normal" style:font-style-complex="normal"/>
    </style:style>
    <style:style style:name="T154" style:family="text">
      <style:text-properties fo:font-style="normal" officeooo:rsid="004e5889" style:font-style-asian="normal" style:font-style-complex="normal"/>
    </style:style>
    <style:style style:name="T155" style:family="text">
      <style:text-properties fo:language="en" fo:country="US" fo:font-style="normal" officeooo:rsid="0050a417" style:font-style-asian="normal" style:font-style-complex="normal"/>
    </style:style>
    <style:style style:name="T156" style:family="text">
      <style:text-properties fo:language="en" fo:country="US" fo:font-style="normal" officeooo:rsid="0034126c" style:font-style-asian="normal" style:font-style-complex="normal"/>
    </style:style>
    <style:style style:name="T157" style:family="text">
      <style:text-properties fo:font-style="normal" style:font-style-asian="normal" style:font-style-complex="normal"/>
    </style:style>
    <style:style style:name="T158" style:family="text">
      <style:text-properties fo:language="en" fo:country="US" fo:font-style="normal" officeooo:rsid="004e5889" style:font-style-asian="normal" style:font-style-complex="normal"/>
    </style:style>
    <style:style style:name="T159" style:family="text">
      <style:text-properties fo:language="en" fo:country="US" fo:font-style="normal" style:font-style-asian="normal" style:font-style-complex="normal"/>
    </style:style>
    <style:style style:name="T160" style:family="text">
      <style:text-properties fo:language="en" fo:country="US" fo:font-style="normal" officeooo:rsid="0047ec89" style:font-style-asian="normal" style:font-style-complex="normal"/>
    </style:style>
    <style:style style:name="T161" style:family="text">
      <style:text-properties fo:font-style="normal" officeooo:rsid="0047ec89" style:font-style-asian="normal" style:font-style-complex="normal"/>
    </style:style>
    <style:style style:name="T162" style:family="text">
      <style:text-properties officeooo:rsid="004918bf"/>
    </style:style>
    <style:style style:name="T163" style:family="text">
      <style:text-properties fo:font-weight="bold" officeooo:rsid="003b69ff" style:font-weight-asian="bold" style:font-weight-complex="bold"/>
    </style:style>
    <style:style style:name="T164" style:family="text">
      <style:text-properties fo:language="en" fo:country="US" officeooo:rsid="003154d7"/>
    </style:style>
    <style:style style:name="T165" style:family="text">
      <style:text-properties fo:color="#000000" loext:opacity="100%" fo:font-size="14pt" fo:language="ru" fo:country="RU" officeooo:rsid="003d8a2c" style:font-size-asian="14pt" style:font-size-complex="14pt"/>
    </style:style>
    <style:style style:name="T166" style:family="text">
      <style:text-properties fo:color="#000000" loext:opacity="100%" fo:font-size="14pt" fo:language="en" fo:country="US" officeooo:rsid="003d8a2c" style:font-size-asian="14pt" style:font-size-complex="14pt"/>
    </style:style>
    <style:style style:name="T167" style:family="text">
      <style:text-properties fo:font-variant="normal" fo:text-transform="none" fo:color="#000000" loext:opacity="100%" style:font-name="Times New Roman1" fo:font-size="14pt" fo:letter-spacing="normal" fo:language="ru" fo:country="RU" fo:font-style="normal" fo:font-weight="normal" officeooo:rsid="003d8a2c" style:font-size-asian="14pt" style:font-size-complex="14pt"/>
    </style:style>
    <style:style style:name="T168" style:family="text">
      <style:text-properties fo:color="#000000" loext:opacity="100%" style:font-name="Times New Roman1" fo:font-size="14pt" fo:language="ru" fo:country="RU" officeooo:rsid="003d8a2c" style:font-size-asian="14pt" style:font-size-complex="14pt"/>
    </style:style>
    <style:style style:name="T169" style:family="text">
      <style:text-properties fo:color="#000000" loext:opacity="100%" style:font-name="Times New Roman1" fo:font-size="14pt" fo:font-style="normal" fo:font-weight="normal" style:font-size-asian="14pt" style:font-style-asian="normal" style:font-weight-asian="normal" style:font-size-complex="14pt" style:font-style-complex="normal" style:font-weight-complex="normal"/>
    </style:style>
    <style:style style:name="T170" style:family="text">
      <style:text-properties fo:color="#000000" loext:opacity="100%" style:font-name="Times New Roman1" fo:font-size="14pt" fo:font-style="normal" style:text-underline-style="none" fo:font-weight="normal" officeooo:rsid="0042d4ab" style:font-size-asian="14pt" style:font-style-asian="normal" style:font-weight-asian="normal" style:font-size-complex="14pt" style:font-style-complex="normal" style:font-weight-complex="normal"/>
    </style:style>
    <style:style style:name="T171" style:family="text">
      <style:text-properties fo:color="#000000" loext:opacity="100%" style:font-name="Times New Roman1" fo:font-size="14pt" fo:font-style="normal" style:text-underline-style="none" fo:font-weight="normal" officeooo:rsid="00442df1" style:font-size-asian="14pt" style:font-style-asian="normal" style:font-weight-asian="normal" style:font-size-complex="14pt" style:font-style-complex="normal" style:font-weight-complex="normal"/>
    </style:style>
    <style:style style:name="T172" style:family="text">
      <style:text-properties fo:color="#000000" loext:opacity="100%" style:font-name="Times New Roman1" fo:font-size="14pt" fo:language="en" fo:country="US" fo:font-style="normal" style:text-underline-style="none" fo:font-weight="normal" officeooo:rsid="00442df1" style:font-size-asian="14pt" style:font-style-asian="normal" style:font-weight-asian="normal" style:font-size-complex="14pt" style:font-style-complex="normal" style:font-weight-complex="normal"/>
    </style:style>
    <style:style style:name="T173" style:family="text">
      <style:text-properties fo:color="#000000" loext:opacity="100%" style:font-name="Times New Roman1" fo:font-size="14pt" fo:language="ru" fo:country="RU" fo:font-style="normal" style:text-underline-style="none" fo:font-weight="normal" officeooo:rsid="00442df1" style:font-size-asian="14pt" style:font-style-asian="normal" style:font-weight-asian="normal" style:font-size-complex="14pt" style:font-style-complex="normal" style:font-weight-complex="normal"/>
    </style:style>
    <style:style style:name="T174" style:family="text">
      <style:text-properties fo:color="#000000" loext:opacity="100%" style:font-name="Times New Roman1" fo:font-size="14pt" fo:language="ru" fo:country="RU" fo:font-style="normal" style:text-underline-style="none" fo:font-weight="normal" officeooo:rsid="00471338" style:font-size-asian="14pt" style:font-style-asian="normal" style:font-weight-asian="normal" style:font-size-complex="14pt" style:font-style-complex="normal" style:font-weight-complex="normal"/>
    </style:style>
    <style:style style:name="T175" style:family="text">
      <style:text-properties fo:text-transform="uppercase" fo:font-weight="bold" style:font-weight-asian="bold"/>
    </style:style>
    <style:style style:name="T176" style:family="text">
      <style:text-properties officeooo:rsid="0047ec89"/>
    </style:style>
    <style:style style:name="T177"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p>
      <text:p text:style-name="P1">Санкт-Петербургский государственный</text:p>
      <text:p text:style-name="P1">электротехнический университет </text:p>
      <text:p text:style-name="P1">«ЛЭТИ» им. В.И. Ульянова (Ленина)</text:p>
      <text:p text:style-name="P2"><text:span text:style-name="T1">Кафедра </text:span><text:span text:style-name="T2">МОЭВМ</text:span></text:p>
      <text:p text:style-name="P1"/>
      <text:p text:style-name="P1"/>
      <text:p text:style-name="P3"/>
      <text:p text:style-name="P3"/>
      <text:p text:style-name="P3"/>
      <text:p text:style-name="P4"><text:span text:style-name="Название_20_книги"><text:span text:style-name="T3">Курсовая РАБОТА</text:span></text:span></text:p>
      <text:p text:style-name="P2"><text:span text:style-name="T1">по дисциплине «</text:span><text:span text:style-name="T2">Программирование</text:span><text:span text:style-name="T1">»</text:span></text:p>
      <text:p text:style-name="P2"><text:span text:style-name="Название_20_книги"><text:span text:style-name="T4">Тема: </text:span></text:span><text:span text:style-name="Название_20_книги"><text:span text:style-name="T5">Обработка изображения</text:span></text:span></text:p>
      <text:p text:style-name="P2"><text:span text:style-name="Название_20_книги"><text:span text:style-name="T4"/></text:span></text:p>
      <text:p text:style-name="P3"/>
      <text:p text:style-name="P3"/>
      <text:p text:style-name="P3"/>
      <text:p text:style-name="P3"/>
      <text:p text:style-name="P3"/>
      <text:p text:style-name="P3"/>
      <text:p text:style-name="P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6">Студент</text:span><text:span text:style-name="T7">ка</text:span><text:span text:style-name="T6"> гр. </text:span><text:span text:style-name="T7">4342</text:span></text:p>
          </table:table-cell>
          <table:table-cell table:style-name="Таблица1.B1" office:value-type="string">
            <text:p text:style-name="P5"/>
          </table:table-cell>
          <table:table-cell table:style-name="Таблица1.A1" office:value-type="string">
            <text:p text:style-name="P6">Киселева А.Д.</text:p>
          </table:table-cell>
        </table:table-row>
        <table:table-row table:style-name="Таблица1.1">
          <table:table-cell table:style-name="Таблица1.A1" office:value-type="string">
            <text:p text:style-name="P7">Преподаватель<text:span text:style-name="T6"/></text:p>
          </table:table-cell>
          <table:table-cell table:style-name="Таблица1.B2" office:value-type="string">
            <text:p text:style-name="P5"/>
          </table:table-cell>
          <table:table-cell table:style-name="Таблица1.A1" office:value-type="string">
            <text:p text:style-name="P8">Виноградова Е.В.</text:p>
          </table:table-cell>
        </table:table-row>
      </table:table>
      <text:p text:style-name="P9"/>
      <text:p text:style-name="P9"/>
      <text:p text:style-name="P9">Санкт-Петербург</text:p>
      <text:p text:style-name="P10">2025</text:p>
      <text:p text:style-name="P11">ЗАДАНИЕ</text:p>
      <text:p text:style-name="P1">на курсовую работу</text:p>
      <text:p text:style-name="P12"/>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13"><text:span text:style-name="T6">Студент</text:span><text:span text:style-name="T7">ка</text:span><text:span text:style-name="T8"> </text:span><text:span text:style-name="T7">Киселева А.Д.</text:span></text:p>
          </table:table-cell>
          <table:covered-table-cell/>
          <table:covered-table-cell/>
        </table:table-row>
        <table:table-row table:style-name="Таблица2.2">
          <table:table-cell table:style-name="Таблица2.A1" table:number-columns-spanned="3" office:value-type="string">
            <text:p text:style-name="P13"><text:span text:style-name="T6">Группа </text:span><text:span text:style-name="T7">4342</text:span></text:p>
          </table:table-cell>
          <table:covered-table-cell/>
          <table:covered-table-cell/>
        </table:table-row>
        <table:table-row table:style-name="Таблица2.3">
          <table:table-cell table:style-name="Таблица2.A1" table:number-columns-spanned="3" office:value-type="string">
            <text:p text:style-name="P13"><text:span text:style-name="T6">Тема работы: </text:span><text:span text:style-name="T9">О</text:span><text:span text:style-name="T10">бработка изображения</text:span></text:p>
          </table:table-cell>
          <table:covered-table-cell/>
          <table:covered-table-cell/>
        </table:table-row>
        <table:table-row table:style-name="Таблица2.4">
          <table:table-cell table:style-name="Таблица2.A1" table:number-columns-spanned="3" office:value-type="string">
            <text:p text:style-name="P14">Исходные данные: </text:p>
            <text:p text:style-name="P15">Требуется создать <text:span text:style-name="T11">CLI</text:span><text:span text:style-name="T12">-</text:span><text:span text:style-name="T13">утилиту для обработки </text:span><text:span text:style-name="T12">PNG </text:span><text:span text:style-name="T13">изображения на языке </text:span><text:span text:style-name="T12">C </text:span><text:span text:style-name="T13">с </text:span><text:span text:style-name="T14">использованием библиотеки </text:span><text:span text:style-name="T11">libpng </text:span><text:span text:style-name="T14">и </text:span><text:span text:style-name="T13">применением </text:span><text:span text:style-name="T12">getopt,</text:span><text:span text:style-name="T13"> </text:span><text:span text:style-name="T14">которая поддерживает рисование квадрата, перемещение частей изображения в заданной прямоугольной области, смену наиболее часто встречаемого цвета на выбранный пользователем цвет.</text:span></text:p>
          </table:table-cell>
          <table:covered-table-cell/>
          <table:covered-table-cell/>
        </table:table-row>
        <table:table-row table:style-name="Таблица2.5">
          <table:table-cell table:style-name="Таблица2.A1" table:number-columns-spanned="3" office:value-type="string">
            <text:p text:style-name="P14">Содержание пояснительной записки:</text:p>
            <text:p text:style-name="P16">«<text:span text:style-name="T15">Аннотация», </text:span>«Содержание», «Введение», «<text:span text:style-name="T16">Цель», «Задачи», «Описание программы», «Примеры работы программы», </text:span>«Заключение», «Список использованных источников»</text:p>
          </table:table-cell>
          <table:covered-table-cell/>
          <table:covered-table-cell/>
        </table:table-row>
        <table:table-row table:style-name="Таблица2.6">
          <table:table-cell table:style-name="Таблица2.A1" table:number-columns-spanned="3" office:value-type="string">
            <text:p text:style-name="P14">Предполагаемый объем пояснительной записки:</text:p>
            <text:p text:style-name="P13"><text:span text:style-name="T6">Не менее </text:span><text:span text:style-name="T9">10</text:span><text:span text:style-name="T17"> </text:span><text:span text:style-name="T6">страниц.</text:span></text:p>
          </table:table-cell>
          <table:covered-table-cell/>
          <table:covered-table-cell/>
        </table:table-row>
        <table:table-row table:style-name="Таблица2.7">
          <table:table-cell table:style-name="Таблица2.A1" table:number-columns-spanned="3" office:value-type="string">
            <text:p text:style-name="P13"><text:span text:style-name="T6">Дата выдачи задания: </text:span><text:span text:style-name="T8">0</text:span><text:span text:style-name="T7">7</text:span><text:span text:style-name="T8">.0</text:span><text:span text:style-name="T7">3</text:span><text:span text:style-name="T8">.20</text:span><text:span text:style-name="T7">25</text:span></text:p>
          </table:table-cell>
          <table:covered-table-cell/>
          <table:covered-table-cell/>
        </table:table-row>
        <table:table-row table:style-name="Таблица2.8">
          <table:table-cell table:style-name="Таблица2.A1" table:number-columns-spanned="3" office:value-type="string">
            <text:p text:style-name="P13"><text:span text:style-name="T6">Дата сдачи реферата: </text:span><text:span text:style-name="T7">23.05.2025</text:span></text:p>
          </table:table-cell>
          <table:covered-table-cell/>
          <table:covered-table-cell/>
        </table:table-row>
        <table:table-row table:style-name="Таблица2.9">
          <table:table-cell table:style-name="Таблица2.A1" table:number-columns-spanned="3" office:value-type="string">
            <text:p text:style-name="P13"><text:span text:style-name="T6">Дата защиты реферата: </text:span><text:span text:style-name="T9">25</text:span><text:span text:style-name="T8">.0</text:span><text:span text:style-name="T7">5</text:span><text:span text:style-name="T8">.20</text:span><text:span text:style-name="T7">25</text:span></text:p>
          </table:table-cell>
          <table:covered-table-cell/>
          <table:covered-table-cell/>
        </table:table-row>
        <table:table-row table:style-name="Таблица2.10">
          <table:table-cell table:style-name="Таблица2.A10" office:value-type="string">
            <text:p text:style-name="P17"><text:span text:style-name="T6">Студент</text:span><text:span text:style-name="T8">ка</text:span></text:p>
          </table:table-cell>
          <table:table-cell table:style-name="Таблица2.A10" office:value-type="string">
            <text:p text:style-name="P18"/>
          </table:table-cell>
          <table:table-cell table:style-name="Таблица2.A10" office:value-type="string">
            <text:p text:style-name="P19">Киселева А.Д.</text:p>
          </table:table-cell>
        </table:table-row>
        <table:table-row table:style-name="Таблица2.10">
          <table:table-cell table:style-name="Таблица2.A10" office:value-type="string">
            <text:p text:style-name="P20">Преподаватель</text:p>
          </table:table-cell>
          <table:table-cell table:style-name="Таблица2.B11" office:value-type="string">
            <text:p text:style-name="P21"/>
          </table:table-cell>
          <table:table-cell table:style-name="Таблица2.A10" office:value-type="string">
            <text:p text:style-name="P22">Виноградова Е.В.</text:p>
          </table:table-cell>
        </table:table-row>
      </table:table>
      <text:p text:style-name="P12"/>
      <text:p text:style-name="P11">Аннотация</text:p>
      <text:p text:style-name="P1"/>
      <text:p text:style-name="P23"><text:span text:style-name="T18">Курсовая работа посвящена разработке консольной утилиты для обработки PNG-изображений с использованием библиотеки </text:span><text:span text:style-name="Source_20_Text"><text:span text:style-name="T19">libpng</text:span></text:span><text:span text:style-name="T18">. Программа поддерживает три основные функции: рисование квадрата с заданными параметрами, перестановку четырех частей выбранной области изображения и замену наиболее часто встречающегося цвета на указанный. Утилита реализована в соответствии с требованиями CLI, включает обработку ошибок, справку и поддержку как полных, так и сокращенных аргументов командной строки.</text:span><text:span text:style-name="T20"> </text:span></text:p>
      <text:p text:style-name="P23"/>
      <text:p text:style-name="P23"/>
      <text:p text:style-name="P23"/>
      <text:p text:style-name="P23"/>
      <text:p text:style-name="P24">Summary</text:p>
      <text:p text:style-name="P24"/>
      <text:p text:style-name="P25">The course work is devoted to the development of a console utility for processing PNG-images using the libpng library. The program supports three main functions: drawing a square with preset parameters, rearranging four parts of the selected image area, and replacing the most common color with the specified one. The utility is implemented in accordance with the requirements of the CLI, includes error handling, help, and support for both full and abbreviated command line arguments. </text:p>
      <text:p text:style-name="P26"/>
      <text:p text:style-name="P11">содержание</text:p>
      <text:p text:style-name="P2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8"/>
          </table:table-cell>
          <table:table-cell table:style-name="Таблица3.A1" office:value-type="string">
            <text:p text:style-name="P29">Введение</text:p>
          </table:table-cell>
          <table:table-cell table:style-name="Таблица3.A1" office:value-type="string">
            <text:p text:style-name="P30">5</text:p>
          </table:table-cell>
        </table:table-row>
        <table:table-row table:style-name="Таблица3.1">
          <table:table-cell table:style-name="Таблица3.A1" office:value-type="string">
            <text:p text:style-name="P31">1.</text:p>
          </table:table-cell>
          <table:table-cell table:style-name="Таблица3.A1" office:value-type="string">
            <text:p text:style-name="P32">Описание программы</text:p>
          </table:table-cell>
          <table:table-cell table:style-name="Таблица3.A1" office:value-type="string">
            <text:p text:style-name="P33">6</text:p>
          </table:table-cell>
        </table:table-row>
        <table:table-row table:style-name="Таблица3.1">
          <table:table-cell table:style-name="Таблица3.A1" office:value-type="string">
            <text:p text:style-name="P34">1.1.</text:p>
          </table:table-cell>
          <table:table-cell table:style-name="Таблица3.A1" office:value-type="string">
            <text:p text:style-name="P35">Организация хранения данных</text:p>
          </table:table-cell>
          <table:table-cell table:style-name="Таблица3.A1" office:value-type="string">
            <text:p text:style-name="P33">6</text:p>
          </table:table-cell>
        </table:table-row>
        <table:table-row table:style-name="Таблица3.1">
          <table:table-cell table:style-name="Таблица3.A1" office:value-type="string">
            <text:p text:style-name="P36">1.<text:span text:style-name="T21">2</text:span>.</text:p>
          </table:table-cell>
          <table:table-cell table:style-name="Таблица3.A1" office:value-type="string">
            <text:p text:style-name="P37">Общая логика работы программы</text:p>
          </table:table-cell>
          <table:table-cell table:style-name="Таблица3.A1" office:value-type="string">
            <text:p text:style-name="P33">6</text:p>
          </table:table-cell>
        </table:table-row>
        <table:table-row table:style-name="Таблица3.1">
          <table:table-cell table:style-name="Таблица3.A1" office:value-type="string">
            <text:p text:style-name="P36">1.<text:span text:style-name="T21">3</text:span>.</text:p>
          </table:table-cell>
          <table:table-cell table:style-name="Таблица3.A1" office:value-type="string">
            <text:p text:style-name="P32">Реализация интерфейса командной строки</text:p>
          </table:table-cell>
          <table:table-cell table:style-name="Таблица3.A1" office:value-type="string">
            <text:p text:style-name="P33">7</text:p>
          </table:table-cell>
        </table:table-row>
        <table:table-row table:style-name="Таблица3.1">
          <table:table-cell table:style-name="Таблица3.A1" office:value-type="string">
            <text:p text:style-name="P38">1.<text:span text:style-name="T21">4</text:span>.</text:p>
          </table:table-cell>
          <table:table-cell table:style-name="Таблица3.A1" office:value-type="string">
            <text:p text:style-name="P39">Считывание и <text:span text:style-name="T22">запись</text:span> изображения</text:p>
          </table:table-cell>
          <table:table-cell table:style-name="Таблица3.A1" office:value-type="string">
            <text:p text:style-name="P33">8</text:p>
          </table:table-cell>
        </table:table-row>
        <table:table-row table:style-name="Таблица3.1">
          <table:table-cell table:style-name="Таблица3.A1" office:value-type="string">
            <text:p text:style-name="P40">1.<text:span text:style-name="T21">5</text:span>.</text:p>
          </table:table-cell>
          <table:table-cell table:style-name="Таблица3.A1" office:value-type="string">
            <text:p text:style-name="P41">Функционал рисования квадрата</text:p>
          </table:table-cell>
          <table:table-cell table:style-name="Таблица3.A1" office:value-type="string">
            <text:p text:style-name="P33">9</text:p>
          </table:table-cell>
        </table:table-row>
        <table:table-row table:style-name="Таблица3.1">
          <table:table-cell table:style-name="Таблица3.A1" office:value-type="string">
            <text:p text:style-name="P36">1.<text:span text:style-name="T21">6</text:span>.</text:p>
          </table:table-cell>
          <table:table-cell table:style-name="Таблица3.A1" office:value-type="string">
            <text:p text:style-name="P41">Функционал обмена част<text:span text:style-name="T23">ей</text:span> изображения </text:p>
          </table:table-cell>
          <table:table-cell table:style-name="Таблица3.A1" office:value-type="string">
            <text:p text:style-name="P42">10</text:p>
          </table:table-cell>
        </table:table-row>
        <table:table-row table:style-name="Таблица3.1">
          <table:table-cell table:style-name="Таблица3.A1" office:value-type="string">
            <text:p text:style-name="P43">1.<text:span text:style-name="T21">7</text:span>.</text:p>
          </table:table-cell>
          <table:table-cell table:style-name="Таблица3.A1" office:value-type="string">
            <text:p text:style-name="P41">Функционал замены частого цвета</text:p>
          </table:table-cell>
          <table:table-cell table:style-name="Таблица3.A1" office:value-type="string">
            <text:p text:style-name="P42">11</text:p>
          </table:table-cell>
        </table:table-row>
        <table:table-row table:style-name="Таблица3.1">
          <table:table-cell table:style-name="Таблица3.A1" office:value-type="string">
            <text:p text:style-name="P40"><text:span text:style-name="T24">1.</text:span><text:span text:style-name="T21">8</text:span>.</text:p>
          </table:table-cell>
          <table:table-cell table:style-name="Таблица3.A1" office:value-type="string">
            <text:p text:style-name="P41">Обработка ошибок</text:p>
          </table:table-cell>
          <table:table-cell table:style-name="Таблица3.A1" office:value-type="string">
            <text:p text:style-name="P33">12</text:p>
          </table:table-cell>
        </table:table-row>
        <table:table-row table:style-name="Таблица3.1">
          <table:table-cell table:style-name="Таблица3.A1" office:value-type="string">
            <text:p text:style-name="P30">1.<text:span text:style-name="T21">9</text:span>.</text:p>
          </table:table-cell>
          <table:table-cell table:style-name="Таблица3.A1" office:value-type="string">
            <text:p text:style-name="P39">Вывод справочной информации</text:p>
          </table:table-cell>
          <table:table-cell table:style-name="Таблица3.A1" office:value-type="string">
            <text:p text:style-name="P42">12</text:p>
          </table:table-cell>
        </table:table-row>
        <table:table-row table:style-name="Таблица3.1">
          <table:table-cell table:style-name="Таблица3.A1" office:value-type="string">
            <text:p text:style-name="P38">2. </text:p>
          </table:table-cell>
          <table:table-cell table:style-name="Таблица3.A1" office:value-type="string">
            <text:p text:style-name="P39">Примеры работы программы</text:p>
          </table:table-cell>
          <table:table-cell table:style-name="Таблица3.A1" office:value-type="string">
            <text:p text:style-name="P44">13</text:p>
          </table:table-cell>
        </table:table-row>
        <table:table-row table:style-name="Таблица3.1">
          <table:table-cell table:style-name="Таблица3.A1" office:value-type="string">
            <text:p text:style-name="P38">2.1.</text:p>
          </table:table-cell>
          <table:table-cell table:style-name="Таблица3.A1" office:value-type="string">
            <text:p text:style-name="P39">Обработка корректных запросов</text:p>
          </table:table-cell>
          <table:table-cell table:style-name="Таблица3.A1" office:value-type="string">
            <text:p text:style-name="P45">13</text:p>
          </table:table-cell>
        </table:table-row>
        <table:table-row table:style-name="Таблица3.1">
          <table:table-cell table:style-name="Таблица3.A1" office:value-type="string">
            <text:p text:style-name="P38">2.2.</text:p>
          </table:table-cell>
          <table:table-cell table:style-name="Таблица3.A1" office:value-type="string">
            <text:p text:style-name="P46">Обработка ошибочных случаев</text:p>
          </table:table-cell>
          <table:table-cell table:style-name="Таблица3.A1" office:value-type="string">
            <text:p text:style-name="P45">14</text:p>
          </table:table-cell>
        </table:table-row>
        <table:table-row table:style-name="Таблица3.1">
          <table:table-cell table:style-name="Таблица3.A1" office:value-type="string">
            <text:p text:style-name="P28"/>
          </table:table-cell>
          <table:table-cell table:style-name="Таблица3.A1" office:value-type="string">
            <text:p text:style-name="P29">Заключение</text:p>
          </table:table-cell>
          <table:table-cell table:style-name="Таблица3.A1" office:value-type="string">
            <text:p text:style-name="P44">1<text:span text:style-name="T25">7</text:span></text:p>
          </table:table-cell>
        </table:table-row>
        <table:table-row table:style-name="Таблица3.1">
          <table:table-cell table:style-name="Таблица3.A1" office:value-type="string">
            <text:p text:style-name="P47"/>
          </table:table-cell>
          <table:table-cell table:style-name="Таблица3.A1" office:value-type="string">
            <text:p text:style-name="P29">Список использованных источников</text:p>
          </table:table-cell>
          <table:table-cell table:style-name="Таблица3.A1" office:value-type="string">
            <text:p text:style-name="P44">1<text:span text:style-name="T25">8</text:span></text:p>
          </table:table-cell>
        </table:table-row>
        <table:table-row table:style-name="Таблица3.1">
          <table:table-cell table:style-name="Таблица3.A1" office:value-type="string">
            <text:p text:style-name="P47"/>
          </table:table-cell>
          <table:table-cell table:style-name="Таблица3.A1" office:value-type="string">
            <text:p text:style-name="P29">Приложение А. <text:span text:style-name="T26">Тестирование</text:span></text:p>
          </table:table-cell>
          <table:table-cell table:style-name="Таблица3.A1" office:value-type="string">
            <text:p text:style-name="P44">1<text:span text:style-name="T25">9</text:span></text:p>
          </table:table-cell>
        </table:table-row>
        <table:table-row table:style-name="Таблица3.1">
          <table:table-cell table:style-name="Таблица3.A1" office:value-type="string">
            <text:p text:style-name="P47"/>
          </table:table-cell>
          <table:table-cell table:style-name="Таблица3.A1" office:value-type="string">
            <text:p text:style-name="P48">Приложение Б. Код программы</text:p>
          </table:table-cell>
          <table:table-cell table:style-name="Таблица3.A1" office:value-type="string">
            <text:p text:style-name="P49">2<text:span text:style-name="T27">3</text:span></text:p>
          </table:table-cell>
        </table:table-row>
      </table:table>
      <text:p text:style-name="P7"/>
      <text:p text:style-name="P11">введение</text:p>
      <text:p text:style-name="P50"/>
      <text:p text:style-name="P51"><text:span text:style-name="T28"><text:tab/>Цель:<text:tab/> </text:span><text:span text:style-name="T29">р</text:span><text:span text:style-name="T30">азработать консольную программу для обработки PNG-изображений, обеспечивающую выполнение заданных </text:span><text:span text:style-name="T31">графических </text:span><text:span text:style-name="T30">операций с корректной обработкой входных данных и ошибок.</text:span><text:span text:style-name="T32"> </text:span></text:p>
      <text:p text:style-name="P51"><text:span text:style-name="T32"/></text:p>
      <text:p text:style-name="P52"><text:tab/>Задачи:</text:p>
      <text:list text:style-name="L1">
        <text:list-item>
          <text:p text:style-name="P53">Организовать обработку аргументов командной строки</text:p>
        </text:list-item>
        <text:list-item>
          <text:p text:style-name="P53">Первично обработать входное изображение: реализовать функции чтения и записи, проверить корректность получаемого файла</text:p>
        </text:list-item>
        <text:list-item>
          <text:p text:style-name="P54">Реализовать функции операций с изображением</text:p>
        </text:list-item>
        <text:list-item>
          <text:p text:style-name="P54">Настроить обработку ошибок</text:p>
        </text:list-item>
        <text:list-item>
          <text:p text:style-name="P54">Протестировать и отладить программу</text:p>
        </text:list-item>
      </text:list>
      <text:p text:style-name="P23"/>
      <text:p text:style-name="P55"><text:span text:style-name="T33">1. </text:span><text:span text:style-name="T34">ОПИСАНИЕ ПРОГРАММЫ</text:span></text:p>
      <text:p text:style-name="P56"><text:span text:style-name="T34"/></text:p>
      <text:p text:style-name="P57"><text:span text:style-name="T35">1.1. </text:span><text:span text:style-name="T36">Организация хранения данных</text:span></text:p>
      <text:p text:style-name="P58">Для хранения данных о вводимом изображении используется структура</text:p>
      <text:p text:style-name="P59"><text:span text:style-name="T37">Png, </text:span><text:span text:style-name="T38">которая содержит поля типа </text:span><text:span text:style-name="T37">int, </text:span><text:span text:style-name="T38">предназначенные для длины</text:span><text:span text:style-name="T39">, </text:span><text:span text:style-name="T38">ширины </text:span><text:span text:style-name="T39">и количества проходов для полной загрузки изображения</text:span><text:span text:style-name="T38">, поля типа png_byte для цветотипа и глубины </text:span><text:span text:style-name="T39">цвета, поле типа png_bytep* для хранения массива пикселей, поля типа </text:span><text:span text:style-name="T40">png_structp и </text:span><text:span text:style-name="T41">png_infop, содержащие информацию об изображении.</text:span></text:p>
      <text:p text:style-name="P59"><text:span text:style-name="T41"><text:tab/></text:span><text:span text:style-name="T42">Для удобства созданы структуры </text:span><text:span text:style-name="T43">RGB,</text:span><text:span text:style-name="T42"> хранящая информацию о каждой компоненте цвета пикселя, и </text:span><text:span text:style-name="T43">point, </text:span><text:span text:style-name="T42">предназначенная для записи координат точки.</text:span></text:p>
      <text:p text:style-name="P60"><text:span text:style-name="T44">Для хранения данных об ожидаемых флагах каждой функции реализованы структуры </text:span><text:span text:style-name="T45">square_data, <text:s/></text:span><text:span text:style-name="T46">exchange_data и change_color.</text:span></text:p>
      <text:p text:style-name="P59"><text:span text:style-name="T46">Первая состоит из поля типа <text:s/>struct point* для задания координат левой верхней точки, полей типа </text:span><text:span text:style-name="T47">int </text:span><text:span text:style-name="T46">для размера стороны и толщины линий, поля типа </text:span><text:span text:style-name="T47">bool </text:span><text:span text:style-name="T46">для получения информации о наличии заливки, полей типа </text:span><text:span text:style-name="T44">struct RGB* </text:span><text:span text:style-name="T46">для цвета линий и заливки. Вторая состоит из полей типа </text:span><text:span text:style-name="T44">struct point*, </text:span><text:span text:style-name="T46">задающих верхнюю левую и правую нижнюю точки, поля типа </text:span><text:span text:style-name="T47">char*, </text:span><text:span text:style-name="T46">отвечающего за тип перемещения частей изображения. Третья состоит из поля типа struct RGB*, </text:span><text:span text:style-name="T42">предназначенного для хранения цвета, в который будут перекрашены все пиксели наиболее часто встречаемого цвета.</text:span></text:p>
      <text:p text:style-name="P61"><text:span text:style-name="T41">Д</text:span><text:span text:style-name="T42">ля отслеживания получения данных о вызываемых операциях используется структура</text:span><text:span text:style-name="T47"> </text:span><text:span text:style-name="T43">options_flags, </text:span><text:span text:style-name="T42">состоящая из полей типа </text:span><text:span text:style-name="T43">int</text:span><text:span text:style-name="T42"> и поля типа <text:s/>enum error_types, которое отвечает за наличие ошибок.</text:span></text:p>
      <text:p text:style-name="P62"><text:span text:style-name="T46"/></text:p>
      <text:p text:style-name="P62"><text:span text:style-name="T48"><text:tab/></text:span><text:span text:style-name="T49">1.2. Общая логика работы программы</text:span></text:p>
      <text:p text:style-name="P59"><text:span text:style-name="T49"><text:tab/></text:span><text:span text:style-name="T50">Программа разбита на функции, выполняющие отдельные задачи.</text:span></text:p>
      <text:p text:style-name="P63"><text:soft-page-break/><text:span text:style-name="T45">В основной функции </text:span><text:span text:style-name="T51">main </text:span><text:span text:style-name="T45">выделяется память для используемых структур, происходит считывание аргументов командной строки и заполнение полей соответствующих структур, вызываются функции чтения, обработки и записи изображения. В конце освобождается динамически выделенная память.</text:span></text:p>
      <text:p text:style-name="P64"><text:tab/>Более подробное описание каждой функции изложено в следующих подразделах.</text:p>
      <text:p text:style-name="P65"><text:tab/></text:p>
      <text:p text:style-name="P66"><text:span text:style-name="T52">1.</text:span><text:span text:style-name="T49">3</text:span><text:span text:style-name="T52">. </text:span><text:span text:style-name="T53">Реализация интерфейса командной строки</text:span></text:p>
      <text:p text:style-name="P67"><text:span text:style-name="T54">Ч</text:span><text:span text:style-name="T55">тение аргументов происходит при помощи getopt_long</text:span><text:span text:style-name="T56">, </text:span><text:span text:style-name="T55">поскольку данная функция позволяет обрабатывать как длинные, так и короткие флаги. При получении неизвестного флага функция возвращает ошибку аргумента. При успешном считывании опции проверяется корректность полученного аргумента, обновляются поля отслеживающей структуры и структуры соответствующей функции, которая может содержать данный аргумент. </text:span><text:span text:style-name="T57">Для опций, не принимающих на вход аргументы, выполняется проверка корректности следующего аргумента командной строки (является ли он флагом). Проводится дополнительная проверка корректности имени входного изображения, когда оно подается последним аргументом без соответствующего флага.</text:span></text:p>
      <text:p text:style-name="P68">Ожидаемые на вход флаги:</text:p>
      <text:list text:style-name="L2">
        <text:list-item>
          <text:p text:style-name="P69"><text:span text:style-name="T58">--input</text:span><text:span text:style-name="T59">, </text:span><text:span text:style-name="T58">-i</text:span><text:span text:style-name="T59">: </text:span><text:span text:style-name="T60">задает имя входного изображения Если флаг отсутствует, то ожидается, что имя изображения подано последним аргументом.</text:span></text:p>
        </text:list-item>
        <text:list-item>
          <text:p text:style-name="P69"><text:span text:style-name="T61">--output</text:span>, <text:span text:style-name="T61">-o</text:span>: <text:span text:style-name="T62">задает имя выходного изображения. Если флаг отсутствует, имя выходного изображения по умолчанию задается как «</text:span><text:span text:style-name="T63">out.png</text:span><text:span text:style-name="T64">».</text:span></text:p>
        </text:list-item>
        <text:list-item>
          <text:p text:style-name="P69"><text:span text:style-name="T61">--info</text:span>: <text:span text:style-name="T62">выводится </text:span>информация об изображении.</text:p>
        </text:list-item>
        <text:list-item>
          <text:p text:style-name="P69"><text:soft-page-break/><text:span text:style-name="T61">--help</text:span>, <text:span text:style-name="T61">-h</text:span>: <text:span text:style-name="T62">выводится </text:span>справка, <text:span text:style-name="T62">содержащая информацию о флагах и их аргументах.</text:span></text:p>
        </text:list-item>
        <text:list-item>
          <text:p text:style-name="P70"><text:span text:style-name="T65">--</text:span><text:span text:style-name="T66">square</text:span><text:span text:style-name="T67">, </text:span><text:span text:style-name="T66">-S</text:span><text:span text:style-name="T67">: </text:span><text:span text:style-name="T68">рисование квадрата. Определяется следующими опциями:</text:span></text:p>
          <text:list>
            <text:list-item>
              <text:p text:style-name="P70"><text:span text:style-name="T69"><text:s/></text:span><text:span text:style-name="T70">--</text:span><text:span text:style-name="T71">left_up</text:span><text:span text:style-name="T72">, </text:span><text:span text:style-name="T71">-l</text:span><text:span text:style-name="T72">: к</text:span><text:span text:style-name="T73">оординатами левого верхнего угла. Значение задаётся в формате «left.up», где left – координата по x, up – координата по y.</text:span></text:p>
            </text:list-item>
            <text:list-item>
              <text:p text:style-name="P71"><text:span text:style-name="T69"><text:s/></text:span><text:span text:style-name="T70">--</text:span><text:span text:style-name="T71">side_size</text:span><text:span text:style-name="T72">, </text:span><text:span text:style-name="T71">-s</text:span><text:span text:style-name="T72">: </text:span><text:span text:style-name="T69">размером стороны. На вход принимает число больше 0.</text:span></text:p>
            </text:list-item>
            <text:list-item>
              <text:p text:style-name="P71"><text:span text:style-name="T69"><text:s/></text:span><text:span text:style-name="T70">--</text:span><text:span text:style-name="T71">thickness</text:span><text:span text:style-name="T72">, </text:span><text:span text:style-name="T71">-t</text:span><text:span text:style-name="T72">: </text:span><text:span text:style-name="T69">толщиной линий. На вход принимает число больше 0.</text:span></text:p>
            </text:list-item>
            <text:list-item>
              <text:p text:style-name="P71"><text:span text:style-name="T69"><text:s/></text:span><text:span text:style-name="T70">--</text:span><text:span text:style-name="T71">color</text:span><text:span text:style-name="T72">, </text:span><text:span text:style-name="T71">-C</text:span><text:span text:style-name="T72">: </text:span><text:span text:style-name="T69">цветом линий. Ц</text:span><text:span text:style-name="T73">вет задаётся строкой </text:span><text:span text:style-name="T74">«rrr.ggg.bbb»</text:span><text:span text:style-name="T73">, где rrr/ggg/bbb</text:span><text:span text:style-name="T75"> – </text:span><text:span text:style-name="T73">числа в диапазоне </text:span><text:span text:style-name="T74">[0; 255]</text:span><text:span text:style-name="T73">, задающие цветовую компоненту.</text:span><text:span text:style-name="T69"> </text:span></text:p>
            </text:list-item>
            <text:list-item>
              <text:p text:style-name="P71"><text:span text:style-name="T70">--</text:span><text:span text:style-name="T71">fill</text:span><text:span text:style-name="T72">, </text:span><text:span text:style-name="T71">-f</text:span><text:span text:style-name="T72">: </text:span><text:span text:style-name="T69">наличие</text:span><text:span text:style-name="T76">м</text:span><text:span text:style-name="T69"> заливки. Если флаг подан, квадрат будет залит, иначе — остается пустым.</text:span></text:p>
            </text:list-item>
            <text:list-item>
              <text:p text:style-name="P71"><text:span text:style-name="T70">--</text:span><text:span text:style-name="T77">fill_color</text:span><text:span text:style-name="T78">, </text:span><text:span text:style-name="T77">-c</text:span><text:span text:style-name="T78">: </text:span><text:span text:style-name="T76">цветом заливки. Работает аналогично флагу —</text:span><text:span text:style-name="T78">color.</text:span></text:p>
            </text:list-item>
          </text:list>
        </text:list-item>
        <text:list-item>
          <text:p text:style-name="P72"><text:span text:style-name="T77">--exchange</text:span><text:span text:style-name="T78">, </text:span><text:span text:style-name="T77">-e</text:span><text:span text:style-name="T78">: </text:span><text:span text:style-name="T76">перемещение частей изображения. Определяется следующими опциями:</text:span></text:p>
          <text:list>
            <text:list-item>
              <text:p text:style-name="P72"><text:span text:style-name="T76"><text:s/></text:span><text:span text:style-name="T79">--left_up</text:span><text:span text:style-name="T76">, </text:span><text:span text:style-name="T79">-l</text:span><text:span text:style-name="T76">: координатами левого верхнего угла области. Работает аналогично </text:span><text:span text:style-name="T80">соответствующему </text:span><text:span text:style-name="T76">флагу, описанному в п. 5.1.</text:span></text:p>
            </text:list-item>
            <text:list-item>
              <text:p text:style-name="P73"><text:s/><text:span text:style-name="T61">--right_down</text:span>, <text:span text:style-name="T61">-r</text:span>: координатами правого нижнего угла области. Работает аналогично флагу <text:span text:style-name="T61">--left_up</text:span>.</text:p>
            </text:list-item>
            <text:list-item>
              <text:p text:style-name="P73"><text:s/><text:span text:style-name="T61">--exchange_type</text:span>, <text:span text:style-name="T61">-T</text:span>: способом обмена частей. Возможные значения: «clockwise» - по часовой стрелке, «counterclockwise» - против часовой стрелки, «diagonals» - по диагоналям.</text:p>
            </text:list-item>
          </text:list>
        </text:list-item>
        <text:list-item>
          <text:p text:style-name="P72"><text:soft-page-break/><text:span text:style-name="T79">--</text:span><text:span text:style-name="T81">freq_color</text:span><text:span text:style-name="T82">, </text:span><text:span text:style-name="T81">-F</text:span><text:span text:style-name="T82">: </text:span><text:span text:style-name="T80">поиск наиболее часто встречаемого цвета и замена на другой заданный цвет. Определяется следующими опциями:</text:span></text:p>
          <text:list>
            <text:list-item>
              <text:p text:style-name="P72"><text:span text:style-name="T79">--</text:span><text:span text:style-name="T81">color</text:span><text:span text:style-name="T82">, </text:span><text:span text:style-name="T81">-C</text:span><text:span text:style-name="T82">: </text:span><text:span text:style-name="T80">цвет в который надо перекрасить самый часто встречаемый цвет. Работает аналогично соответствующему флагу, описанному в <text:s text:c="3"/>п. 5.4.</text:span></text:p>
            </text:list-item>
          </text:list>
        </text:list-item>
      </text:list>
      <text:p text:style-name="P74"><text:span text:style-name="T83">После считывания аргументов </text:span><text:span text:style-name="T84">для проверки корректности введенных данных </text:span><text:span text:style-name="T83">вызывается функция </text:span><text:span text:style-name="T85">check_input_data, </text:span><text:span text:style-name="T83">в которую под</text:span><text:span text:style-name="T84">ается структура, отслеживающая наличие тех или иных флагов. Проверяется наличие всех необходимых аргументов для требуемой функции и отсутствие лишних.</text:span></text:p>
      <text:p text:style-name="P75"><text:span text:style-name="T86"/></text:p>
      <text:p text:style-name="P76"><text:span text:style-name="T87"><text:tab/>1.</text:span><text:span text:style-name="T88">4.</text:span><text:span text:style-name="T89"> Считывание и запись изображения</text:span></text:p>
      <text:p text:style-name="P77"><text:span text:style-name="T90"><text:tab/></text:span><text:span text:style-name="T91">Работа с изображением проводится с помощью функций библиотеки </text:span><text:span text:style-name="T92">libpng. </text:span></text:p>
      <text:p text:style-name="P77"><text:span text:style-name="T91"><text:tab/>Функция считывания изображения принимает на вход указатель на структуру </text:span><text:span text:style-name="T92">Png </text:span><text:span text:style-name="T91">для хранения изображения, путь к читаемому изображению, переменную для записи возможных ошибок. Файл с изображением открывается в бинарном режиме чтения, происходит считывание заголовка </text:span><text:span text:style-name="T92">header </text:span><text:span text:style-name="T91">и проверка его соответствия сигнатуре </text:span><text:span text:style-name="T92">png. П</text:span><text:span text:style-name="T91">роводится инициализация структур для чтения</text:span><text:span text:style-name="T92"> </text:span><text:span text:style-name="T91">и хранения информации об изображении, также осуществляется проверка успешности их создания. Происходит подготовка к чтению файла: настраивается ввод, пропускается проверка сигнатуры, так как она уже была сделана выше, считываются метаданные изображения для дальнейшей работы.</text:span></text:p>
      <text:p text:style-name="P77"><text:span text:style-name="T91">Далее извлекаются основные параметры (ширина, высота, цветотип, глубина цвета, количество проходов для полной загрузки) и создается массив указателей на строки изображения, в каждую из них записывается информация о пикселях, из которых она состоит. Функция возвращает значение типа </text:span><text:span text:style-name="T92">int </text:span><text:span text:style-name="T91">равное 1, если чтение изображения произошло успешно, иначе — 0.</text:span></text:p>
      <text:p text:style-name="P77"><text:soft-page-break/><text:span text:style-name="T91"><text:tab/> Функция записи изображения принимает на вход указатель на структуру </text:span><text:span text:style-name="T92">Png </text:span><text:span text:style-name="T91">для хранения изображения, путь к файлу, в который будет записано изображение, переменную для записи возможных ошибок. Файл открывается в режиме бинарной записи, инициализируются структуры для записи и хранения информации об изображении, осуществляется проверка успешности их создания. <text:s/>Устанавливаются основные параметры изображения. Заголовок и данные изображения записываются в переданный файл, открытый в бинарном режиме записи. Очищаются структуры изображения.</text:span></text:p>
      <text:p text:style-name="P78"><text:tab/>При наличии каких-либо ошибок в консоль печатается сообщение, код ошибки записывается в переданную переменную.</text:p>
      <text:p text:style-name="P78"/>
      <text:p text:style-name="P78"><text:span text:style-name="T93"><text:tab/>1.</text:span><text:span text:style-name="T94">5</text:span><text:span text:style-name="T93">. Функционал рисования квадрата</text:span></text:p>
      <text:p text:style-name="P79"><text:span text:style-name="T93"><text:tab/></text:span><text:span text:style-name="T95">Для рисования квадрата создана </text:span><text:span text:style-name="T96">void-</text:span><text:span text:style-name="T95">функция, принимающая на вход </text:span><text:span text:style-name="T97">указатель на </text:span><text:span text:style-name="T95">структуру с введенными пользователем данными и </text:span><text:span text:style-name="T97">указатель на </text:span><text:span text:style-name="T95">структуру, содержащую информацию об изображении. Рисуются две горизонтальные и две вертикальные линии. </text:span><text:span text:style-name="T98">Предполагается, что ширина линий отсчитывается равномерно в обе стороны от центра. Чтобы корректно нарисовать углы квадрата, обе координаты сдвинуты на половину толщины. Далее, если требуется, выполняется заливка полученного квадрата.</text:span></text:p>
      <text:p text:style-name="P79"><text:span text:style-name="T98"><text:tab/> Для рисования вертикальных и горизонтальных линий создана отдельная </text:span><text:span text:style-name="T99">void-</text:span><text:span text:style-name="T98">функция, принимающая на вход координаты начальной точки, длину, толщину и цвет линий, а также </text:span><text:span text:style-name="T97">указатель на </text:span><text:span text:style-name="T98">структуру, содержащую информацию об изображении. </text:span><text:span text:style-name="T97">Пиксели, лежащие на линии заданной толщины и длины, проходят проверку на принадлежность изображению и перекрашиваются в заданный цвет, если она успешна.</text:span></text:p>
      <text:p text:style-name="P79"><text:span text:style-name="T97"><text:tab/>Для заливки квадрата создана отдельная </text:span><text:span text:style-name="T100">void-</text:span><text:span text:style-name="T97">функция, принимающая на вход координаты начальной точки заливки (левого верхнего угла внутреннего </text:span><text:soft-page-break/><text:span text:style-name="T97">квадрата), </text:span><text:span text:style-name="T101">длины сторон по оси </text:span><text:span text:style-name="T102">x </text:span><text:span text:style-name="T101">и по оси у (для возможного использования функции для заливки прямоугольника), цвет и указатель на структуру, хранящую информацию об изображении. Пиксели, принадлежащие внутреннему квадрату и находящиеся в пределах изображения, перекрашиваются в заданный цвет.</text:span></text:p>
      <text:p text:style-name="P79"><text:span text:style-name="T101"/></text:p>
      <text:p text:style-name="P80"><text:tab/>1.<text:span text:style-name="T21">6.</text:span> Функционал обмена частей изображения</text:p>
      <text:p text:style-name="P80"><text:tab/><text:span text:style-name="T103">Согласно заданию, выбранная пользователем прямоугольная область делится на 4 части, после чего фрагменты перемещаются в соответствие с заданным способом обмена.</text:span></text:p>
      <text:p text:style-name="P80"><text:span text:style-name="T103"><text:tab/>Создана </text:span><text:span text:style-name="T104">void-</text:span><text:span text:style-name="T103">функция, принимающая на вход указатель на структуру, содержащую введенные данные, указатель на структуру, хранящую информацию об изображении, переменную для записи возможных ошибок. Производится проверка корректности ввода координат прямоугольной области. </text:span><text:span text:style-name="T105">При некорректном положении точек их координаты меняются местами (левая верхняя становится правой нижней, правая нижняя — левой верхней). Далее сохраняются данные о каждой из четырех частей выбранной области. В зависимости от способа обмена выполняется перестановка фрагментов области. После всех операций освобождается память, выделенная для хранения частей области. </text:span></text:p>
      <text:p text:style-name="P81"><text:span text:style-name="T105"><text:tab/>Для получения данных о фрагмент</text:span><text:span text:style-name="T106">ах</text:span><text:span text:style-name="T105"> создана отдельная </text:span><text:span text:style-name="T107">void-</text:span><text:span text:style-name="T105">функция, принимающая на вход размеры сторон </text:span><text:span text:style-name="T106">фрагмента </text:span><text:span text:style-name="T105">по оси х и по оси у, </text:span><text:span text:style-name="T108">координаты </text:span><text:span text:style-name="T106">на </text:span><text:span text:style-name="T108">изображени</text:span><text:span text:style-name="T106">и</text:span><text:span text:style-name="T108">, откуда будет произведено копирование, </text:span><text:span text:style-name="T106">указатель на массив, в который будет сохранен фрагмент, указатель на структуру, хранящую данные об изображении, переменную для записи возможных ошибок. Внутри функции выделяется память для пикселей части изображения, </text:span><text:span text:style-name="T109">проводится проверка принадлежности текущего пикселя исходному </text:span><text:soft-page-break/><text:span text:style-name="T109">изображению. В случае успеха пиксель изображения сохраняется в массив фрагмента.</text:span></text:p>
      <text:p text:style-name="P82"><text:span text:style-name="T109"><text:tab/>Для перестановки частей области создана отдельная</text:span><text:span text:style-name="T110"> void-</text:span><text:span text:style-name="T109">функция вставки, которая принимает на вход </text:span><text:span text:style-name="T111">координаты верхнего левого угла, с которого начинается вставка, длину и высоту вставляемого фрагмента, массив, в котором хранятся пиксели вставляемой части, указатель на структуру, содержащую информацию об исходном изображении. Внутри функции, после проверки на принадлежность текущего пикселя исходному изображению, выполняется перезапись этого пикселя в соответствие с данными из вставляемой части. </text:span></text:p>
      <text:p text:style-name="P83"><text:span text:style-name="T111"/></text:p>
      <text:p text:style-name="P83"><text:tab/><text:span text:style-name="T112">1.</text:span><text:span text:style-name="T113">7</text:span><text:span text:style-name="T112">. Функционал замены частого цвета</text:span></text:p>
      <text:p text:style-name="P82"><text:tab/><text:span text:style-name="T114">Для замены наиболее часто встречаемого цвета реализована </text:span><text:span text:style-name="T115">void-</text:span><text:span text:style-name="T114">функция, принимающая на вход указатель на структуру с введенными данными, указатель на структуру, содержащую информацию об изображении, переменную для записи возможных ошибок. </text:span><text:span text:style-name="T116">Внутри функции создается массив для хранения количества вхождений каждого цвета, а также переменная для подсчёта максимального количества вхождений. При проходе по изображению вычисляется уникальный индекс цвета, </text:span><text:span text:style-name="T117">опираясь на то, что цветовые составляющие пикселя хранятся последовательно и занимают 3 байта памяти (в реализации для </text:span><text:span text:style-name="T118">png</text:span><text:span text:style-name="T117">), и увеличивается значение счетчика текущего цвета на 1. Затем происходит сравнение этого счетчика со счетчиком максимального количества вхождений. Если текущий счетчик больше, то обновляется главный счетчик и сохраняются компоненты цвета рассматриваемого пикселя. </text:span><text:span text:style-name="T119">Далее происходит повторный проход по изображению, в котором осуществляется поиск пикселей, чьи цветовые составляющие совпадают с сохраненными ранее, и замена их цвета на заданный пользователем.</text:span></text:p>
      <text:p text:style-name="P82"><text:soft-page-break/><text:span text:style-name="T119"/></text:p>
      <text:p text:style-name="P84"><text:span text:style-name="T120"><text:tab/></text:span>1.<text:span text:style-name="T21">8</text:span>. Обработка ошибок</text:p>
      <text:p text:style-name="P85"><text:tab/><text:span text:style-name="T121">Для удобства задания ошибок создано перечисление </text:span><text:span text:style-name="T122">error_types, </text:span><text:span text:style-name="T121">в котором каждому типу ошибки соответствует свой код из диапазона </text:span><text:span text:style-name="T122">[40; 49].</text:span></text:p>
      <text:p text:style-name="P86"><text:span text:style-name="T117">Д</text:span><text:span text:style-name="T120">ля случая корректного выполнения программы создан флаг равный 0.</text:span></text:p>
      <text:p text:style-name="P86"><text:span text:style-name="T120"><text:tab/>В структуре </text:span><text:span text:style-name="T123">options_flags, </text:span><text:span text:style-name="T120">предназначенной для отслеживания введенных пользователем опций, создано поле типа <text:s/></text:span><text:span text:style-name="T122">error_types </text:span><text:span text:style-name="T120">для отслеживания ошибок, изначально равное 0. Это поле подается в функции, в которых могут быть встречены критические случаи. В случае отлова ошибки </text:span><text:span text:style-name="T124">главная часть кода функции не выполняется, </text:span><text:span text:style-name="T120">полю присваивается соответствующее значение и выводится сообщение в консоль. </text:span></text:p>
      <text:p text:style-name="P86"><text:span text:style-name="T120"/></text:p>
      <text:p text:style-name="P87"><text:span text:style-name="T125"><text:tab/></text:span><text:span text:style-name="T126">1.</text:span><text:span text:style-name="T21">9</text:span><text:span text:style-name="T126"> Вывод справочной информации</text:span></text:p>
      <text:p text:style-name="P88"><text:tab/>Для вывода справочной информации о поданном изображении создана <text:span text:style-name="T12">void-</text:span>функция, принимающая на вход указатель на структуру, хранящую данные об изображении. </text:p>
      <text:p text:style-name="P88"><text:tab/>Для вывода справочной информации о доступных опциях создана <text:span text:style-name="T12">void-</text:span>функция, не принимающая аргументов.</text:p>
      <text:p text:style-name="P89"/>
      <text:p text:style-name="P90">2. Примеры работы программы</text:p>
      <text:p text:style-name="P91"><text:span text:style-name="T127"/></text:p>
      <text:p text:style-name="P92"><text:span text:style-name="T13"><text:tab/>2.1.</text:span><text:span text:style-name="T128"> </text:span><text:span text:style-name="T13">Вывод справочной информации</text:span></text:p>
      <text:p text:style-name="P93">1. Проверка опции вывода справки</text:p>
      <text:p text:style-name="P94">Таблица 1</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95">Ввод</text:p>
          </table:table-cell>
          <table:table-cell table:style-name="Таблица4.B1" office:value-type="string">
            <text:p text:style-name="P96">./<text:span text:style-name="T12">a.out --help</text:span></text:p>
          </table:table-cell>
        </table:table-row>
        <table:table-row table:style-name="Таблица4.2">
          <table:table-cell table:style-name="Таблица4.A2" office:value-type="string">
            <text:p text:style-name="P95">Вывод </text:p>
          </table:table-cell>
          <table:table-cell table:style-name="Таблица4.B2" office:value-type="string">
            <text:p text:style-name="P97">см. Приложение <text:span text:style-name="T26">А</text:span>. Т<text:span text:style-name="T129">аблица</text:span> 1<text:span text:style-name="T130">3</text:span></text:p>
          </table:table-cell>
        </table:table-row>
      </table:table>
      <text:p text:style-name="Standard"/>
      <text:p text:style-name="P98">Таблица 2 </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99">Ввод</text:p>
          </table:table-cell>
          <table:table-cell table:style-name="Таблица6.B1" office:value-type="string">
            <text:p text:style-name="P100">./<text:span text:style-name="T12">a.out -</text:span><text:span text:style-name="T131">h input.png</text:span></text:p>
          </table:table-cell>
        </table:table-row>
        <table:table-row table:style-name="Таблица6.2">
          <table:table-cell table:style-name="Таблица6.A2" office:value-type="string">
            <text:p text:style-name="P99">Вывод </text:p>
          </table:table-cell>
          <table:table-cell table:style-name="Таблица6.B2" office:value-type="string">
            <text:p text:style-name="P101">см. Приложение <text:span text:style-name="T26">А</text:span>. Т<text:span text:style-name="T129">аблица</text:span> 1<text:span text:style-name="T130">3</text:span></text:p>
          </table:table-cell>
        </table:table-row>
      </table:table>
      <text:p text:style-name="P102"/>
      <text:p text:style-name="Standard"/>
      <text:p text:style-name="P103"><text:span text:style-name="T12">2. </text:span><text:span text:style-name="T13">Проверка опции рисования квадрата</text:span></text:p>
      <text:p text:style-name="P103"><text:span text:style-name="T132"/></text:p>
      <text:p text:style-name="P104"><text:span text:style-name="T133">Т</text:span><text:span text:style-name="T134">аблица</text:span><text:span text:style-name="T133"> </text:span><text:span text:style-name="T135">3</text:span><text:span text:style-name="T136"> — см. Приложение </text:span><text:span text:style-name="T137">А</text:span><text:span text:style-name="T136">. </text:span><text:span text:style-name="T138">Рисунок</text:span><text:span text:style-name="T136"> 2.1</text:span><text:span text:style-name="T139">.</text:span><text:span text:style-name="T140">1., </text:span><text:span text:style-name="T138">Рисунок</text:span><text:span text:style-name="T140"> 2.1.2.</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05">Ввод</text:p>
          </table:table-cell>
          <table:table-cell table:style-name="Таблица5.B1" office:value-type="string">
            <text:p text:style-name="P106">./a.out --square --left_up 50.75 --side_size 234 --thickness <text:span text:style-name="T141">15</text:span> --color <text:span text:style-name="T141">0</text:span>.<text:span text:style-name="T141">255</text:span>.120 --output cool.png <text:span text:style-name="T142">doll</text:span>.<text:span text:style-name="T142">png</text:span></text:p>
          </table:table-cell>
        </table:table-row>
        <table:table-row table:style-name="Таблица5.2">
          <table:table-cell table:style-name="Таблица5.A2" office:value-type="string">
            <text:p text:style-name="P105">Вывод </text:p>
          </table:table-cell>
          <table:table-cell table:style-name="Таблица5.B2" office:value-type="string">
            <text:p text:style-name="P107">Course work for option 4.16, created by Alina Kiseleva</text:p>
          </table:table-cell>
        </table:table-row>
      </table:table>
      <text:p text:style-name="P108"/>
      <text:p text:style-name="P109"><text:span text:style-name="T143">Т</text:span><text:span text:style-name="T144">аблица</text:span><text:span text:style-name="T143"> </text:span><text:span text:style-name="T145">4</text:span><text:span text:style-name="T146"> — см. Приложение </text:span><text:span text:style-name="T147">А</text:span><text:span text:style-name="T146">. </text:span><text:span text:style-name="T148">Рисунок</text:span><text:span text:style-name="T146"> 2.</text:span><text:span text:style-name="T149">2</text:span><text:span text:style-name="T146">.</text:span><text:span text:style-name="T150">1</text:span><text:span text:style-name="T151">, </text:span><text:span text:style-name="T148">Рисунок</text:span><text:span text:style-name="T146"> 2.</text:span><text:span text:style-name="T149">2</text:span><text:span text:style-name="T146">.</text:span><text:span text:style-name="T150">2</text:span><text:span text:style-name="T151">.</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10">Ввод</text:p>
          </table:table-cell>
          <table:table-cell table:style-name="Таблица7.B1" office:value-type="string">
            <text:p text:style-name="P111">./a.out --square --left_up <text:span text:style-name="T152">20</text:span>0.<text:span text:style-name="T152">2</text:span>75 --side_size 4<text:span text:style-name="T152">00</text:span> --thickness 7 --color 206.91.120 --fill <text:s text:c="8"/>--fill_color 0.255.50 --output cool.png <text:span text:style-name="T142">input.png</text:span></text:p>
          </table:table-cell>
        </table:table-row>
        <text:soft-page-break/>
        <table:table-row table:style-name="Таблица7.2">
          <table:table-cell table:style-name="Таблица7.A2" office:value-type="string">
            <text:p text:style-name="P110">Вывод </text:p>
          </table:table-cell>
          <table:table-cell table:style-name="Таблица7.B2" office:value-type="string">
            <text:p text:style-name="P112">Course work for option 4.16, created by Alina Kiseleva</text:p>
          </table:table-cell>
        </table:table-row>
      </table:table>
      <text:p text:style-name="P113"/>
      <text:p text:style-name="P114">3. Проверка опции перемещения частей области</text:p>
      <text:p text:style-name="P115"><text:span text:style-name="T153">Т</text:span><text:span text:style-name="T154">аблица</text:span><text:span text:style-name="T153"> </text:span><text:span text:style-name="T155">5</text:span><text:span text:style-name="T156"> — см. Приложение </text:span><text:span text:style-name="T157">А</text:span><text:span text:style-name="T156">. </text:span><text:span text:style-name="T158">Рисунок</text:span><text:span text:style-name="T156"> </text:span><text:span text:style-name="T159">3</text:span><text:span text:style-name="T156">.</text:span><text:span text:style-name="T159">1.</text:span><text:span text:style-name="T160">1, </text:span><text:span text:style-name="T158">Рисунок</text:span><text:span text:style-name="T161"> </text:span><text:span text:style-name="T160">3.1.2</text:span><text:span text:style-name="T150">.</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16">Ввод</text:p>
          </table:table-cell>
          <table:table-cell table:style-name="Таблица8.B1" office:value-type="string">
            <text:p text:style-name="P117">./a.out --exchange --left_up 150.259 --right_down 456.150 --exchange_type diagonals --input radio.vQh</text:p>
          </table:table-cell>
        </table:table-row>
        <table:table-row table:style-name="Таблица8.2">
          <table:table-cell table:style-name="Таблица8.A2" office:value-type="string">
            <text:p text:style-name="P116">Вывод </text:p>
          </table:table-cell>
          <table:table-cell table:style-name="Таблица8.B2" office:value-type="string">
            <text:p text:style-name="P118">Course work for option 4.16, created by Alina Kiseleva</text:p>
          </table:table-cell>
        </table:table-row>
      </table:table>
      <text:p text:style-name="P114"/>
      <text:p text:style-name="P119"><text:span text:style-name="T143">Т</text:span><text:span text:style-name="T144">аблица</text:span><text:span text:style-name="T143"> </text:span><text:span text:style-name="T145">6</text:span><text:span text:style-name="T146"> — см. Приложение </text:span>А<text:span text:style-name="T146">. </text:span><text:span text:style-name="T148">Рисунок</text:span><text:span text:style-name="T146"> </text:span><text:span text:style-name="T12">3</text:span><text:span text:style-name="T146">.</text:span><text:span text:style-name="T12">2.</text:span><text:span text:style-name="T150">1, </text:span><text:span text:style-name="T148">Рисунок</text:span><text:span text:style-name="T146"> </text:span><text:span text:style-name="T12">3</text:span><text:span text:style-name="T146">.</text:span><text:span text:style-name="T12">2.</text:span><text:span text:style-name="T150">2.</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20">Ввод</text:p>
          </table:table-cell>
          <table:table-cell table:style-name="Таблица9.B1" office:value-type="string">
            <text:p text:style-name="P121">./a.out --exchange --left_up 500.375 --right_down 0.0 --exchange_type clockwise --input milk.XyA</text:p>
          </table:table-cell>
        </table:table-row>
        <table:table-row table:style-name="Таблица9.2">
          <table:table-cell table:style-name="Таблица9.A2" office:value-type="string">
            <text:p text:style-name="P120">Вывод </text:p>
          </table:table-cell>
          <table:table-cell table:style-name="Таблица9.B2" office:value-type="string">
            <text:p text:style-name="P122">Course work for option 4.16, created by Alina Kiseleva</text:p>
          </table:table-cell>
        </table:table-row>
      </table:table>
      <text:p text:style-name="P123"/>
      <text:p text:style-name="P124">4. Проверка опции замены частого цвета</text:p>
      <text:p text:style-name="P119"><text:span text:style-name="T143">Т</text:span><text:span text:style-name="T144">аблица</text:span><text:span text:style-name="T143"> </text:span><text:span text:style-name="T145">7</text:span><text:span text:style-name="T146"> — см. Приложение </text:span>А<text:span text:style-name="T146">. </text:span><text:span text:style-name="T148">Рисунок</text:span><text:span text:style-name="T146"> </text:span><text:span text:style-name="T12">4</text:span><text:span text:style-name="T146">.</text:span><text:span text:style-name="T12">1.</text:span><text:span text:style-name="T162">1, </text:span><text:span text:style-name="T148">Рисунок</text:span><text:span text:style-name="T162"> 4.1.2.</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20">Ввод</text:p>
          </table:table-cell>
          <table:table-cell table:style-name="Таблица10.B1" office:value-type="string">
            <text:p text:style-name="P121">./a.out --freq_color --color 227.37.107 car.nST</text:p>
          </table:table-cell>
        </table:table-row>
        <table:table-row table:style-name="Таблица10.2">
          <table:table-cell table:style-name="Таблица10.A2" office:value-type="string">
            <text:p text:style-name="P120">Вывод </text:p>
          </table:table-cell>
          <table:table-cell table:style-name="Таблица10.B2" office:value-type="string">
            <text:p text:style-name="P122">Course work for option 4.16, created by Alina Kiseleva</text:p>
          </table:table-cell>
        </table:table-row>
      </table:table>
      <text:p text:style-name="P123"/>
      <text:p text:style-name="P125"><text:tab/>2.2. Обработка ошибочных случаев</text:p>
      <text:p text:style-name="P126"><text:span text:style-name="T143">Т</text:span><text:span text:style-name="T144">аблица</text:span><text:span text:style-name="T143"> </text:span><text:span text:style-name="T145">8</text:span></text:p>
      <table:table table:name="Таблица11" table:style-name="Таблица11">
        <table:table-column table:style-name="Таблица11.A"/>
        <table:table-column table:style-name="Таблица11.B"/>
        <text:soft-page-break/>
        <table:table-row table:style-name="Таблица11.1">
          <table:table-cell table:style-name="Таблица11.A1" office:value-type="string">
            <text:p text:style-name="P127">Ввод</text:p>
          </table:table-cell>
          <table:table-cell table:style-name="Таблица11.B1" office:value-type="string">
            <text:p text:style-name="P128">./a.out --balerina cappuchino</text:p>
          </table:table-cell>
        </table:table-row>
        <table:table-row table:style-name="Таблица11.2">
          <table:table-cell table:style-name="Таблица11.A2" office:value-type="string">
            <text:p text:style-name="P127">Вывод </text:p>
          </table:table-cell>
          <table:table-cell table:style-name="Таблица11.B2" office:value-type="string">
            <text:p text:style-name="P129">./a.out: unrecognized option '--balerina'</text:p>
            <text:p text:style-name="P129">Введенного флага не существует.</text:p>
            <text:p text:style-name="P129">Входной файл отсутствует в текущей директории</text:p>
          </table:table-cell>
        </table:table-row>
      </table:table>
      <text:p text:style-name="P130"/>
      <text:p text:style-name="P131"><text:span text:style-name="T143">Т</text:span><text:span text:style-name="T144">аблица</text:span><text:span text:style-name="T143"> </text:span><text:span text:style-name="T130">9</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32">Ввод</text:p>
          </table:table-cell>
          <table:table-cell table:style-name="Таблица12.B1" office:value-type="string">
            <text:p text:style-name="P133">./a.out --freq_color --color 1000minus7 car.nST</text:p>
          </table:table-cell>
        </table:table-row>
        <table:table-row table:style-name="Таблица12.1">
          <table:table-cell table:style-name="Таблица12.A2" office:value-type="string">
            <text:p text:style-name="P132">Вывод </text:p>
          </table:table-cell>
          <table:table-cell table:style-name="Таблица12.B2" office:value-type="string">
            <text:p text:style-name="P134">Цвет задан неверно</text:p>
          </table:table-cell>
        </table:table-row>
      </table:table>
      <text:p text:style-name="P135"><text:span text:style-name="T163"/></text:p>
      <text:p text:style-name="P131"><text:span text:style-name="T143">Т</text:span><text:span text:style-name="T144">аблица</text:span><text:span text:style-name="T143"> </text:span><text:span text:style-name="T130">10</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32">Ввод</text:p>
          </table:table-cell>
          <table:table-cell table:style-name="Таблица13.B1" office:value-type="string">
            <text:p text:style-name="P133">./a.out --freq_color --color 227.37.107 out.png</text:p>
          </table:table-cell>
        </table:table-row>
        <table:table-row table:style-name="Таблица13.1">
          <table:table-cell table:style-name="Таблица13.A2" office:value-type="string">
            <text:p text:style-name="P132">Вывод </text:p>
          </table:table-cell>
          <table:table-cell table:style-name="Таблица13.B2" office:value-type="string">
            <text:p text:style-name="P134">Имена входного и выходного файлов совпадают</text:p>
          </table:table-cell>
        </table:table-row>
      </table:table>
      <text:p text:style-name="P135"><text:span text:style-name="T163"/></text:p>
      <text:p text:style-name="P136"><text:span text:style-name="T164">Т</text:span><text:span text:style-name="T148">аблица</text:span><text:span text:style-name="T164"> </text:span><text:span text:style-name="T145">11</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32">Ввод</text:p>
          </table:table-cell>
          <table:table-cell table:style-name="Таблица14.B1" office:value-type="string">
            <text:p text:style-name="P133">./a.out --info weather car.nST</text:p>
          </table:table-cell>
        </table:table-row>
        <table:table-row table:style-name="Таблица14.2">
          <table:table-cell table:style-name="Таблица14.A2" office:value-type="string">
            <text:p text:style-name="P132">Вывод </text:p>
          </table:table-cell>
          <table:table-cell table:style-name="Таблица14.B2" office:value-type="string">
            <text:p text:style-name="P134">Опция --info не принимает аргументов.</text:p>
            <text:p text:style-name="P134">weather и последующие аргументы будут проигнорированы.</text:p>
          </table:table-cell>
        </table:table-row>
      </table:table>
      <text:p text:style-name="P135"><text:span text:style-name="T163"/></text:p>
      <text:p text:style-name="P136"><text:span text:style-name="T164">Т</text:span><text:span text:style-name="T148">аблица</text:span><text:span text:style-name="T164"> </text:span><text:span text:style-name="T145">12</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32">Ввод</text:p>
          </table:table-cell>
          <table:table-cell table:style-name="Таблица15.B1" office:value-type="string">
            <text:p text:style-name="P133">./a.out -o -i car.nST</text:p>
          </table:table-cell>
        </table:table-row>
        <table:table-row table:style-name="Таблица15.2">
          <table:table-cell table:style-name="Таблица15.A2" office:value-type="string">
            <text:p text:style-name="P132">Вывод </text:p>
          </table:table-cell>
          <table:table-cell table:style-name="Таблица15.B2" office:value-type="string">
            <text:p text:style-name="P134">Не введено имя выходного файла</text:p>
          </table:table-cell>
        </table:table-row>
      </table:table>
      <text:p text:style-name="P135"><text:span text:style-name="T163"/></text:p>
      <text:p text:style-name="P11">заключение</text:p>
      <text:p text:style-name="P137"/>
      <text:p text:style-name="P138"><text:span text:style-name="T17"><text:tab/></text:span><text:span text:style-name="T165">В рамках курсовой работы создана </text:span><text:span text:style-name="T166">CLI-</text:span><text:span text:style-name="T165">утилита для обработки </text:span><text:span text:style-name="T166">PNG </text:span><text:span text:style-name="T165">изображения, поддерживающая функции рисования квадрата, перестановки фрагментов изображения заданным образом, замены наиболее часто встречаемого цвета. Реализована обработка аргументов командной строки, устранены возможные ошибки. У</text:span><text:span text:style-name="T167">тилита готова к практическому применению, её архитектура позволяет легко расширять функционал.</text:span><text:span text:style-name="T168"> </text:span></text:p>
      <text:p text:style-name="P11">список использованных источников</text:p>
      <text:p text:style-name="P12"/>
      <text:p text:style-name="P139">1. Базовые сведения к выполнению курсовой работы по дисциплине «Программирование». Второй семестр / сост.: М. М. Заславский, А. А. Лисс, А. В. Гаврилов и др.. СПб.: Изд-во СПбГЭТУ «ЛЭТИ», 2024. 36 с.</text:p>
      <text:p text:style-name="P140"><text:span text:style-name="T169">2. A description on how to use and modify libpng. URL: </text:span><text:a xlink:type="simple" xlink:href="http://www.libpng.org/pub/png/libpng-1.2.5-manual.html#section-2" text:style-name="Internet_20_link" text:visited-style-name="Visited_20_Internet_20_Link"><text:span text:style-name="Internet_20_link"><text:span text:style-name="T169">http://www.libpng.org/pub/png/libpng-1.2.5-manual.html#section-2</text:span></text:span></text:a></text:p>
      <text:p text:style-name="P141"><text:span text:style-name="Internet_20_link"><text:span text:style-name="T170">3. </text:span></text:span><text:span text:style-name="Internet_20_link"><text:span text:style-name="T171">Керниган Б.В., Ричи Д.М. Язык </text:span></text:span><text:span text:style-name="Internet_20_link"><text:span text:style-name="T172">C</text:span></text:span><text:span text:style-name="Internet_20_link"><text:span text:style-name="T173">. Спб.: "Невский Диалект", 2001. 352 с</text:span></text:span><text:span text:style-name="Internet_20_link"><text:span text:style-name="T174">.</text:span></text:span></text:p>
      <text:p text:style-name="P142"/>
      <text:p text:style-name="P11">приложение А</text:p>
      <text:p text:style-name="P143">Тестирование</text:p>
      <text:p text:style-name="P144"><text:span text:style-name="T175"/></text:p>
      <text:p text:style-name="P145">Таблица 1<text:span text:style-name="T130">3</text:span></text:p>
      <table:table table:name="Таблица16" table:style-name="Таблица16">
        <table:table-column table:style-name="Таблица16.A"/>
        <table:table-row table:style-name="Таблица16.1">
          <table:table-cell table:style-name="Таблица16.A1" office:value-type="string">
            <text:p text:style-name="P146">Course work for option 4.16, created by Alina Kiseleva</text:p>
            <text:p text:style-name="P146"/>
            <text:p text:style-name="P146"><text:s/>Общие опции:</text:p>
            <text:p text:style-name="P146">--input -i имя входного изображения</text:p>
            <text:p text:style-name="P146">--output -o переопределить имя выходного изображения (по умолчанию out.png)</text:p>
            <text:p text:style-name="P146">--info информация об изображении</text:p>
            <text:p text:style-name="P146">--help -h справка</text:p>
            <text:p text:style-name="P146"/>
            <text:p text:style-name="P146"><text:s/>Флаги функций:</text:p>
            <text:p text:style-name="P146">--square -S рисование квадрата</text:p>
            <text:p text:style-name="P146">--left_up -l координаты левого верхнего угла</text:p>
            <text:p text:style-name="P146">--side_size -s размер стороны</text:p>
            <text:p text:style-name="P146">--thickness -t толщина линий</text:p>
            <text:p text:style-name="P146">--color -C цвет линий / цвет для изменения текущего</text:p>
            <text:p text:style-name="P146">--fill -f заливка</text:p>
            <text:p text:style-name="P146">--fill_color -c цвет заливки</text:p>
            <text:p text:style-name="P146">--exchange -e меняет местами 4 куска заданной области</text:p>
            <text:p text:style-name="P146">--left_up -l координаты левого верхнего угла области</text:p>
            <text:p text:style-name="P146">--right_down -r координаты правого нижнего угла области</text:p>
            <text:p text:style-name="P146">--exchange_type -T способ обмена частей</text:p>
            <text:p text:style-name="P146">--freq_color -F поиск наиболее часто встречаемого цвета и замена его на другой</text:p>
          </table:table-cell>
        </table:table-row>
      </table:table>
      <text:p text:style-name="Standard"/>
      <table:table table:name="Таблица17" table:style-name="Таблица17">
        <table:table-column table:style-name="Таблица17.A"/>
        <table:table-column table:style-name="Таблица17.B"/>
        <text:soft-page-break/>
        <table:table-row table:style-name="Таблица17.1">
          <table:table-cell table:style-name="Таблица17.A1" office:value-type="string">
            <text:p text:style-name="Table_20_Contents"><draw:frame draw:style-name="fr1" draw:name="Изображение9" text:anchor-type="char" svg:x="0.037cm" svg:y="0.067cm" svg:width="8.304cm" svg:height="6.228cm" draw:z-index="5"><draw:image xlink:href="Pictures/10000000000001F4000001775A39AB2C.png" xlink:type="simple" xlink:show="embed" xlink:actuate="onLoad" draw:mime-type="image/png"/></draw:frame></text:p>
          </table:table-cell>
          <table:table-cell table:style-name="Таблица17.A1" office:value-type="string">
            <text:p text:style-name="Table_20_Contents"><draw:frame draw:style-name="fr1" draw:name="Изображение2" text:anchor-type="char" svg:x="0.025cm" svg:y="0.065cm" svg:width="8.308cm" svg:height="6.23cm" draw:z-index="4"><draw:image xlink:href="Pictures/10000000000001F400000177F573185C.png" xlink:type="simple" xlink:show="embed" xlink:actuate="onLoad" draw:mime-type="image/png"/></draw:frame></text:p>
          </table:table-cell>
        </table:table-row>
        <table:table-row>
          <table:table-cell table:style-name="Таблица17.A1" office:value-type="string">
            <text:p text:style-name="P147"><text:span text:style-name="T144">Рисунок</text:span> 2.1.1</text:p>
          </table:table-cell>
          <table:table-cell table:style-name="Таблица17.A1" office:value-type="string">
            <text:p text:style-name="P147"><text:span text:style-name="T144">Рисунок</text:span> 2.1.2 </text:p>
          </table:table-cell>
        </table:table-row>
      </table:table>
      <text:p text:style-name="P148"/>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49"><draw:frame draw:style-name="fr1" draw:name="Изображение10" text:anchor-type="char" svg:x="0.011cm" svg:y="0.079cm" svg:width="8.304cm" svg:height="8.304cm" draw:z-index="8"><draw:image xlink:href="Pictures/1000000000000200000002005BA74D46.png" xlink:type="simple" xlink:show="embed" xlink:actuate="onLoad" draw:mime-type="image/png"/></draw:frame></text:p>
          </table:table-cell>
          <table:table-cell table:style-name="Таблица18.A1" office:value-type="string">
            <text:p text:style-name="P149"><draw:frame draw:style-name="fr1" draw:name="Изображение3" text:anchor-type="char" svg:x="0cm" svg:y="0.053cm" svg:width="8.308cm" svg:height="8.308cm" draw:z-index="6"><draw:image xlink:href="Pictures/1000000000000200000002005058F68F.png" xlink:type="simple" xlink:show="embed" xlink:actuate="onLoad" draw:mime-type="image/png"/></draw:frame></text:p>
          </table:table-cell>
        </table:table-row>
        <table:table-row>
          <table:table-cell table:style-name="Таблица18.A1" office:value-type="string">
            <text:p text:style-name="P150"><text:span text:style-name="T144">Рисунок</text:span> 2.<text:span text:style-name="T152">2.</text:span><text:span text:style-name="T176">1</text:span></text:p>
          </table:table-cell>
          <table:table-cell table:style-name="Таблица18.A1" office:value-type="string">
            <text:p text:style-name="P151"><text:span text:style-name="T144">Рисунок</text:span> 2.<text:span text:style-name="T152">2.</text:span><text:span text:style-name="T176">2 </text:span></text:p>
          </table:table-cell>
        </table:table-row>
      </table:table>
      <text:p text:style-name="P152"/>
      <table:table table:name="Таблица19" table:style-name="Таблица19">
        <table:table-column table:style-name="Таблица19.A"/>
        <table:table-column table:style-name="Таблица19.B"/>
        <text:soft-page-break/>
        <table:table-row table:style-name="Таблица19.1">
          <table:table-cell table:style-name="Таблица19.A1" office:value-type="string">
            <text:p text:style-name="P149"><draw:frame draw:style-name="fr1" draw:name="Изображение5" text:anchor-type="char" svg:x="0.037cm" svg:y="0.079cm" svg:width="8.306cm" svg:height="6.228cm" draw:z-index="1"><draw:image xlink:href="Pictures/10000000000001F4000001778908586A.png" xlink:type="simple" xlink:show="embed" xlink:actuate="onLoad" draw:mime-type="image/png"/></draw:frame></text:p>
          </table:table-cell>
          <table:table-cell table:style-name="Таблица19.A1" office:value-type="string">
            <text:p text:style-name="P149"><draw:frame draw:style-name="fr1" draw:name="Изображение4" text:anchor-type="char" svg:x="0cm" svg:y="0.079cm" svg:width="8.306cm" svg:height="6.228cm" draw:z-index="0"><draw:image xlink:href="Pictures/10000000000001F40000017730BACD3F.png" xlink:type="simple" xlink:show="embed" xlink:actuate="onLoad" draw:mime-type="image/png"/></draw:frame></text:p>
          </table:table-cell>
        </table:table-row>
        <table:table-row>
          <table:table-cell table:style-name="Таблица19.A1" office:value-type="string">
            <text:p text:style-name="P150"><text:span text:style-name="T144">Рисунок</text:span> <text:span text:style-name="T152">3</text:span>.1.<text:span text:style-name="T176">1</text:span></text:p>
          </table:table-cell>
          <table:table-cell table:style-name="Таблица19.A1" office:value-type="string">
            <text:p text:style-name="P153"><text:span text:style-name="T144">Рисунок</text:span> <text:span text:style-name="T176">3</text:span>.<text:span text:style-name="T176">1</text:span><text:span text:style-name="T152">.</text:span><text:span text:style-name="T176">2 </text:span></text:p>
          </table:table-cell>
        </table:table-row>
      </table:table>
      <text:p text:style-name="P152"/>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49"><draw:frame draw:style-name="fr1" draw:name="Изображение6" text:anchor-type="char" svg:x="0cm" svg:y="0.079cm" svg:width="8.306cm" svg:height="6.228cm" draw:z-index="2"><draw:image xlink:href="Pictures/10000000000001F4000001779D7B6AE4.png" xlink:type="simple" xlink:show="embed" xlink:actuate="onLoad" draw:mime-type="image/png"/></draw:frame></text:p>
          </table:table-cell>
          <table:table-cell table:style-name="Таблица20.A1" office:value-type="string">
            <text:p text:style-name="P149"><draw:frame draw:style-name="fr1" draw:name="Изображение7" text:anchor-type="char" svg:x="0cm" svg:y="0.026cm" svg:width="8.306cm" svg:height="6.228cm" draw:z-index="3"><draw:image xlink:href="Pictures/10000000000001F400000177A4047260.png" xlink:type="simple" xlink:show="embed" xlink:actuate="onLoad" draw:mime-type="image/png"/></draw:frame></text:p>
          </table:table-cell>
        </table:table-row>
        <table:table-row table:style-name="Таблица20.2">
          <table:table-cell table:style-name="Таблица20.A1" office:value-type="string">
            <text:p text:style-name="P153"><text:span text:style-name="T144">Рисунок</text:span> <text:span text:style-name="T152">3</text:span>.<text:span text:style-name="T152">2.</text:span><text:span text:style-name="T176">1</text:span></text:p>
          </table:table-cell>
          <table:table-cell table:style-name="Таблица20.A1" office:value-type="string">
            <text:p text:style-name="P153"><text:span text:style-name="T144">Рисунок</text:span> <text:span text:style-name="T152">3</text:span>.<text:span text:style-name="T152">2.</text:span><text:span text:style-name="T176">2</text:span></text:p>
          </table:table-cell>
        </table:table-row>
      </table:table>
      <text:p text:style-name="P152"/>
      <table:table table:name="Таблица21" table:style-name="Таблица21">
        <table:table-column table:style-name="Таблица21.A"/>
        <table:table-column table:style-name="Таблица21.B"/>
        <text:soft-page-break/>
        <table:table-row table:style-name="Таблица21.1">
          <table:table-cell table:style-name="Таблица21.A1" office:value-type="string">
            <text:p text:style-name="P154"><draw:frame draw:style-name="fr2" draw:name="Изображение8" text:anchor-type="char" svg:width="8.304cm" svg:height="6.228cm" draw:z-index="9"><draw:image xlink:href="Pictures/10000000000001F4000001772F8ED33D.png" xlink:type="simple" xlink:show="embed" xlink:actuate="onLoad" draw:mime-type="image/png"/></draw:frame></text:p>
          </table:table-cell>
          <table:table-cell table:style-name="Таблица21.A1" office:value-type="string">
            <text:p text:style-name="P154"><draw:frame draw:style-name="fr3" draw:name="Изображение1" text:anchor-type="char" svg:width="8.308cm" svg:height="6.23cm" draw:z-index="7"><draw:image xlink:href="Pictures/10000000000001F400000177284A9D9F.png" xlink:type="simple" xlink:show="embed" xlink:actuate="onLoad" draw:mime-type="image/png"/></draw:frame></text:p>
          </table:table-cell>
        </table:table-row>
        <table:table-row table:style-name="Таблица21.2">
          <table:table-cell table:style-name="Таблица21.A1" office:value-type="string">
            <text:p text:style-name="P153"><text:span text:style-name="T144">Рисунок</text:span> <text:span text:style-name="T142">4.1</text:span><text:span text:style-name="T151">.1</text:span></text:p>
          </table:table-cell>
          <table:table-cell table:style-name="Таблица21.A1" office:value-type="string">
            <text:p text:style-name="P153"><text:span text:style-name="T144">Рисунок</text:span> <text:span text:style-name="T162">4</text:span>.<text:span text:style-name="T162">1</text:span><text:span text:style-name="T152">.</text:span><text:span text:style-name="T162">2</text:span></text:p>
          </table:table-cell>
        </table:table-row>
      </table:table>
      <text:p text:style-name="P155"/>
      <text:p text:style-name="P156">ПРИЛОЖЕНИЕ Б</text:p>
      <text:p text:style-name="P157">КОД ПРОГРАММЫ</text:p>
      <text:p text:style-name="P157"/>
      <text:p text:style-name="P158">#include &lt;stdio.h&gt;</text:p>
      <text:p text:style-name="P159">#include &lt;stdlib.h&gt;</text:p>
      <text:p text:style-name="P159">#include &lt;string.h&gt;</text:p>
      <text:p text:style-name="P159">#include &lt;stdbool.h&gt;</text:p>
      <text:p text:style-name="P159">#include &lt;getopt.h&gt;</text:p>
      <text:p text:style-name="P159">#include &lt;unistd.h&gt;</text:p>
      <text:p text:style-name="P159">#include &lt;png.h&gt;</text:p>
      <text:p text:style-name="P159">#define SZ_OPTSTR 30</text:p>
      <text:p text:style-name="P159">#define OPT_INFO 0</text:p>
      <text:p text:style-name="P159">#define NUM_COORDS 2</text:p>
      <text:p text:style-name="P159">#define SZ_OUTPUT 8</text:p>
      <text:p text:style-name="P159">#define SZ_INPUT 8</text:p>
      <text:p text:style-name="P159">#define NUM_FLAGS 17</text:p>
      <text:p text:style-name="P159">#define LEN_HEADER 8</text:p>
      <text:p text:style-name="P159">#define NUM_RGB 3</text:p>
      <text:p text:style-name="P159">#define NUM_COLORS_RGB 0x1000000 // 256^3</text:p>
      <text:p text:style-name="P159">#define IMG_READ 1</text:p>
      <text:p text:style-name="P159">#define IMG_NOT_READ 0</text:p>
      <text:p text:style-name="P159">#define CORRECT_COLOR 1</text:p>
      <text:p text:style-name="P159">#define WRONG_COLOR 0</text:p>
      <text:p text:style-name="P159">#define FUNC_11 0xFF00 <text:s/>// 0b1111111100000000</text:p>
      <text:p text:style-name="P159">#define FUNC_12 0xFC00 <text:s/>// 0b1111110000000000</text:p>
      <text:p text:style-name="P159">#define FUNC_2 0xA0E0 <text:s text:c="2"/>// 0b1010000011100000</text:p>
      <text:p text:style-name="P159">#define FUNC_3 0x8410 <text:s text:c="2"/>// 0b1000010000010000</text:p>
      <text:p text:style-name="P159">#define FUNC_4 0x800E <text:s text:c="2"/>// 0b1000000000001110</text:p>
      <text:p text:style-name="P160"/>
      <text:p text:style-name="P159">enum error_types{</text:p>
      <text:p text:style-name="P161"><text:s text:c="8"/><text:span text:style-name="T177">ERR_OK = 0,</text:span></text:p>
      <text:p text:style-name="P161"><text:s text:c="8"/><text:span text:style-name="T177">ERR_MEM = 40,</text:span></text:p>
      <text:p text:style-name="P161"><text:s text:c="8"/><text:span text:style-name="T177">ERR_OPT,</text:span></text:p>
      <text:p text:style-name="P161"><text:s text:c="8"/><text:span text:style-name="T177">ERR_COLOR,</text:span></text:p>
      <text:p text:style-name="P161"><text:s text:c="8"/><text:span text:style-name="T177">ERR_SIGNATURE,</text:span></text:p>
      <text:p text:style-name="P161"><text:s text:c="8"/><text:span text:style-name="T177">ERR_COORDS,</text:span></text:p>
      <text:p text:style-name="P161"><text:s text:c="8"/><text:span text:style-name="T177">ERR_IMG_TYPE,</text:span></text:p>
      <text:p text:style-name="P161"><text:s text:c="8"/><text:span text:style-name="T177">ERR_INPUT_NAME,</text:span></text:p>
      <text:p text:style-name="P161"><text:s text:c="8"/><text:span text:style-name="T177">ERR_OUTPUT_NAME,</text:span></text:p>
      <text:p text:style-name="P161"><text:soft-page-break/><text:s text:c="8"/><text:span text:style-name="T177">ERR_EXCH_TYPE,</text:span></text:p>
      <text:p text:style-name="P161"><text:s text:c="8"/><text:span text:style-name="T177">ERR_IMG_READ</text:span></text:p>
      <text:p text:style-name="P159">};</text:p>
      <text:p text:style-name="P160"/>
      <text:p text:style-name="P159">struct Png{ </text:p>
      <text:p text:style-name="P161"><text:s text:c="8"/><text:span text:style-name="T177">int width, height; </text:span></text:p>
      <text:p text:style-name="P161"><text:s text:c="8"/><text:span text:style-name="T177">png_byte color_type; </text:span></text:p>
      <text:p text:style-name="P161"><text:s text:c="8"/><text:span text:style-name="T177">png_byte bit_depth; </text:span></text:p>
      <text:p text:style-name="P161"><text:s text:c="8"/><text:span text:style-name="T177">png_structp png_ptr; </text:span></text:p>
      <text:p text:style-name="P161"><text:s text:c="8"/><text:span text:style-name="T177">png_infop info_ptr; </text:span></text:p>
      <text:p text:style-name="P161"><text:s text:c="8"/><text:span text:style-name="T177">int number_of_passes; </text:span></text:p>
      <text:p text:style-name="P161"><text:s text:c="8"/><text:span text:style-name="T177">png_bytep* row_pointers; </text:span></text:p>
      <text:p text:style-name="P159">}; </text:p>
      <text:p text:style-name="P160"/>
      <text:p text:style-name="P159">struct RGB{</text:p>
      <text:p text:style-name="P161"><text:s text:c="8"/><text:span text:style-name="T177">int R;</text:span></text:p>
      <text:p text:style-name="P161"><text:s text:c="8"/><text:span text:style-name="T177">int G;</text:span></text:p>
      <text:p text:style-name="P161"><text:s text:c="8"/><text:span text:style-name="T177">int B;</text:span></text:p>
      <text:p text:style-name="P159">};</text:p>
      <text:p text:style-name="P160"/>
      <text:p text:style-name="P159">struct point{</text:p>
      <text:p text:style-name="P161"><text:s text:c="8"/><text:span text:style-name="T177">int x;</text:span></text:p>
      <text:p text:style-name="P161"><text:s text:c="8"/><text:span text:style-name="T177">int y;</text:span></text:p>
      <text:p text:style-name="P159">};</text:p>
      <text:p text:style-name="P160"/>
      <text:p text:style-name="P159">struct contrast_data{</text:p>
      <text:p text:style-name="P161"><text:s text:c="8"/><text:span text:style-name="T177">double alpha;</text:span></text:p>
      <text:p text:style-name="P161"><text:s text:c="8"/><text:span text:style-name="T177">int beta;</text:span></text:p>
      <text:p text:style-name="P159">};</text:p>
      <text:p text:style-name="P160"/>
      <text:p text:style-name="P159">struct square_data{</text:p>
      <text:p text:style-name="P161"><text:s text:c="8"/><text:span text:style-name="T177">struct point* left_up;</text:span></text:p>
      <text:p text:style-name="P161"><text:s text:c="8"/><text:span text:style-name="T177">int side_size;</text:span></text:p>
      <text:p text:style-name="P161"><text:s text:c="8"/><text:span text:style-name="T177">int thickness;</text:span></text:p>
      <text:p text:style-name="P161"><text:s text:c="8"/><text:span text:style-name="T177">struct RGB* color;</text:span></text:p>
      <text:p text:style-name="P161"><text:s text:c="8"/><text:span text:style-name="T177">bool fill;</text:span></text:p>
      <text:p text:style-name="P161"><text:s text:c="8"/><text:span text:style-name="T177">struct RGB* fill_color;</text:span></text:p>
      <text:p text:style-name="P159">};</text:p>
      <text:p text:style-name="P160"/>
      <text:p text:style-name="P159">struct exchange_data{</text:p>
      <text:p text:style-name="P161"><text:s text:c="8"/><text:span text:style-name="T177">struct point* left_up;</text:span></text:p>
      <text:p text:style-name="P161"><text:soft-page-break/><text:s text:c="8"/><text:span text:style-name="T177">struct point* right_down;</text:span></text:p>
      <text:p text:style-name="P161"><text:s text:c="8"/><text:span text:style-name="T177">char* type;</text:span></text:p>
      <text:p text:style-name="P159">};</text:p>
      <text:p text:style-name="P160"/>
      <text:p text:style-name="P159">struct change_color{</text:p>
      <text:p text:style-name="P161"><text:s text:c="8"/><text:span text:style-name="T177">struct RGB* new_color;</text:span></text:p>
      <text:p text:style-name="P159">};</text:p>
      <text:p text:style-name="P160"/>
      <text:p text:style-name="P159">struct options_flags{</text:p>
      <text:p text:style-name="P161"><text:s text:c="8"/><text:span text:style-name="T177">unsigned iname_flag:1;</text:span></text:p>
      <text:p text:style-name="P160"/>
      <text:p text:style-name="P161"><text:s text:c="8"/><text:span text:style-name="T177">unsigned sqr_flag:1;</text:span></text:p>
      <text:p text:style-name="P161"><text:s text:c="8"/><text:span text:style-name="T177">unsigned lft_up_flag:1;</text:span></text:p>
      <text:p text:style-name="P161"><text:s text:c="8"/><text:span text:style-name="T177">unsigned sd_sz_flag:1;</text:span></text:p>
      <text:p text:style-name="P161"><text:s text:c="8"/><text:span text:style-name="T177">unsigned thkns_flag:1;</text:span></text:p>
      <text:p text:style-name="P161"><text:s text:c="8"/><text:span text:style-name="T177">unsigned clr_flag:1;</text:span></text:p>
      <text:p text:style-name="P161"><text:s text:c="8"/><text:span text:style-name="T177">unsigned fill_flag:1;</text:span></text:p>
      <text:p text:style-name="P161"><text:s text:c="8"/><text:span text:style-name="T177">unsigned fill_clr_flag:1;</text:span></text:p>
      <text:p text:style-name="P161"><text:s text:c="8"/><text:span text:style-name="T177">unsigned exchg_flag:1;</text:span></text:p>
      <text:p text:style-name="P161"><text:s text:c="8"/><text:span text:style-name="T177">unsigned rt_dwn_flag:1;</text:span></text:p>
      <text:p text:style-name="P161"><text:s text:c="8"/><text:span text:style-name="T177">unsigned exchg_t_flag:1;</text:span></text:p>
      <text:p text:style-name="P161"><text:s text:c="8"/><text:span text:style-name="T177">unsigned fq_clr_flag:1;</text:span></text:p>
      <text:p text:style-name="P161"><text:s text:c="8"/></text:p>
      <text:p text:style-name="P161"><text:s text:c="8"/><text:span text:style-name="T177">unsigned contr_flag:1;</text:span></text:p>
      <text:p text:style-name="P161"><text:s text:c="8"/><text:span text:style-name="T177">unsigned a_flag:1;</text:span></text:p>
      <text:p text:style-name="P161"><text:s text:c="8"/><text:span text:style-name="T177">unsigned b_flag:1;</text:span></text:p>
      <text:p text:style-name="P160"/>
      <text:p text:style-name="P161"><text:s text:c="8"/><text:span text:style-name="T177">unsigned err:1;</text:span></text:p>
      <text:p text:style-name="P159">};</text:p>
      <text:p text:style-name="P160"/>
      <text:p text:style-name="P159">union get_flags{</text:p>
      <text:p text:style-name="P161"><text:s text:c="8"/><text:span text:style-name="T177">struct options_flags inp_flags;</text:span></text:p>
      <text:p text:style-name="P161"><text:s text:c="8"/><text:span text:style-name="T177">struct{</text:span></text:p>
      <text:p text:style-name="P161"><text:s text:c="16"/><text:span text:style-name="T177">unsigned iname_bit:1;</text:span></text:p>
      <text:p text:style-name="P161"><text:s text:c="16"/><text:span text:style-name="T177">unsigned square_bit:1;</text:span></text:p>
      <text:p text:style-name="P161"><text:s text:c="16"/><text:span text:style-name="T177">unsigned lft_up_bit:1;</text:span></text:p>
      <text:p text:style-name="P161"><text:s text:c="16"/><text:span text:style-name="T177">unsigned sd_sz_bit:1;</text:span></text:p>
      <text:p text:style-name="P161"><text:s text:c="16"/><text:span text:style-name="T177">unsigned thkns_bit:1;</text:span></text:p>
      <text:p text:style-name="P161"><text:s text:c="16"/><text:span text:style-name="T177">unsigned clr_bit:1;</text:span></text:p>
      <text:p text:style-name="P161"><text:s text:c="16"/><text:span text:style-name="T177">unsigned fill_bit:1;</text:span></text:p>
      <text:p text:style-name="P161"><text:s text:c="16"/><text:span text:style-name="T177">unsigned fill_clr_bit:1;</text:span></text:p>
      <text:p text:style-name="P161"><text:soft-page-break/><text:s text:c="16"/><text:span text:style-name="T177">unsigned exchg_bit:1;</text:span></text:p>
      <text:p text:style-name="P161"><text:s text:c="16"/><text:span text:style-name="T177">unsigned rt_dwn_bit:1;</text:span></text:p>
      <text:p text:style-name="P161"><text:s text:c="16"/><text:span text:style-name="T177">unsigned exchg_t_bit:1;</text:span></text:p>
      <text:p text:style-name="P161"><text:s text:c="16"/><text:span text:style-name="T177">unsigned fq_clr_bit:1;</text:span></text:p>
      <text:p text:style-name="P161"><text:s text:c="16"/><text:span text:style-name="T177">unsigned contr_bit:1;</text:span></text:p>
      <text:p text:style-name="P161"><text:s text:c="16"/><text:span text:style-name="T177">unsigned a_bit:1;</text:span></text:p>
      <text:p text:style-name="P161"><text:s text:c="16"/><text:span text:style-name="T177">unsigned b_bit:1;</text:span></text:p>
      <text:p text:style-name="P161"><text:s text:c="16"/><text:span text:style-name="T177">unsigned err_bit:1;</text:span></text:p>
      <text:p text:style-name="P161"><text:s text:c="8"/><text:span text:style-name="T177">}bits;</text:span></text:p>
      <text:p text:style-name="P159">};</text:p>
      <text:p text:style-name="P160"/>
      <text:p text:style-name="P159">int check_input_data(struct options_flags flags){</text:p>
      <text:p text:style-name="P161"><text:s text:c="8"/><text:span text:style-name="T177">int checker = 0;</text:span></text:p>
      <text:p text:style-name="P160"/>
      <text:p text:style-name="P161"><text:s text:c="8"/><text:span text:style-name="T177">int expected_func_11 = FUNC_11;</text:span></text:p>
      <text:p text:style-name="P161"><text:s text:c="8"/><text:span text:style-name="T177">int expected_func_12 = FUNC_12;</text:span></text:p>
      <text:p text:style-name="P161"><text:s text:c="8"/><text:span text:style-name="T177">int expected_func_2 = FUNC_2;</text:span></text:p>
      <text:p text:style-name="P161"><text:s text:c="8"/><text:span text:style-name="T177">int expected_func_3 = FUNC_3;</text:span></text:p>
      <text:p text:style-name="P161"><text:s text:c="8"/><text:span text:style-name="T177">int expected_func_4 = FUNC_4;</text:span></text:p>
      <text:p text:style-name="P161"><text:s text:c="8"/></text:p>
      <text:p text:style-name="P161"><text:s text:c="8"/><text:span text:style-name="T177">union get_flags my_flags;</text:span></text:p>
      <text:p text:style-name="P161"><text:s text:c="8"/><text:span text:style-name="T177">my_flags.inp_flags = flags;</text:span></text:p>
      <text:p text:style-name="P160"/>
      <text:p text:style-name="P161"><text:s text:c="8"/><text:span text:style-name="T177">unsigned short* bits = (unsigned short*)&amp;my_flags.bits;</text:span></text:p>
      <text:p text:style-name="P161"><text:s text:c="8"/><text:span text:style-name="T177">int received_flags = 0;</text:span></text:p>
      <text:p text:style-name="P160"/>
      <text:p text:style-name="P161"><text:s text:c="8"/><text:span text:style-name="T177">for (int i=0; i&lt;16; i++)</text:span></text:p>
      <text:p text:style-name="P161"><text:s text:c="16"/><text:span text:style-name="T177">received_flags |= ((*bits &gt;&gt; i) &amp; 1) &lt;&lt; (15 - i);</text:span></text:p>
      <text:p text:style-name="P160"/>
      <text:p text:style-name="P161"><text:s text:c="8"/><text:span text:style-name="T177">if (((received_flags &amp; expected_func_11) == expected_func_11) || ((received_flags &amp; expected_func_12) == expected_func_12))</text:span></text:p>
      <text:p text:style-name="P161"><text:s text:c="16"/><text:span text:style-name="T177">checker = 1;</text:span></text:p>
      <text:p text:style-name="P161"><text:s text:c="8"/><text:span text:style-name="T177">else if ((received_flags &amp; expected_func_2) == expected_func_2)</text:span></text:p>
      <text:p text:style-name="P161"><text:s text:c="16"/><text:span text:style-name="T177">checker = 2;</text:span></text:p>
      <text:p text:style-name="P161"><text:s text:c="8"/><text:span text:style-name="T177">else if ((received_flags &amp; expected_func_3) == expected_func_3)</text:span></text:p>
      <text:p text:style-name="P161"><text:s text:c="16"/><text:span text:style-name="T177">checker = 3;</text:span></text:p>
      <text:p text:style-name="P161"><text:soft-page-break/><text:s text:c="8"/><text:span text:style-name="T177">else if ((received_flags &amp; expected_func_4) == expected_func_4)</text:span></text:p>
      <text:p text:style-name="P161"><text:s text:c="16"/><text:span text:style-name="T177">checker = 4;</text:span></text:p>
      <text:p text:style-name="P160"/>
      <text:p text:style-name="P161"><text:s text:c="8"/><text:span text:style-name="T177">return checker;</text:span></text:p>
      <text:p text:style-name="P159">}</text:p>
      <text:p text:style-name="P160"/>
      <text:p text:style-name="P159">int check_color(int R, int G, int B){</text:p>
      <text:p text:style-name="P161"><text:s text:c="8"/><text:span text:style-name="T177">return ((R&gt;=0 &amp;&amp; R&lt;256) &amp;&amp; (G&gt;=0 &amp;&amp; G&lt;256) &amp;&amp; (B&gt;=0 &amp;&amp; B&lt;256)) ? CORRECT_COLOR : WRONG_COLOR;</text:span></text:p>
      <text:p text:style-name="P159">}</text:p>
      <text:p text:style-name="P160"/>
      <text:p text:style-name="P159">void print_help(){</text:p>
      <text:p text:style-name="P161"><text:s text:c="8"/><text:span text:style-name="T177">printf("\n\tОбщие опции:\n");</text:span></text:p>
      <text:p text:style-name="P161"><text:s text:c="8"/><text:span text:style-name="T177">printf("--input -i имя входного изображения\n");</text:span></text:p>
      <text:p text:style-name="P161"><text:s text:c="8"/><text:span text:style-name="T177">printf("--output -o переопределить имя выходного изображения (по умолчанию out.png)\n");</text:span></text:p>
      <text:p text:style-name="P161"><text:s text:c="8"/><text:span text:style-name="T177">printf("--info информация об изображении\n");</text:span></text:p>
      <text:p text:style-name="P161"><text:s text:c="8"/><text:span text:style-name="T177">printf("--help -h справка\n\n");</text:span></text:p>
      <text:p text:style-name="P161"><text:s text:c="8"/><text:span text:style-name="T177">printf("\tФлаги функций:\n");</text:span></text:p>
      <text:p text:style-name="P161"><text:s text:c="8"/><text:span text:style-name="T177">printf("--square -S рисование квадрата\n");</text:span></text:p>
      <text:p text:style-name="P161"><text:s text:c="8"/><text:span text:style-name="T177">printf("--left_up -l координаты левого верхнего угла\n");</text:span></text:p>
      <text:p text:style-name="P161"><text:s text:c="8"/><text:span text:style-name="T177">printf("--side_size -s размер стороны\n");</text:span></text:p>
      <text:p text:style-name="P161"><text:s text:c="8"/><text:span text:style-name="T177">printf("--thickness -t толщина линий\n");</text:span></text:p>
      <text:p text:style-name="P161"><text:s text:c="8"/><text:span text:style-name="T177">printf("--color -C цвет линий / цвет для изменения текущего\n");</text:span></text:p>
      <text:p text:style-name="P161"><text:s text:c="8"/><text:span text:style-name="T177">printf("--fill -f заливка\n");</text:span></text:p>
      <text:p text:style-name="P161"><text:s text:c="8"/><text:span text:style-name="T177">printf("--fill_color -c цвет заливки\n");</text:span></text:p>
      <text:p text:style-name="P161"><text:s text:c="8"/><text:span text:style-name="T177">printf("--exchange -e меняет местами 4 куска заданной области\n");</text:span></text:p>
      <text:p text:style-name="P161"><text:s text:c="8"/><text:span text:style-name="T177">printf("--left_up -l координаты левого верхнего угла области\n");</text:span></text:p>
      <text:p text:style-name="P161"><text:s text:c="8"/><text:span text:style-name="T177">printf("--right_down -r координаты правого нижнего угла области\n");</text:span></text:p>
      <text:p text:style-name="P161"><text:s text:c="8"/><text:span text:style-name="T177">printf("--exchange_type -T способ обмена частей\n");</text:span></text:p>
      <text:p text:style-name="P161"><text:s text:c="8"/><text:span text:style-name="T177">printf("--freq_color -F поиск наиболее часто встречаемого цвета и замена его на другой\n\n");</text:span></text:p>
      <text:p text:style-name="P159">}</text:p>
      <text:p text:style-name="P160"/>
      <text:p text:style-name="P159"><text:soft-page-break/>void print_png_info(struct Png* img){</text:p>
      <text:p text:style-name="P161"><text:s text:c="8"/><text:span text:style-name="T177">printf("Информация об изображении: \n\n");</text:span></text:p>
      <text:p text:style-name="P161"><text:s text:c="8"/><text:span text:style-name="T177">printf("Ширина: %d пикселей\n", img-&gt;width);</text:span></text:p>
      <text:p text:style-name="P161"><text:s text:c="8"/><text:span text:style-name="T177">printf("Высота: %d пикселей\n", img-&gt;height);</text:span></text:p>
      <text:p text:style-name="P161"><text:s text:c="8"/><text:span text:style-name="T177">printf("Цветовая модель: ");</text:span></text:p>
      <text:p text:style-name="P160"/>
      <text:p text:style-name="P161"><text:s text:c="8"/><text:span text:style-name="T177">switch(img-&gt;color_type){</text:span></text:p>
      <text:p text:style-name="P161"><text:s text:c="16"/><text:span text:style-name="T177">case PNG_COLOR_TYPE_GRAY:</text:span></text:p>
      <text:p text:style-name="P161"><text:s text:c="24"/><text:span text:style-name="T177">printf("grayscale (1 канал)\n");</text:span></text:p>
      <text:p text:style-name="P161"><text:s text:c="24"/><text:span text:style-name="T177">break;</text:span></text:p>
      <text:p text:style-name="P161"><text:s text:c="16"/><text:span text:style-name="T177">case PNG_COLOR_TYPE_RGB:</text:span></text:p>
      <text:p text:style-name="P161"><text:s text:c="24"/><text:span text:style-name="T177">printf("RGB (3 канала)\n");</text:span></text:p>
      <text:p text:style-name="P161"><text:s text:c="24"/><text:span text:style-name="T177">break;</text:span></text:p>
      <text:p text:style-name="P161"><text:s text:c="16"/><text:span text:style-name="T177">case PNG_COLOR_TYPE_GRAY_ALPHA:</text:span></text:p>
      <text:p text:style-name="P161"><text:s text:c="24"/><text:span text:style-name="T177">printf("grayscale + alpha (2 канала)\n");</text:span></text:p>
      <text:p text:style-name="P161"><text:s text:c="24"/><text:span text:style-name="T177">break;</text:span></text:p>
      <text:p text:style-name="P161"><text:s text:c="16"/><text:span text:style-name="T177">case PNG_COLOR_TYPE_RGBA:</text:span></text:p>
      <text:p text:style-name="P161"><text:s text:c="24"/><text:span text:style-name="T177">printf("RGBA (4 канала)\n");</text:span></text:p>
      <text:p text:style-name="P161"><text:s text:c="24"/><text:span text:style-name="T177">break;</text:span></text:p>
      <text:p text:style-name="P161"><text:s text:c="16"/><text:span text:style-name="T177">default:</text:span></text:p>
      <text:p text:style-name="P161"><text:s text:c="24"/><text:span text:style-name="T177">printf("неизвестный тип\n");</text:span></text:p>
      <text:p text:style-name="P161"><text:s text:c="24"/><text:span text:style-name="T177">break;</text:span></text:p>
      <text:p text:style-name="P161"><text:s text:c="8"/><text:span text:style-name="T177">}</text:span></text:p>
      <text:p text:style-name="P161"><text:s text:c="8"/></text:p>
      <text:p text:style-name="P161"><text:s text:c="8"/><text:span text:style-name="T177">printf("Глубина цвета: %d бит/пиксель\n", img-&gt;bit_depth);</text:span></text:p>
      <text:p text:style-name="P161"><text:s text:c="8"/><text:span text:style-name="T177">printf("Количество проходов для полной загрузки: %d\n", img-&gt;number_of_passes);</text:span></text:p>
      <text:p text:style-name="P159">}</text:p>
      <text:p text:style-name="P160"/>
      <text:p text:style-name="P159">int read_image(struct Png* image, char* filename, enum error_types* err){</text:p>
      <text:p text:style-name="P161"><text:s text:c="8"/><text:span text:style-name="T177">FILE* file = fopen(filename, "rb");</text:span></text:p>
      <text:p text:style-name="P161"><text:s text:c="8"/><text:span text:style-name="T177">if (file){</text:span></text:p>
      <text:p text:style-name="P161"><text:s text:c="16"/><text:span text:style-name="T177">png_byte header[LEN_HEADER] = {0};</text:span></text:p>
      <text:p text:style-name="P161"><text:s text:c="16"/><text:span text:style-name="T177">fread(header, 1, 8, file);</text:span></text:p>
      <text:p text:style-name="P160"/>
      <text:p text:style-name="P161"><text:s text:c="16"/><text:span text:style-name="T177">if (!png_sig_cmp(header, 0, 8)){</text:span></text:p>
      <text:p text:style-name="P161"><text:soft-page-break/><text:s text:c="24"/><text:span text:style-name="T177">image-&gt;png_ptr = png_create_read_struct(PNG_LIBPNG_VER_STRING, NULL, NULL, NULL);</text:span></text:p>
      <text:p text:style-name="P161"><text:s text:c="24"/><text:span text:style-name="T177">image-&gt;info_ptr = png_create_info_struct(image-&gt;png_ptr);</text:span></text:p>
      <text:p text:style-name="P161"><text:s text:c="24"/></text:p>
      <text:p text:style-name="P161"><text:s text:c="24"/><text:span text:style-name="T177">if (image-&gt;png_ptr &amp;&amp; image-&gt;info_ptr){</text:span></text:p>
      <text:p text:style-name="P161"><text:s text:c="32"/><text:span text:style-name="T177">png_init_io(image-&gt;png_ptr, file);</text:span></text:p>
      <text:p text:style-name="P161"><text:s text:c="32"/><text:span text:style-name="T177">png_set_sig_bytes(image-&gt;png_ptr, LEN_HEADER);</text:span></text:p>
      <text:p text:style-name="P161"><text:s text:c="32"/><text:span text:style-name="T177">png_read_info(image-&gt;png_ptr, image-&gt;info_ptr);</text:span></text:p>
      <text:p text:style-name="P161"><text:s text:c="32"/><text:span text:style-name="T177">image-&gt;width = png_get_image_width(image-&gt;png_ptr, image-&gt;info_ptr);</text:span></text:p>
      <text:p text:style-name="P161"><text:s text:c="32"/><text:span text:style-name="T177">image-&gt;height = png_get_image_height(image-&gt;png_ptr, image-&gt;info_ptr);</text:span></text:p>
      <text:p text:style-name="P161"><text:s text:c="32"/><text:span text:style-name="T177">image-&gt;color_type = png_get_color_type(image-&gt;png_ptr,image-&gt;info_ptr);</text:span></text:p>
      <text:p text:style-name="P161"><text:s text:c="32"/><text:span text:style-name="T177">image-&gt;bit_depth = png_get_bit_depth(image-&gt;png_ptr, image-&gt;info_ptr);</text:span></text:p>
      <text:p text:style-name="P161"><text:s text:c="32"/><text:span text:style-name="T177">image-&gt;number_of_passes = png_set_interlace_handling(image-&gt;png_ptr);</text:span></text:p>
      <text:p text:style-name="P161"><text:s text:c="32"/><text:span text:style-name="T177">png_read_update_info(image-&gt;png_ptr, image-&gt;info_ptr);</text:span></text:p>
      <text:p text:style-name="P160"/>
      <text:p text:style-name="P161"><text:s text:c="32"/><text:span text:style-name="T177">image-&gt;row_pointers = (png_bytep*)malloc(sizeof(png_bytep)*image-&gt;height);</text:span></text:p>
      <text:p text:style-name="P161"><text:s text:c="32"/><text:span text:style-name="T177">if (image-&gt;row_pointers){</text:span></text:p>
      <text:p text:style-name="P161"><text:s text:c="40"/><text:span text:style-name="T177">for (int y = 0; y &lt; image-&gt;height; y++){</text:span></text:p>
      <text:p text:style-name="P161"><text:s text:c="48"/><text:span text:style-name="T177">image-&gt;row_pointers[y] = (png_byte*)malloc(png_get_rowbytes(image-&gt;png_ptr, image-&gt;info_ptr));</text:span></text:p>
      <text:p text:style-name="P161"><text:s text:c="48"/><text:span text:style-name="T177">if (image-&gt;row_pointers[y] == NULL)</text:span></text:p>
      <text:p text:style-name="P161"><text:s text:c="56"/><text:span text:style-name="T177">*err = ERR_MEM;</text:span></text:p>
      <text:p text:style-name="P161"><text:s text:c="40"/><text:span text:style-name="T177">}</text:span></text:p>
      <text:p text:style-name="P161"><text:soft-page-break/><text:s text:c="40"/><text:span text:style-name="T177">if (*err == ERR_OK)</text:span></text:p>
      <text:p text:style-name="P161"><text:s text:c="48"/><text:span text:style-name="T177">png_read_image(image-&gt;png_ptr, image-&gt;row_pointers);</text:span></text:p>
      <text:p text:style-name="P161"><text:s text:c="40"/><text:span text:style-name="T177">else *err = ERR_IMG_READ;</text:span></text:p>
      <text:p text:style-name="P160"/>
      <text:p text:style-name="P161"><text:s text:c="32"/><text:span text:style-name="T177">} else {</text:span></text:p>
      <text:p text:style-name="P161"><text:s text:c="40"/><text:span text:style-name="T177">printf("Ошибка памяти\n");</text:span></text:p>
      <text:p text:style-name="P161"><text:s text:c="40"/><text:span text:style-name="T177">*err = ERR_MEM;</text:span></text:p>
      <text:p text:style-name="P161"><text:s text:c="32"/><text:span text:style-name="T177">}</text:span></text:p>
      <text:p text:style-name="P160"/>
      <text:p text:style-name="P161"><text:s text:c="24"/><text:span text:style-name="T177">} else {</text:span></text:p>
      <text:p text:style-name="P161"><text:s text:c="32"/><text:span text:style-name="T177">printf("Ошибка выделения памяти для структуры на чтение PNG\n");</text:span></text:p>
      <text:p text:style-name="P161"><text:s text:c="32"/><text:span text:style-name="T177">*err = ERR_MEM;</text:span></text:p>
      <text:p text:style-name="P161"><text:s text:c="24"/><text:span text:style-name="T177">}</text:span></text:p>
      <text:p text:style-name="P160"/>
      <text:p text:style-name="P161"><text:s text:c="24"/><text:span text:style-name="T177">png_destroy_read_struct(&amp;(image-&gt;png_ptr), &amp;(image-&gt;info_ptr), NULL);</text:span></text:p>
      <text:p text:style-name="P161"><text:s text:c="24"/><text:span text:style-name="T177">png_destroy_info_struct(image-&gt;png_ptr, &amp;(image-&gt;info_ptr));</text:span></text:p>
      <text:p text:style-name="P160"/>
      <text:p text:style-name="P161"><text:s text:c="16"/><text:span text:style-name="T177">} else {</text:span></text:p>
      <text:p text:style-name="P161"><text:s text:c="24"/><text:span text:style-name="T177">printf("Входное изображение не соответсвует PNG формату\n");</text:span></text:p>
      <text:p text:style-name="P161"><text:s text:c="24"/><text:span text:style-name="T177">*err = ERR_SIGNATURE;</text:span></text:p>
      <text:p text:style-name="P161"><text:s text:c="16"/><text:span text:style-name="T177">}</text:span></text:p>
      <text:p text:style-name="P161"><text:s text:c="16"/></text:p>
      <text:p text:style-name="P161"><text:s text:c="16"/><text:span text:style-name="T177">fclose(file);</text:span></text:p>
      <text:p text:style-name="P160"/>
      <text:p text:style-name="P161"><text:s text:c="8"/><text:span text:style-name="T177">} else {</text:span></text:p>
      <text:p text:style-name="P161"><text:s text:c="16"/><text:span text:style-name="T177">printf("Входной файл отсутствует в текущей директории\n");</text:span></text:p>
      <text:p text:style-name="P161"><text:s text:c="16"/><text:span text:style-name="T177">*err = ERR_MEM; </text:span></text:p>
      <text:p text:style-name="P161"><text:s text:c="8"/><text:span text:style-name="T177">}</text:span></text:p>
      <text:p text:style-name="P160"/>
      <text:p text:style-name="P161"><text:s text:c="8"/><text:span text:style-name="T177">return (*err == ERR_OK) ? IMG_READ : IMG_NOT_READ;</text:span></text:p>
      <text:p text:style-name="P159">}</text:p>
      <text:p text:style-name="P160"><text:soft-page-break/></text:p>
      <text:p text:style-name="P159">void write_image(struct Png* image, char* filename, enum error_types* err){</text:p>
      <text:p text:style-name="P161"><text:s text:c="8"/><text:span text:style-name="T177">FILE* file = fopen(filename, "wb");</text:span></text:p>
      <text:p text:style-name="P161"><text:s text:c="8"/><text:span text:style-name="T177">if (file){</text:span></text:p>
      <text:p text:style-name="P161"><text:s text:c="16"/><text:span text:style-name="T177">image-&gt;png_ptr = png_create_write_struct(PNG_LIBPNG_VER_STRING, NULL, NULL, NULL);</text:span></text:p>
      <text:p text:style-name="P161"><text:s text:c="16"/><text:span text:style-name="T177">image-&gt;info_ptr = png_create_info_struct(image-&gt;png_ptr);</text:span></text:p>
      <text:p text:style-name="P160"/>
      <text:p text:style-name="P161"><text:s text:c="16"/><text:span text:style-name="T177">if (image-&gt;png_ptr &amp;&amp; image-&gt;info_ptr){</text:span></text:p>
      <text:p text:style-name="P161"><text:s text:c="24"/><text:span text:style-name="T177">png_init_io(image-&gt;png_ptr, file);</text:span></text:p>
      <text:p text:style-name="P161"><text:s text:c="24"/><text:span text:style-name="T177">png_set_IHDR(image-&gt;png_ptr, </text:span></text:p>
      <text:p text:style-name="P161"><text:s text:c="40"/><text:span text:style-name="T177">image-&gt;info_ptr, </text:span></text:p>
      <text:p text:style-name="P161"><text:s text:c="40"/><text:span text:style-name="T177">image-&gt;width, </text:span></text:p>
      <text:p text:style-name="P161"><text:s text:c="40"/><text:span text:style-name="T177">image-&gt;height, </text:span></text:p>
      <text:p text:style-name="P161"><text:s text:c="40"/><text:span text:style-name="T177">image-&gt;bit_depth, </text:span></text:p>
      <text:p text:style-name="P161"><text:s text:c="40"/><text:span text:style-name="T177">image-&gt;color_type, </text:span></text:p>
      <text:p text:style-name="P161"><text:s text:c="40"/><text:span text:style-name="T177">PNG_INTERLACE_NONE, </text:span></text:p>
      <text:p text:style-name="P161"><text:s text:c="40"/><text:span text:style-name="T177">PNG_COMPRESSION_TYPE_BASE, </text:span></text:p>
      <text:p text:style-name="P161"><text:s text:c="40"/><text:span text:style-name="T177">PNG_FILTER_TYPE_BASE);</text:span></text:p>
      <text:p text:style-name="P161"><text:s text:c="24"/><text:span text:style-name="T177">png_write_info(image-&gt;png_ptr, image-&gt;info_ptr);</text:span></text:p>
      <text:p text:style-name="P161"><text:s text:c="24"/><text:span text:style-name="T177">png_write_image(image-&gt;png_ptr, image-&gt;row_pointers);</text:span></text:p>
      <text:p text:style-name="P161"><text:s text:c="24"/><text:span text:style-name="T177">png_write_end(image-&gt;png_ptr, NULL);</text:span></text:p>
      <text:p text:style-name="P160"/>
      <text:p text:style-name="P161"><text:s text:c="24"/><text:span text:style-name="T177">for (int y = 0; y &lt; image-&gt;height; y++)</text:span></text:p>
      <text:p text:style-name="P161"><text:s text:c="32"/><text:span text:style-name="T177">free(image-&gt;row_pointers[y]);</text:span></text:p>
      <text:p text:style-name="P161"><text:s text:c="24"/><text:span text:style-name="T177">free(image-&gt;row_pointers);</text:span></text:p>
      <text:p text:style-name="P161"><text:s text:c="24"/><text:span text:style-name="T177">fclose(file);</text:span></text:p>
      <text:p text:style-name="P161"><text:s text:c="16"/><text:span text:style-name="T177">} else {</text:span></text:p>
      <text:p text:style-name="P161"><text:soft-page-break/><text:s text:c="24"/><text:span text:style-name="T177">printf("Ошибка выделения памяти для структуры на запись PNG\n");</text:span></text:p>
      <text:p text:style-name="P161"><text:s text:c="24"/><text:span text:style-name="T177">*err = ERR_MEM;</text:span></text:p>
      <text:p text:style-name="P161"><text:s text:c="16"/><text:span text:style-name="T177">}</text:span></text:p>
      <text:p text:style-name="P161"><text:s text:c="16"/></text:p>
      <text:p text:style-name="P161"><text:s text:c="16"/><text:span text:style-name="T177">png_destroy_info_struct(image-&gt;png_ptr, &amp;(image-&gt;info_ptr));</text:span></text:p>
      <text:p text:style-name="P161"><text:s text:c="16"/><text:span text:style-name="T177">png_destroy_write_struct(&amp;(image-&gt;png_ptr), &amp;(image-&gt;info_ptr));</text:span></text:p>
      <text:p text:style-name="P160"/>
      <text:p text:style-name="P161"><text:s text:c="8"/><text:span text:style-name="T177">} else {</text:span></text:p>
      <text:p text:style-name="P161"><text:s text:c="16"/><text:span text:style-name="T177">printf("Ошибка выходного файла\n");</text:span></text:p>
      <text:p text:style-name="P161"><text:s text:c="16"/><text:span text:style-name="T177">*err = ERR_MEM;</text:span></text:p>
      <text:p text:style-name="P161"><text:s text:c="8"/><text:span text:style-name="T177">}</text:span></text:p>
      <text:p text:style-name="P159">}</text:p>
      <text:p text:style-name="P160"/>
      <text:p text:style-name="P159">void draw_line(int x, int y, int side, int thick, struct RGB* color, struct Png* image){</text:p>
      <text:p text:style-name="P161"><text:s text:c="8"/><text:span text:style-name="T177">for (int i=y; i&lt;y+thick; i++){</text:span></text:p>
      <text:p text:style-name="P161"><text:s text:c="16"/><text:span text:style-name="T177">png_byte* row = image-&gt;row_pointers[i];</text:span></text:p>
      <text:p text:style-name="P161"><text:s text:c="16"/><text:span text:style-name="T177">for (int j=x; j&lt;x+side; j++){</text:span></text:p>
      <text:p text:style-name="P161"><text:s text:c="24"/><text:span text:style-name="T177">png_byte* pixel = &amp;(row[j*3]);</text:span></text:p>
      <text:p text:style-name="P161"><text:s text:c="24"/></text:p>
      <text:p text:style-name="P161"><text:s text:c="24"/><text:span text:style-name="T177">if ((j &gt;= 0 &amp;&amp; j &lt; image-&gt;width) &amp;&amp; (i &gt;= 0 &amp;&amp; i &lt; image-&gt;height)){ <text:s/></text:span></text:p>
      <text:p text:style-name="P161"><text:s text:c="32"/><text:span text:style-name="T177">pixel[0] = color-&gt;R;</text:span></text:p>
      <text:p text:style-name="P161"><text:s text:c="32"/><text:span text:style-name="T177">pixel[1] = color-&gt;G;</text:span></text:p>
      <text:p text:style-name="P161"><text:s text:c="32"/><text:span text:style-name="T177">pixel[2] = color-&gt;B;</text:span></text:p>
      <text:p text:style-name="P161"><text:s text:c="24"/><text:span text:style-name="T177">}</text:span></text:p>
      <text:p text:style-name="P161"><text:s text:c="16"/><text:span text:style-name="T177">}</text:span></text:p>
      <text:p text:style-name="P161"><text:s text:c="8"/><text:span text:style-name="T177">} <text:s text:c="6"/></text:span></text:p>
      <text:p text:style-name="P159">}</text:p>
      <text:p text:style-name="P160"/>
      <text:p text:style-name="P159">void fill_square(int x, int y, int side_x, int side_y, struct RGB* fill_color, struct Png* image){</text:p>
      <text:p text:style-name="P161"><text:s text:c="8"/><text:span text:style-name="T177">for (int i=y; i&lt;y+side_y; i++){</text:span></text:p>
      <text:p text:style-name="P161"><text:s text:c="16"/><text:span text:style-name="T177">png_byte* row = image-&gt;row_pointers[i];</text:span></text:p>
      <text:p text:style-name="P161"><text:s text:c="16"/><text:span text:style-name="T177">for (int j=x; j&lt;x+side_x; j++){</text:span></text:p>
      <text:p text:style-name="P161"><text:s text:c="24"/><text:span text:style-name="T177">png_byte* pixel = &amp;(row[j*3]);</text:span></text:p>
      <text:p text:style-name="P161"><text:s text:c="24"/></text:p>
      <text:p text:style-name="P161"><text:soft-page-break/><text:s text:c="24"/><text:span text:style-name="T177">if ((j &gt;= 0 &amp;&amp; j &lt; image-&gt;width) &amp;&amp; (i &gt;= 0 &amp;&amp; i &lt; image-&gt;height)){</text:span></text:p>
      <text:p text:style-name="P161"><text:s text:c="32"/><text:span text:style-name="T177">pixel[0] = fill_color-&gt;R;</text:span></text:p>
      <text:p text:style-name="P161"><text:s text:c="32"/><text:span text:style-name="T177">pixel[1] = fill_color-&gt;G;</text:span></text:p>
      <text:p text:style-name="P161"><text:s text:c="32"/><text:span text:style-name="T177">pixel[2] = fill_color-&gt;B;</text:span></text:p>
      <text:p text:style-name="P161"><text:s text:c="24"/><text:span text:style-name="T177">}</text:span></text:p>
      <text:p text:style-name="P161"><text:s text:c="16"/><text:span text:style-name="T177">}</text:span></text:p>
      <text:p text:style-name="P161"><text:s text:c="8"/><text:span text:style-name="T177">}</text:span></text:p>
      <text:p text:style-name="P159">}</text:p>
      <text:p text:style-name="P160"/>
      <text:p text:style-name="P159">void draw_square(struct square_data* my_square, struct Png* image){</text:p>
      <text:p text:style-name="P161"><text:s text:c="8"/><text:span text:style-name="T177">int x = my_square-&gt;left_up-&gt;x;</text:span></text:p>
      <text:p text:style-name="P161"><text:s text:c="8"/><text:span text:style-name="T177">int y = my_square-&gt;left_up-&gt;y;</text:span></text:p>
      <text:p text:style-name="P161"><text:s text:c="8"/><text:span text:style-name="T177">int thick = my_square-&gt;thickness;</text:span></text:p>
      <text:p text:style-name="P161"><text:s text:c="8"/><text:span text:style-name="T177">int side = my_square-&gt;side_size;</text:span></text:p>
      <text:p text:style-name="P161"><text:s text:c="8"/></text:p>
      <text:p text:style-name="P161"><text:s text:c="8"/><text:span text:style-name="T177">draw_line(x-(thick/2), y-(thick/2), side+thick, thick, my_square-&gt;color, image);</text:span></text:p>
      <text:p text:style-name="P161"><text:s text:c="8"/><text:span text:style-name="T177">draw_line(x-(thick/2), y-(thick/2)+side, side+thick, thick, my_square-&gt;color, image);</text:span></text:p>
      <text:p text:style-name="P161"><text:s text:c="8"/><text:span text:style-name="T177">draw_line(x-(thick/2), y-(thick/2), thick, side+thick, my_square-&gt;color, image);</text:span></text:p>
      <text:p text:style-name="P161"><text:s text:c="8"/><text:span text:style-name="T177">draw_line(x-(thick/2)+side, y-(thick/2), thick, side+thick, my_square-&gt;color, image);</text:span></text:p>
      <text:p text:style-name="P161"><text:s text:c="8"/></text:p>
      <text:p text:style-name="P161"><text:s text:c="8"/><text:span text:style-name="T177">if (my_square-&gt;fill)</text:span></text:p>
      <text:p text:style-name="P161"><text:s text:c="16"/><text:span text:style-name="T177">fill_square(x+(thick/2)+(thick%2), y+(thick/2)+(thick%2), side-thick, side-thick, my_square-&gt;fill_color, image); <text:s text:c="7"/></text:span></text:p>
      <text:p text:style-name="P159">}</text:p>
      <text:p text:style-name="P160"/>
      <text:p text:style-name="P159">void get_piece(int len_x, int len_y, int img_x, int img_y, png_bytep* piece, struct Png* image, enum error_types* err){</text:p>
      <text:p text:style-name="P161"><text:s text:c="8"/><text:span text:style-name="T177">for (int y=0; y&lt;len_y; y++){</text:span></text:p>
      <text:p text:style-name="P161"><text:s text:c="16"/><text:span text:style-name="T177">piece[y] = (png_byte*)calloc(len_x*3, sizeof(png_byte));</text:span></text:p>
      <text:p text:style-name="P161"><text:s text:c="16"/></text:p>
      <text:p text:style-name="P161"><text:s text:c="16"/><text:span text:style-name="T177">if (piece[y]){</text:span></text:p>
      <text:p text:style-name="P161"><text:s text:c="24"/><text:span text:style-name="T177">for (int x=0; x&lt;len_x; x++){</text:span></text:p>
      <text:p text:style-name="P161"><text:soft-page-break/><text:s text:c="32"/><text:span text:style-name="T177">png_byte* dst_pix = &amp;(piece[y][x*3]);</text:span></text:p>
      <text:p text:style-name="P161"><text:s text:c="32"/><text:span text:style-name="T177">png_byte* src_pix = &amp;(image-&gt;row_pointers[img_y+y][(img_x+x)*3]);</text:span></text:p>
      <text:p text:style-name="P160"/>
      <text:p text:style-name="P161"><text:s text:c="32"/><text:span text:style-name="T177">if ((img_x+x &gt;= 0 &amp;&amp; img_x+x &lt; image-&gt;width) &amp;&amp; (img_y+y &gt;= 0 &amp;&amp; img_y+y &lt; image-&gt;height)){</text:span></text:p>
      <text:p text:style-name="P161"><text:s text:c="40"/><text:span text:style-name="T177">dst_pix[0] = src_pix[0];</text:span></text:p>
      <text:p text:style-name="P161"><text:s text:c="40"/><text:span text:style-name="T177">dst_pix[1] = src_pix[1];</text:span></text:p>
      <text:p text:style-name="P161"><text:s text:c="40"/><text:span text:style-name="T177">dst_pix[2] = src_pix[2];</text:span></text:p>
      <text:p text:style-name="P161"><text:s text:c="32"/><text:span text:style-name="T177">}</text:span></text:p>
      <text:p text:style-name="P161"><text:s text:c="24"/><text:span text:style-name="T177">}</text:span></text:p>
      <text:p text:style-name="P161"><text:s text:c="16"/></text:p>
      <text:p text:style-name="P161"><text:s text:c="16"/><text:span text:style-name="T177">} else {</text:span></text:p>
      <text:p text:style-name="P161"><text:s text:c="24"/><text:span text:style-name="T177">printf("Ошибка памяти\n");</text:span></text:p>
      <text:p text:style-name="P161"><text:s text:c="24"/><text:span text:style-name="T177">*err = ERR_MEM;</text:span></text:p>
      <text:p text:style-name="P161"><text:s text:c="16"/><text:span text:style-name="T177">}</text:span></text:p>
      <text:p text:style-name="P161"><text:s text:c="8"/><text:span text:style-name="T177">}</text:span></text:p>
      <text:p text:style-name="P159">}</text:p>
      <text:p text:style-name="P160"/>
      <text:p text:style-name="P159">void paste_piece(int x, int y, int len_x, int len_y, png_bytep* piece, struct Png* image){</text:p>
      <text:p text:style-name="P161"><text:s text:c="8"/><text:span text:style-name="T177">for (int i=0; i&lt;len_y; i++){</text:span></text:p>
      <text:p text:style-name="P161"><text:s text:c="16"/><text:span text:style-name="T177">for (int j=0; j&lt;len_x; j++){</text:span></text:p>
      <text:p text:style-name="P161"><text:s text:c="24"/><text:span text:style-name="T177">png_byte* dst_pix = &amp;(image-&gt;row_pointers[y+i][(x+j)*3]);</text:span></text:p>
      <text:p text:style-name="P161"><text:s text:c="24"/><text:span text:style-name="T177">png_byte* src_pix = &amp;(piece[i][j*3]);</text:span></text:p>
      <text:p text:style-name="P161"><text:s text:c="24"/></text:p>
      <text:p text:style-name="P161"><text:s text:c="24"/><text:span text:style-name="T177">if ((x+j &gt;= 0 &amp;&amp; x+j &lt; image-&gt;width) &amp;&amp; (y+i &gt;= 0 &amp;&amp; y+i &lt; image-&gt;height)){</text:span></text:p>
      <text:p text:style-name="P161"><text:s text:c="32"/><text:span text:style-name="T177">dst_pix[0] = src_pix[0];</text:span></text:p>
      <text:p text:style-name="P161"><text:s text:c="32"/><text:span text:style-name="T177">dst_pix[1] = src_pix[1];</text:span></text:p>
      <text:p text:style-name="P161"><text:s text:c="32"/><text:span text:style-name="T177">dst_pix[2] = src_pix[2];</text:span></text:p>
      <text:p text:style-name="P161"><text:s text:c="24"/><text:span text:style-name="T177">} <text:s text:c="6"/></text:span></text:p>
      <text:p text:style-name="P161"><text:s text:c="16"/><text:span text:style-name="T177">}</text:span></text:p>
      <text:p text:style-name="P161"><text:s text:c="8"/><text:span text:style-name="T177">}</text:span></text:p>
      <text:p text:style-name="P159"><text:soft-page-break/>}</text:p>
      <text:p text:style-name="P160"/>
      <text:p text:style-name="P159">void exchange_places(struct exchange_data* space, struct Png* image, enum error_types* err){</text:p>
      <text:p text:style-name="P161"><text:s text:c="8"/><text:span text:style-name="T177">int lu_x = space-&gt;left_up-&gt;x;</text:span></text:p>
      <text:p text:style-name="P161"><text:s text:c="8"/><text:span text:style-name="T177">int lu_y = space-&gt;left_up-&gt;y;</text:span></text:p>
      <text:p text:style-name="P161"><text:s text:c="8"/><text:span text:style-name="T177">int rd_x = space-&gt;right_down-&gt;x;</text:span></text:p>
      <text:p text:style-name="P161"><text:s text:c="8"/><text:span text:style-name="T177">int rd_y = space-&gt;right_down-&gt;y;</text:span></text:p>
      <text:p text:style-name="P161"><text:s text:c="8"/></text:p>
      <text:p text:style-name="P161"><text:s text:c="8"/><text:span text:style-name="T177">if (lu_y&gt;rd_y){</text:span></text:p>
      <text:p text:style-name="P161"><text:s text:c="16"/><text:span text:style-name="T177">lu_y = space-&gt;right_down-&gt;y;</text:span></text:p>
      <text:p text:style-name="P161"><text:s text:c="16"/><text:span text:style-name="T177">rd_y = space-&gt;left_up-&gt;y;</text:span></text:p>
      <text:p text:style-name="P161"><text:s text:c="8"/><text:span text:style-name="T177">}</text:span></text:p>
      <text:p text:style-name="P161"><text:s text:c="8"/></text:p>
      <text:p text:style-name="P161"><text:s text:c="8"/><text:span text:style-name="T177">if (lu_x&gt;rd_x){</text:span></text:p>
      <text:p text:style-name="P161"><text:s text:c="16"/><text:span text:style-name="T177">lu_x = space-&gt;right_down-&gt;x;</text:span></text:p>
      <text:p text:style-name="P161"><text:s text:c="16"/><text:span text:style-name="T177">rd_x = space-&gt;left_up-&gt;x;</text:span></text:p>
      <text:p text:style-name="P161"><text:s text:c="8"/><text:span text:style-name="T177">}</text:span></text:p>
      <text:p text:style-name="P160"/>
      <text:p text:style-name="P161"><text:s text:c="8"/><text:span text:style-name="T177">int width_rec = rd_x-lu_x;</text:span></text:p>
      <text:p text:style-name="P161"><text:s text:c="8"/><text:span text:style-name="T177">int height_rec = rd_y-lu_y;</text:span></text:p>
      <text:p text:style-name="P160"/>
      <text:p text:style-name="P161"><text:s text:c="8"/><text:span text:style-name="T177">png_bytep* left_up_piece = (png_bytep*)calloc(height_rec/2, sizeof(png_bytep));</text:span></text:p>
      <text:p text:style-name="P161"><text:s text:c="8"/><text:span text:style-name="T177">png_bytep* right_up_piece = (png_bytep*)calloc(height_rec/2, sizeof(png_bytep));</text:span></text:p>
      <text:p text:style-name="P161"><text:s text:c="8"/><text:span text:style-name="T177">png_bytep* left_down_piece = (png_bytep*)calloc(height_rec/2, sizeof(png_bytep));</text:span></text:p>
      <text:p text:style-name="P161"><text:s text:c="8"/><text:span text:style-name="T177">png_bytep* right_down_piece = (png_bytep*)calloc(height_rec/2, sizeof(png_bytep));</text:span></text:p>
      <text:p text:style-name="P161"><text:s text:c="8"/></text:p>
      <text:p text:style-name="P161"><text:s text:c="8"/><text:span text:style-name="T177">if (left_up_piece &amp;&amp; right_up_piece &amp;&amp; left_down_piece &amp;&amp; right_down_piece){</text:span></text:p>
      <text:p text:style-name="P161"><text:s text:c="16"/><text:span text:style-name="T177">get_piece(width_rec/2, height_rec/2, lu_x, lu_y, left_up_piece, image, err);</text:span></text:p>
      <text:p text:style-name="P161"><text:s text:c="16"/><text:span text:style-name="T177">get_piece(width_rec/2, height_rec/2, lu_x + width_rec/2, lu_y, right_up_piece, image, err);</text:span></text:p>
      <text:p text:style-name="P161"><text:s text:c="16"/><text:span text:style-name="T177">get_piece(width_rec/2, height_rec/2, lu_x, lu_y + height_rec/2, left_down_piece, image, err); <text:s text:c="2"/></text:span></text:p>
      <text:p text:style-name="P161"><text:soft-page-break/><text:s text:c="16"/><text:span text:style-name="T177">get_piece(width_rec/2, height_rec/2, lu_x + width_rec/2, lu_y + height_rec/2, right_down_piece, image, err);</text:span></text:p>
      <text:p text:style-name="P160"/>
      <text:p text:style-name="P161"><text:s text:c="16"/><text:span text:style-name="T177">if (!strcmp(space-&gt;type, "clockwise")){</text:span></text:p>
      <text:p text:style-name="P161"><text:s text:c="24"/><text:span text:style-name="T177">paste_piece(lu_x, lu_y, width_rec/2, height_rec/2, left_down_piece, image);</text:span></text:p>
      <text:p text:style-name="P161"><text:s text:c="24"/><text:span text:style-name="T177">paste_piece(lu_x + width_rec/2, lu_y, width_rec/2, height_rec/2, left_up_piece, image);</text:span></text:p>
      <text:p text:style-name="P161"><text:s text:c="24"/><text:span text:style-name="T177">paste_piece(lu_x, lu_y + height_rec/2, width_rec/2, height_rec/2, right_down_piece, image);</text:span></text:p>
      <text:p text:style-name="P161"><text:s text:c="24"/><text:span text:style-name="T177">paste_piece(lu_x + width_rec/2, lu_y + height_rec/2, width_rec/2, height_rec/2, right_up_piece, image);</text:span></text:p>
      <text:p text:style-name="P161"><text:s text:c="8"/></text:p>
      <text:p text:style-name="P161"><text:s text:c="16"/><text:span text:style-name="T177">} else if (!strcmp(space-&gt;type, "counterclockwise")){</text:span></text:p>
      <text:p text:style-name="P161"><text:s text:c="24"/><text:span text:style-name="T177">paste_piece(lu_x, lu_y, width_rec/2, height_rec/2, right_up_piece, image);</text:span></text:p>
      <text:p text:style-name="P161"><text:s text:c="24"/><text:span text:style-name="T177">paste_piece(lu_x + width_rec/2, lu_y, width_rec/2, height_rec/2, right_down_piece, image);</text:span></text:p>
      <text:p text:style-name="P161"><text:s text:c="24"/><text:span text:style-name="T177">paste_piece(lu_x, lu_y + height_rec/2, width_rec/2, height_rec/2, left_up_piece, image);</text:span></text:p>
      <text:p text:style-name="P161"><text:s text:c="24"/><text:span text:style-name="T177">paste_piece(lu_x + width_rec/2, lu_y + height_rec/2, width_rec/2, height_rec/2, left_down_piece, image);</text:span></text:p>
      <text:p text:style-name="P160"/>
      <text:p text:style-name="P161"><text:s text:c="16"/><text:span text:style-name="T177">} else if (!strcmp(space-&gt;type, "diagonals")){</text:span></text:p>
      <text:p text:style-name="P161"><text:s text:c="24"/><text:span text:style-name="T177">paste_piece(lu_x, lu_y, width_rec/2, height_rec/2, right_down_piece, image);</text:span></text:p>
      <text:p text:style-name="P161"><text:s text:c="24"/><text:span text:style-name="T177">paste_piece(lu_x + width_rec/2, lu_y, width_rec/2, height_rec/2, left_down_piece, image);</text:span></text:p>
      <text:p text:style-name="P161"><text:s text:c="24"/><text:span text:style-name="T177">paste_piece(lu_x, lu_y + height_rec/2, width_rec/2, height_rec/2, right_up_piece, image);</text:span></text:p>
      <text:p text:style-name="P161"><text:soft-page-break/><text:s text:c="24"/><text:span text:style-name="T177">paste_piece(lu_x + width_rec/2, lu_y + height_rec/2, width_rec/2, height_rec/2, left_up_piece, image);</text:span></text:p>
      <text:p text:style-name="P160"/>
      <text:p text:style-name="P161"><text:s text:c="16"/><text:span text:style-name="T177">}</text:span></text:p>
      <text:p text:style-name="P160"/>
      <text:p text:style-name="P161"><text:s text:c="16"/><text:span text:style-name="T177">for (int i=0; i&lt;height_rec/2; i++){</text:span></text:p>
      <text:p text:style-name="P161"><text:s text:c="24"/><text:span text:style-name="T177">free(left_up_piece[i]);</text:span></text:p>
      <text:p text:style-name="P161"><text:s text:c="24"/><text:span text:style-name="T177">free(right_up_piece[i]);</text:span></text:p>
      <text:p text:style-name="P161"><text:s text:c="24"/><text:span text:style-name="T177">free(left_down_piece[i]);</text:span></text:p>
      <text:p text:style-name="P161"><text:s text:c="24"/><text:span text:style-name="T177">free(right_down_piece[i]);</text:span></text:p>
      <text:p text:style-name="P161"><text:s text:c="16"/><text:span text:style-name="T177">}</text:span></text:p>
      <text:p text:style-name="P160"/>
      <text:p text:style-name="P161"><text:s text:c="8"/><text:span text:style-name="T177">} else *err = ERR_MEM; <text:s/></text:span></text:p>
      <text:p text:style-name="P161"><text:s text:c="8"/></text:p>
      <text:p text:style-name="P161"><text:s text:c="8"/><text:span text:style-name="T177">if (left_up_piece)</text:span></text:p>
      <text:p text:style-name="P161"><text:s text:c="16"/><text:span text:style-name="T177">free(left_up_piece);</text:span></text:p>
      <text:p text:style-name="P161"><text:s text:c="8"/><text:span text:style-name="T177">if (right_up_piece)</text:span></text:p>
      <text:p text:style-name="P161"><text:s text:c="16"/><text:span text:style-name="T177">free(right_up_piece);</text:span></text:p>
      <text:p text:style-name="P161"><text:s text:c="8"/><text:span text:style-name="T177">if (left_down_piece)</text:span></text:p>
      <text:p text:style-name="P161"><text:s text:c="16"/><text:span text:style-name="T177">free(left_down_piece);</text:span></text:p>
      <text:p text:style-name="P161"><text:s text:c="8"/><text:span text:style-name="T177">if(right_down_piece)</text:span></text:p>
      <text:p text:style-name="P161"><text:s text:c="16"/><text:span text:style-name="T177">free(right_down_piece); </text:span></text:p>
      <text:p text:style-name="P159">}</text:p>
      <text:p text:style-name="P160"/>
      <text:p text:style-name="P159">void replace_freq_color(struct change_color* my_colors, struct Png* image, enum error_types* err){</text:p>
      <text:p text:style-name="P161"><text:s text:c="8"/><text:span text:style-name="T177">if (image-&gt;color_type == PNG_COLOR_TYPE_RGB){</text:span></text:p>
      <text:p text:style-name="P161"><text:s text:c="16"/><text:span text:style-name="T177">struct RGB* freq_color = (struct RGB*)calloc(1, sizeof(struct RGB));</text:span></text:p>
      <text:p text:style-name="P161"><text:s text:c="8"/></text:p>
      <text:p text:style-name="P161"><text:s text:c="16"/><text:span text:style-name="T177">int* clr_cnt = (int*)calloc(NUM_COLORS_RGB, sizeof(int));</text:span></text:p>
      <text:p text:style-name="P161"><text:s text:c="16"/><text:span text:style-name="T177">int max_cnt = -1;</text:span></text:p>
      <text:p text:style-name="P161"><text:s text:c="16"/></text:p>
      <text:p text:style-name="P161"><text:s text:c="16"/><text:span text:style-name="T177">if (clr_cnt &amp;&amp; freq_color){</text:span></text:p>
      <text:p text:style-name="P161"><text:s text:c="24"/><text:span text:style-name="T177">for (int y=0; y &lt; image-&gt;height; y++){</text:span></text:p>
      <text:p text:style-name="P161"><text:s text:c="32"/><text:span text:style-name="T177">png_byte* row = image-&gt;row_pointers[y];</text:span></text:p>
      <text:p text:style-name="P161"><text:soft-page-break/><text:s text:c="32"/><text:span text:style-name="T177">for (int x=0; x&lt;image-&gt;width; x++){</text:span></text:p>
      <text:p text:style-name="P161"><text:s text:c="40"/><text:span text:style-name="T177">png_byte* pixel = &amp;(row[x*3]);</text:span></text:p>
      <text:p text:style-name="P161"><text:s text:c="24"/></text:p>
      <text:p text:style-name="P161"><text:s text:c="40"/><text:span text:style-name="T177">int idx = (pixel[0] &lt;&lt; 16) | (pixel[1] &lt;&lt; 8) | (pixel[2]);</text:span></text:p>
      <text:p text:style-name="P161"><text:s text:c="40"/><text:span text:style-name="T177">clr_cnt[idx]++;</text:span></text:p>
      <text:p text:style-name="P160"/>
      <text:p text:style-name="P161"><text:s text:c="40"/><text:span text:style-name="T177">if (clr_cnt[idx] &gt; max_cnt){</text:span></text:p>
      <text:p text:style-name="P161"><text:s text:c="48"/><text:span text:style-name="T177">max_cnt = clr_cnt[idx];</text:span></text:p>
      <text:p text:style-name="P161"><text:s text:c="48"/><text:span text:style-name="T177">freq_color-&gt;R = pixel[0];</text:span></text:p>
      <text:p text:style-name="P161"><text:s text:c="48"/><text:span text:style-name="T177">freq_color-&gt;G = pixel[1];</text:span></text:p>
      <text:p text:style-name="P161"><text:s text:c="48"/><text:span text:style-name="T177">freq_color-&gt;B = pixel[2];</text:span></text:p>
      <text:p text:style-name="P161"><text:s text:c="40"/><text:span text:style-name="T177">}</text:span></text:p>
      <text:p text:style-name="P161"><text:s text:c="32"/><text:span text:style-name="T177">}</text:span></text:p>
      <text:p text:style-name="P161"><text:s text:c="24"/><text:span text:style-name="T177">}</text:span></text:p>
      <text:p text:style-name="P161"><text:s text:c="16"/><text:span text:style-name="T177">} else {</text:span></text:p>
      <text:p text:style-name="P161"><text:s text:c="24"/><text:span text:style-name="T177">printf("Ошибка памяти\n");</text:span></text:p>
      <text:p text:style-name="P161"><text:s text:c="24"/><text:span text:style-name="T177">*err = ERR_MEM;</text:span></text:p>
      <text:p text:style-name="P161"><text:s text:c="16"/><text:span text:style-name="T177">}</text:span></text:p>
      <text:p text:style-name="P160"/>
      <text:p text:style-name="P161"><text:s text:c="16"/><text:span text:style-name="T177">for (int y=0; y &lt; image-&gt;height; y++){</text:span></text:p>
      <text:p text:style-name="P161"><text:s text:c="24"/><text:span text:style-name="T177">png_byte* line = image-&gt;row_pointers[y];</text:span></text:p>
      <text:p text:style-name="P161"><text:s text:c="24"/><text:span text:style-name="T177">for (int x=0; x &lt; image-&gt;width; x++){</text:span></text:p>
      <text:p text:style-name="P161"><text:s text:c="32"/><text:span text:style-name="T177">png_byte* cur_pixel = &amp;(line[x*3]);</text:span></text:p>
      <text:p text:style-name="P160"/>
      <text:p text:style-name="P161"><text:s text:c="32"/><text:span text:style-name="T177">if (cur_pixel[0] == freq_color-&gt;R &amp;&amp; cur_pixel[1] == freq_color-&gt;G &amp;&amp; cur_pixel[2] == freq_color-&gt;B){</text:span></text:p>
      <text:p text:style-name="P161"><text:s text:c="40"/><text:span text:style-name="T177">cur_pixel[0] = my_colors-&gt;new_color-&gt;R;</text:span></text:p>
      <text:p text:style-name="P161"><text:soft-page-break/><text:s text:c="40"/><text:span text:style-name="T177">cur_pixel[1] = my_colors-&gt;new_color-&gt;G;</text:span></text:p>
      <text:p text:style-name="P161"><text:s text:c="40"/><text:span text:style-name="T177">cur_pixel[2] = my_colors-&gt;new_color-&gt;B;</text:span></text:p>
      <text:p text:style-name="P161"><text:s text:c="32"/><text:span text:style-name="T177">}</text:span></text:p>
      <text:p text:style-name="P161"><text:s text:c="24"/><text:span text:style-name="T177">}</text:span></text:p>
      <text:p text:style-name="P161"><text:s text:c="16"/><text:span text:style-name="T177">}</text:span></text:p>
      <text:p text:style-name="P161"><text:s text:c="16"/></text:p>
      <text:p text:style-name="P161"><text:s text:c="16"/><text:span text:style-name="T177">free(freq_color);</text:span></text:p>
      <text:p text:style-name="P161"><text:s text:c="16"/><text:span text:style-name="T177">free(clr_cnt);</text:span></text:p>
      <text:p text:style-name="P161"><text:s text:c="8"/><text:span text:style-name="T177">} else {</text:span></text:p>
      <text:p text:style-name="P161"><text:s text:c="16"/><text:span text:style-name="T177">printf("Формат изображения не RGB\n");</text:span></text:p>
      <text:p text:style-name="P161"><text:s text:c="16"/><text:span text:style-name="T177">*err = ERR_IMG_TYPE;</text:span></text:p>
      <text:p text:style-name="P161"><text:s text:c="8"/><text:span text:style-name="T177">}</text:span></text:p>
      <text:p text:style-name="P159">}</text:p>
      <text:p text:style-name="P160"/>
      <text:p text:style-name="P159">void make_contrast(struct contrast_data* c_data, struct Png* image){</text:p>
      <text:p text:style-name="P161"><text:s text:c="8"/><text:span text:style-name="T177">for (int y=0; y&lt;image-&gt;height; y++){</text:span></text:p>
      <text:p text:style-name="P161"><text:s text:c="16"/><text:span text:style-name="T177">png_byte* row = image-&gt;row_pointers[y];</text:span></text:p>
      <text:p text:style-name="P161"><text:s text:c="16"/><text:span text:style-name="T177">for (int x=0; x&lt;image-&gt;width; x++){</text:span></text:p>
      <text:p text:style-name="P161"><text:s text:c="24"/><text:span text:style-name="T177">png_byte* pix = &amp;(row[x*3]);</text:span></text:p>
      <text:p text:style-name="P160"/>
      <text:p text:style-name="P161"><text:s text:c="24"/><text:span text:style-name="T177">int red = (c_data-&gt;alpha * pix[0] + c_data-&gt;beta)/1;</text:span></text:p>
      <text:p text:style-name="P161"><text:s text:c="24"/><text:span text:style-name="T177">int green = (c_data-&gt;alpha * pix[1] + c_data-&gt;beta)/1;</text:span></text:p>
      <text:p text:style-name="P161"><text:s text:c="24"/><text:span text:style-name="T177">int blue = (c_data-&gt;alpha * pix[2] + c_data-&gt;beta)/1;</text:span></text:p>
      <text:p text:style-name="P160"/>
      <text:p text:style-name="P161"><text:s text:c="24"/><text:span text:style-name="T177">if (red &lt;= 255)</text:span></text:p>
      <text:p text:style-name="P161"><text:s text:c="32"/><text:span text:style-name="T177">pix[0] = red;</text:span></text:p>
      <text:p text:style-name="P161"><text:s text:c="24"/><text:span text:style-name="T177">else pix[0] = 255;</text:span></text:p>
      <text:p text:style-name="P160"/>
      <text:p text:style-name="P161"><text:s text:c="24"/><text:span text:style-name="T177">if (green &lt;= 255)</text:span></text:p>
      <text:p text:style-name="P161"><text:s text:c="32"/><text:span text:style-name="T177">pix[1] = green;</text:span></text:p>
      <text:p text:style-name="P161"><text:s text:c="24"/><text:span text:style-name="T177">else pix[1] = 255;</text:span></text:p>
      <text:p text:style-name="P161"><text:s text:c="24"/></text:p>
      <text:p text:style-name="P161"><text:s text:c="24"/><text:span text:style-name="T177">if (blue &lt;= 255)</text:span></text:p>
      <text:p text:style-name="P161"><text:s text:c="32"/><text:span text:style-name="T177">pix[2] = blue;</text:span></text:p>
      <text:p text:style-name="P161"><text:s text:c="24"/><text:span text:style-name="T177">else pix[2] = 255;</text:span></text:p>
      <text:p text:style-name="P161"><text:soft-page-break/><text:s text:c="16"/><text:span text:style-name="T177">}</text:span></text:p>
      <text:p text:style-name="P161"><text:s text:c="8"/><text:span text:style-name="T177">}</text:span></text:p>
      <text:p text:style-name="P159">}</text:p>
      <text:p text:style-name="P160"/>
      <text:p text:style-name="P159">int main(int argc, char** argv){</text:p>
      <text:p text:style-name="P160"/>
      <text:p text:style-name="P161"><text:s text:c="8"/><text:span text:style-name="T177">struct options_flags flags = {0};</text:span></text:p>
      <text:p text:style-name="P160"/>
      <text:p text:style-name="P161"><text:s text:c="8"/><text:span text:style-name="T177">struct option options[] = {</text:span></text:p>
      <text:p text:style-name="P161"><text:s text:c="16"/><text:span text:style-name="T177">{"input", required_argument, NULL, 'i'},</text:span></text:p>
      <text:p text:style-name="P161"><text:s text:c="16"/><text:span text:style-name="T177">{"output", required_argument, NULL, 'o'},</text:span></text:p>
      <text:p text:style-name="P161"><text:s text:c="16"/><text:span text:style-name="T177">{"info", no_argument, NULL, OPT_INFO}, <text:s/></text:span></text:p>
      <text:p text:style-name="P161"><text:s text:c="16"/><text:span text:style-name="T177">{"help", no_argument, NULL, 'h'},</text:span></text:p>
      <text:p text:style-name="P161"><text:s text:c="16"/><text:span text:style-name="T177">{"contrast", no_argument, NULL, 'R'},</text:span></text:p>
      <text:p text:style-name="P160"/>
      <text:p text:style-name="P161"><text:s text:c="16"/><text:span text:style-name="T177">{"square", no_argument, NULL, 'S'},</text:span></text:p>
      <text:p text:style-name="P161"><text:s text:c="16"/><text:span text:style-name="T177">{"left_up", required_argument, NULL, 'l'},</text:span></text:p>
      <text:p text:style-name="P161"><text:s text:c="16"/><text:span text:style-name="T177">{"side_size", required_argument, NULL, 's'},</text:span></text:p>
      <text:p text:style-name="P161"><text:s text:c="16"/><text:span text:style-name="T177">{"thickness", required_argument, NULL, 't'},</text:span></text:p>
      <text:p text:style-name="P161"><text:s text:c="16"/><text:span text:style-name="T177">{"color", required_argument, NULL, 'C'},</text:span></text:p>
      <text:p text:style-name="P161"><text:s text:c="16"/><text:span text:style-name="T177">{"fill", no_argument, NULL, 'f'},</text:span></text:p>
      <text:p text:style-name="P161"><text:s text:c="16"/><text:span text:style-name="T177">{"fill_color", required_argument, NULL, 'c'},</text:span></text:p>
      <text:p text:style-name="P161"><text:s text:c="16"/><text:span text:style-name="T177">{"exchange", no_argument, NULL, 'e'},</text:span></text:p>
      <text:p text:style-name="P161"><text:s text:c="16"/><text:span text:style-name="T177">{"right_down", required_argument, NULL, 'r'},</text:span></text:p>
      <text:p text:style-name="P161"><text:s text:c="16"/><text:span text:style-name="T177">{"exchange_type", required_argument, NULL, 'T'},</text:span></text:p>
      <text:p text:style-name="P161"><text:s text:c="16"/><text:span text:style-name="T177">{"freq_color", no_argument, NULL, 'F'},</text:span></text:p>
      <text:p text:style-name="P161"><text:s text:c="16"/><text:span text:style-name="T177">{"alpha", required_argument, NULL, 'a'},</text:span></text:p>
      <text:p text:style-name="P161"><text:s text:c="16"/><text:span text:style-name="T177">{"beta", required_argument, NULL, 'b'},</text:span></text:p>
      <text:p text:style-name="P161"><text:s text:c="16"/><text:span text:style-name="T177">{0, 0, 0, 0}</text:span></text:p>
      <text:p text:style-name="P161"><text:s text:c="8"/><text:span text:style-name="T177">};</text:span></text:p>
      <text:p text:style-name="P160"/>
      <text:p text:style-name="P161"><text:s text:c="8"/><text:span text:style-name="T177">char optstring[SZ_OPTSTR] = "i:o:hRSl:s:t:C:fc:e:r:T:Fa:b:";</text:span></text:p>
      <text:p text:style-name="P161"><text:s text:c="8"/><text:span text:style-name="T177">int optidx = 0;</text:span></text:p>
      <text:p text:style-name="P161"><text:s text:c="8"/><text:span text:style-name="T177">int opt;</text:span></text:p>
      <text:p text:style-name="P160"><text:soft-page-break/></text:p>
      <text:p text:style-name="P161"><text:s text:c="8"/><text:span text:style-name="T177">enum error_types err = 0;</text:span></text:p>
      <text:p text:style-name="P160"/>
      <text:p text:style-name="P161"><text:s text:c="8"/><text:span text:style-name="T177">int checker = 0;</text:span></text:p>
      <text:p text:style-name="P161"><text:s text:c="8"/><text:span text:style-name="T177">int help_opt = 0;</text:span></text:p>
      <text:p text:style-name="P161"><text:s text:c="8"/><text:span text:style-name="T177">int info_opt = 0;</text:span></text:p>
      <text:p text:style-name="P160"/>
      <text:p text:style-name="P161"><text:s text:c="8"/><text:span text:style-name="T177">char* img_iname = (char*)calloc(SZ_INPUT, sizeof(char));</text:span></text:p>
      <text:p text:style-name="P161"><text:s text:c="8"/><text:span text:style-name="T177">char* img_oname = (char*)calloc(SZ_OUTPUT, sizeof(char));</text:span></text:p>
      <text:p text:style-name="P161"><text:s text:c="8"/></text:p>
      <text:p text:style-name="P161"><text:s text:c="8"/><text:span text:style-name="T177">if (img_oname)</text:span></text:p>
      <text:p text:style-name="P161"><text:s text:c="16"/><text:span text:style-name="T177">strcpy(img_oname, "out.png");</text:span></text:p>
      <text:p text:style-name="P161"><text:s text:c="8"/><text:span text:style-name="T177">else err = ERR_MEM;</text:span></text:p>
      <text:p text:style-name="P161"><text:s text:c="8"/></text:p>
      <text:p text:style-name="P161"><text:s text:c="8"/><text:span text:style-name="T177">struct point* l_point = (struct point*)calloc(1, sizeof(struct point));</text:span></text:p>
      <text:p text:style-name="P161"><text:s text:c="8"/><text:span text:style-name="T177">struct point* r_point = (struct point*)calloc(1, sizeof(struct point));</text:span></text:p>
      <text:p text:style-name="P161"><text:s text:c="8"/><text:span text:style-name="T177">struct RGB* color = (struct RGB*)calloc(1, sizeof(struct RGB));</text:span></text:p>
      <text:p text:style-name="P161"><text:s text:c="8"/><text:span text:style-name="T177">struct RGB* fill_color = (struct RGB*)calloc(1, sizeof(struct RGB));</text:span></text:p>
      <text:p text:style-name="P160"/>
      <text:p text:style-name="P161"><text:s text:c="8"/><text:span text:style-name="T177">struct square_data* my_square = (struct square_data*)calloc(1, sizeof(struct square_data));</text:span></text:p>
      <text:p text:style-name="P161"><text:s text:c="8"/><text:span text:style-name="T177">struct exchange_data* exchange_data = (struct exchange_data*)calloc(1, sizeof(struct exchange_data));</text:span></text:p>
      <text:p text:style-name="P161"><text:s text:c="8"/><text:span text:style-name="T177">struct change_color* my_freq_color = (struct change_color*)calloc(1, sizeof(struct change_color));</text:span></text:p>
      <text:p text:style-name="P161"><text:s text:c="8"/><text:span text:style-name="T177">struct contrast_data* my_contrast = (struct contrast_data*)calloc(1, sizeof(struct contrast_data));</text:span></text:p>
      <text:p text:style-name="P160"/>
      <text:p text:style-name="P161"><text:s text:c="8"/><text:span text:style-name="T177">struct Png* my_image = (struct Png*)calloc(1, sizeof(struct Png));</text:span></text:p>
      <text:p text:style-name="P160"/>
      <text:p text:style-name="P161"><text:s text:c="8"/><text:span text:style-name="T177">while ((opt = getopt_long(argc, argv, optstring, options, &amp;optidx)) != -1){</text:span></text:p>
      <text:p text:style-name="P161"><text:s text:c="16"/><text:span text:style-name="T177">switch(opt){</text:span></text:p>
      <text:p text:style-name="P161"><text:s text:c="24"/><text:span text:style-name="T177">case 'i':</text:span></text:p>
      <text:p text:style-name="P161"><text:soft-page-break/><text:s text:c="32"/><text:span text:style-name="T177">if (optind &lt; argc &amp;&amp; argv[optind][0] != '-'){</text:span></text:p>
      <text:p text:style-name="P161"><text:s text:c="40"/><text:span text:style-name="T177">printf("Опция --input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mg_iname = realloc(img_iname, strlen(optarg));</text:span></text:p>
      <text:p text:style-name="P161"><text:s text:c="40"/></text:p>
      <text:p text:style-name="P161"><text:s text:c="40"/><text:span text:style-name="T177">if (img_iname){</text:span></text:p>
      <text:p text:style-name="P161"><text:s text:c="48"/><text:span text:style-name="T177">strcpy(img_iname, optarg);</text:span></text:p>
      <text:p text:style-name="P160"/>
      <text:p text:style-name="P161"><text:s text:c="48"/><text:span text:style-name="T177">if (read_image(my_image, img_iname, &amp;err))</text:span></text:p>
      <text:p text:style-name="P161"><text:s text:c="56"/><text:span text:style-name="T177">flags.iname_flag = 1;</text:span></text:p>
      <text:p text:style-name="P161"><text:s text:c="48"/><text:span text:style-name="T177">else {</text:span></text:p>
      <text:p text:style-name="P161"><text:s text:c="56"/><text:span text:style-name="T177">printf("Ошибка чтения изображения\n");</text:span></text:p>
      <text:p text:style-name="P161"><text:s text:c="56"/><text:span text:style-name="T177">err = ERR_IMG_READ;</text:span></text:p>
      <text:p text:style-name="P161"><text:s text:c="48"/><text:span text:style-name="T177">}</text:span></text:p>
      <text:p text:style-name="P160"/>
      <text:p text:style-name="P161"><text:s text:c="40"/><text:span text:style-name="T177">} else err = ERR_MEM;</text:span></text:p>
      <text:p text:style-name="P161"><text:s text:c="32"/><text:span text:style-name="T177">}</text:span></text:p>
      <text:p text:style-name="P161"><text:s text:c="32"/><text:span text:style-name="T177">break;</text:span></text:p>
      <text:p text:style-name="P161"><text:s text:c="24"/><text:span text:style-name="T177">case 'o':</text:span></text:p>
      <text:p text:style-name="P161"><text:s text:c="33"/><text:span text:style-name="T177">if ((optind &lt; argc &amp;&amp; argv[optind][0] != '-') &amp;&amp; optind != argc-1){</text:span></text:p>
      <text:p text:style-name="P161"><text:s text:c="40"/><text:span text:style-name="T177">printf("Опция --output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mg_oname = realloc(img_oname, strlen(optarg)+1);</text:span></text:p>
      <text:p text:style-name="P161"><text:s text:c="8"/></text:p>
      <text:p text:style-name="P161"><text:s text:c="40"/><text:span text:style-name="T177">if (img_oname){</text:span></text:p>
      <text:p text:style-name="P161"><text:soft-page-break/><text:s text:c="48"/><text:span text:style-name="T177">if (optarg[0] != '-')</text:span></text:p>
      <text:p text:style-name="P161"><text:s text:c="56"/><text:span text:style-name="T177">strcpy(img_oname, optarg);</text:span></text:p>
      <text:p text:style-name="P161"><text:s text:c="48"/><text:span text:style-name="T177">else {</text:span></text:p>
      <text:p text:style-name="P161"><text:s text:c="56"/><text:span text:style-name="T177">printf("Не введено имя выходного файла\n");</text:span></text:p>
      <text:p text:style-name="P161"><text:s text:c="56"/><text:span text:style-name="T177">err = ERR_OPT;</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h':</text:span></text:p>
      <text:p text:style-name="P161"><text:s text:c="32"/><text:span text:style-name="T177">if ((optind &lt; argc &amp;&amp; argv[optind][0] == '-') || optind == argc || optind == argc-1){</text:span></text:p>
      <text:p text:style-name="P161"><text:s text:c="40"/><text:span text:style-name="T177">help_opt = 1; </text:span></text:p>
      <text:p text:style-name="P161"><text:s text:c="40"/><text:span text:style-name="T177">printf("Course work for option 4.16, created by Alina Kiseleva\n");</text:span></text:p>
      <text:p text:style-name="P161"><text:s text:c="40"/><text:span text:style-name="T177">print_help();</text:span></text:p>
      <text:p text:style-name="P161"><text:s text:c="32"/><text:span text:style-name="T177">} else {</text:span></text:p>
      <text:p text:style-name="P161"><text:s text:c="40"/><text:span text:style-name="T177">printf("Опция --help не принимает аргументов.\n%s и последующие аргументы будут проигнорированы.\n", argv[optind]);</text:span></text:p>
      <text:p text:style-name="P161"><text:s text:c="40"/><text:span text:style-name="T177">err = ERR_OPT;</text:span></text:p>
      <text:p text:style-name="P161"><text:s text:c="32"/><text:span text:style-name="T177">}</text:span></text:p>
      <text:p text:style-name="P161"><text:s text:c="32"/><text:span text:style-name="T177">break;</text:span></text:p>
      <text:p text:style-name="P161"><text:s text:c="24"/><text:span text:style-name="T177">case 'R':</text:span></text:p>
      <text:p text:style-name="P161"><text:s text:c="32"/><text:span text:style-name="T177">if (my_contrast)</text:span></text:p>
      <text:p text:style-name="P161"><text:s text:c="40"/><text:span text:style-name="T177">flags.contr_flag = 1;</text:span></text:p>
      <text:p text:style-name="P161"><text:s text:c="32"/><text:span text:style-name="T177">if ((optind &lt; argc &amp;&amp; argv[optind][0] != '-') &amp;&amp; optind != argc-1){</text:span></text:p>
      <text:p text:style-name="P161"><text:soft-page-break/><text:s text:c="40"/><text:span text:style-name="T177">printf("Опция --contrast не принимает аргументов.\n%s и последующие аргументы будут проигнорированы.\n", argv[optind]);</text:span></text:p>
      <text:p text:style-name="P161"><text:s text:c="40"/><text:span text:style-name="T177">err = ERR_OPT;</text:span></text:p>
      <text:p text:style-name="P161"><text:s text:c="32"/><text:span text:style-name="T177">}</text:span></text:p>
      <text:p text:style-name="P161"><text:s text:c="32"/><text:span text:style-name="T177">break;</text:span></text:p>
      <text:p text:style-name="P161"><text:s text:c="24"/><text:span text:style-name="T177">case 'S': </text:span></text:p>
      <text:p text:style-name="P161"><text:s text:c="32"/><text:span text:style-name="T177">if (my_square)</text:span></text:p>
      <text:p text:style-name="P161"><text:s text:c="40"/><text:span text:style-name="T177">flags.sqr_flag = 1;</text:span></text:p>
      <text:p text:style-name="P161"><text:s text:c="32"/><text:span text:style-name="T177">if ((optind &lt; argc &amp;&amp; argv[optind][0] != '-') &amp;&amp; optind != argc-1){</text:span></text:p>
      <text:p text:style-name="P161"><text:s text:c="40"/><text:span text:style-name="T177">printf("Опция --square не принимает аргументов.\n%s и последующие аргументы будут проигнорированы.\n", argv[optind]);</text:span></text:p>
      <text:p text:style-name="P161"><text:s text:c="40"/><text:span text:style-name="T177">err = ERR_OPT;</text:span></text:p>
      <text:p text:style-name="P161"><text:s text:c="32"/><text:span text:style-name="T177">}</text:span></text:p>
      <text:p text:style-name="P161"><text:s text:c="32"/><text:span text:style-name="T177">break;</text:span></text:p>
      <text:p text:style-name="P161"><text:s text:c="24"/><text:span text:style-name="T177">case 'e':</text:span></text:p>
      <text:p text:style-name="P161"><text:s text:c="32"/><text:span text:style-name="T177">if (exchange_data)</text:span></text:p>
      <text:p text:style-name="P161"><text:s text:c="40"/><text:span text:style-name="T177">flags.exchg_flag = 1;</text:span></text:p>
      <text:p text:style-name="P161"><text:s text:c="32"/><text:span text:style-name="T177">if ((optind &lt; argc &amp;&amp; argv[optind][0] != '-') &amp;&amp; optind != argc-1){</text:span></text:p>
      <text:p text:style-name="P161"><text:s text:c="40"/><text:span text:style-name="T177">printf("Опция --exchange не принимает аргументов.\n%s и последующие аргументы будут проигнорированы.\n", argv[optind]);</text:span></text:p>
      <text:p text:style-name="P161"><text:s text:c="40"/><text:span text:style-name="T177">err = ERR_OPT;</text:span></text:p>
      <text:p text:style-name="P161"><text:s text:c="32"/><text:span text:style-name="T177">}</text:span></text:p>
      <text:p text:style-name="P161"><text:s text:c="32"/><text:span text:style-name="T177">break;</text:span></text:p>
      <text:p text:style-name="P161"><text:s text:c="24"/><text:span text:style-name="T177">case 'F':</text:span></text:p>
      <text:p text:style-name="P161"><text:s text:c="32"/><text:span text:style-name="T177">if (my_freq_color)</text:span></text:p>
      <text:p text:style-name="P161"><text:s text:c="40"/><text:span text:style-name="T177">flags.fq_clr_flag = 1;</text:span></text:p>
      <text:p text:style-name="P161"><text:s text:c="32"/><text:span text:style-name="T177">if ((optind &lt; argc &amp;&amp; argv[optind][0] != '-') &amp;&amp; optind != argc-1){</text:span></text:p>
      <text:p text:style-name="P161"><text:s text:c="40"/><text:span text:style-name="T177">printf("Опция --freq_color не принимает аргументов.\n%s и последующие аргументы будут проигнорированы.\n", argv[optind]);</text:span></text:p>
      <text:p text:style-name="P161"><text:s text:c="40"/><text:span text:style-name="T177">err = ERR_OPT;</text:span></text:p>
      <text:p text:style-name="P161"><text:s text:c="32"/><text:span text:style-name="T177">}</text:span></text:p>
      <text:p text:style-name="P161"><text:soft-page-break/><text:s text:c="32"/><text:span text:style-name="T177">break;</text:span></text:p>
      <text:p text:style-name="P161"><text:s text:c="24"/><text:span text:style-name="T177">case 'a':</text:span></text:p>
      <text:p text:style-name="P161"><text:s text:c="32"/><text:span text:style-name="T177">if ((optind &lt; argc &amp;&amp; argv[optind][0] != '-') &amp;&amp; optind != argc-1){</text:span></text:p>
      <text:p text:style-name="P161"><text:s text:c="40"/><text:span text:style-name="T177">printf("Опция --alpha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my_contrast){</text:span></text:p>
      <text:p text:style-name="P161"><text:s text:c="48"/><text:span text:style-name="T177">checker = sscanf(optarg, "%lf", &amp;my_contrast-&gt;alpha);</text:span></text:p>
      <text:p text:style-name="P161"><text:s text:c="48"/><text:span text:style-name="T177">if (checker == 1 &amp;&amp; my_contrast-&gt;alpha &gt; 0)</text:span></text:p>
      <text:p text:style-name="P161"><text:s text:c="56"/><text:span text:style-name="T177">flags.a_flag = 1;</text:span></text:p>
      <text:p text:style-name="P161"><text:s text:c="48"/><text:span text:style-name="T177">else {</text:span></text:p>
      <text:p text:style-name="P161"><text:s text:c="56"/><text:span text:style-name="T177">printf("Коэффициент изменения контрастности alpha задан неверно\n");</text:span></text:p>
      <text:p text:style-name="P161"><text:s text:c="56"/><text:span text:style-name="T177">err = ERR_COORDS;</text:span></text:p>
      <text:p text:style-name="P161"><text:s text:c="48"/><text:span text:style-name="T177">}</text:span></text:p>
      <text:p text:style-name="P161"><text:s text:c="40"/><text:span text:style-name="T177">} else err = ERR_MEM;</text:span></text:p>
      <text:p text:style-name="P161"><text:s text:c="32"/><text:span text:style-name="T177">}</text:span></text:p>
      <text:p text:style-name="P161"><text:s text:c="32"/><text:span text:style-name="T177">break;</text:span></text:p>
      <text:p text:style-name="P161"><text:s text:c="24"/><text:span text:style-name="T177">case 'b':</text:span></text:p>
      <text:p text:style-name="P161"><text:s text:c="32"/><text:span text:style-name="T177">if ((optind &lt; argc &amp;&amp; argv[optind][0] != '-') &amp;&amp; optind != argc-1){</text:span></text:p>
      <text:p text:style-name="P161"><text:s text:c="40"/><text:span text:style-name="T177">printf("Опция --beta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my_contrast){</text:span></text:p>
      <text:p text:style-name="P161"><text:s text:c="48"/><text:span text:style-name="T177">checker = sscanf(optarg, "%d", &amp;my_contrast-&gt;beta);</text:span></text:p>
      <text:p text:style-name="P161"><text:s text:c="48"/><text:span text:style-name="T177">if (checker == 1)</text:span></text:p>
      <text:p text:style-name="P161"><text:soft-page-break/><text:s text:c="56"/><text:span text:style-name="T177">flags.b_flag = 1;</text:span></text:p>
      <text:p text:style-name="P161"><text:s text:c="48"/><text:span text:style-name="T177">else {</text:span></text:p>
      <text:p text:style-name="P161"><text:s text:c="56"/><text:span text:style-name="T177">printf("Сдвиг контрастности beta задан неверно\n");</text:span></text:p>
      <text:p text:style-name="P161"><text:s text:c="56"/><text:span text:style-name="T177">err = ERR_COORDS;</text:span></text:p>
      <text:p text:style-name="P161"><text:s text:c="48"/><text:span text:style-name="T177">}</text:span></text:p>
      <text:p text:style-name="P161"><text:s text:c="40"/><text:span text:style-name="T177">} else err = ERR_MEM;</text:span></text:p>
      <text:p text:style-name="P161"><text:s text:c="32"/><text:span text:style-name="T177">}</text:span></text:p>
      <text:p text:style-name="P161"><text:s text:c="32"/><text:span text:style-name="T177">break;</text:span></text:p>
      <text:p text:style-name="P161"><text:s text:c="24"/><text:span text:style-name="T177">case 'l':</text:span></text:p>
      <text:p text:style-name="P161"><text:s text:c="32"/><text:span text:style-name="T177">if ((optind &lt; argc &amp;&amp; argv[optind][0] != '-') &amp;&amp; optind != argc-1){</text:span></text:p>
      <text:p text:style-name="P161"><text:s text:c="40"/><text:span text:style-name="T177">printf("Опция --left_up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l_point &amp;&amp; my_square &amp;&amp; exchange_data){</text:span></text:p>
      <text:p text:style-name="P161"><text:s text:c="48"/><text:span text:style-name="T177">checker = sscanf(optarg, "%d.%d", &amp;l_point-&gt;x, &amp;l_point-&gt;y);</text:span></text:p>
      <text:p text:style-name="P161"><text:s text:c="48"/><text:span text:style-name="T177">if (checker == 2){</text:span></text:p>
      <text:p text:style-name="P161"><text:s text:c="56"/><text:span text:style-name="T177">my_square-&gt;left_up = l_point;</text:span></text:p>
      <text:p text:style-name="P161"><text:s text:c="56"/><text:span text:style-name="T177">exchange_data-&gt;left_up = l_point;</text:span></text:p>
      <text:p text:style-name="P161"><text:s text:c="56"/><text:span text:style-name="T177">flags.lft_up_flag = 1;</text:span></text:p>
      <text:p text:style-name="P161"><text:s text:c="48"/><text:span text:style-name="T177">} else {</text:span></text:p>
      <text:p text:style-name="P161"><text:s text:c="56"/><text:span text:style-name="T177">printf("Координаты левой верхней точки заданы неверно\n");</text:span></text:p>
      <text:p text:style-name="P161"><text:s text:c="56"/><text:span text:style-name="T177">err = ERR_COORDS;</text:span></text:p>
      <text:p text:style-name="P161"><text:s text:c="48"/><text:span text:style-name="T177">}</text:span></text:p>
      <text:p text:style-name="P161"><text:s text:c="40"/><text:span text:style-name="T177">} else {</text:span></text:p>
      <text:p text:style-name="P161"><text:soft-page-break/><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s':</text:span></text:p>
      <text:p text:style-name="P161"><text:s text:c="32"/><text:span text:style-name="T177">if ((optind &lt; argc &amp;&amp; argv[optind][0] != '-') &amp;&amp; optind != argc-1){</text:span></text:p>
      <text:p text:style-name="P161"><text:s text:c="40"/><text:span text:style-name="T177">printf("Опция --side_size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my_square){</text:span></text:p>
      <text:p text:style-name="P161"><text:s text:c="48"/><text:span text:style-name="T177">checker = sscanf(optarg, "%d", &amp;my_square-&gt;side_size);</text:span></text:p>
      <text:p text:style-name="P161"><text:s text:c="48"/><text:span text:style-name="T177">if (checker == 1 &amp;&amp; my_square-&gt;side_size &gt; 0){</text:span></text:p>
      <text:p text:style-name="P161"><text:s text:c="56"/><text:span text:style-name="T177">flags.sd_sz_flag = 1;</text:span></text:p>
      <text:p text:style-name="P161"><text:s text:c="48"/><text:span text:style-name="T177">} else {</text:span></text:p>
      <text:p text:style-name="P161"><text:s text:c="56"/><text:span text:style-name="T177">printf("Cторона задана неверно\n");</text:span></text:p>
      <text:p text:style-name="P161"><text:s text:c="56"/><text:span text:style-name="T177">err = ERR_OPT;</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t':</text:span></text:p>
      <text:p text:style-name="P161"><text:s text:c="33"/><text:span text:style-name="T177">if ((optind &lt; argc &amp;&amp; argv[optind][0] != '-') &amp;&amp; optind != argc-1){</text:span></text:p>
      <text:p text:style-name="P161"><text:soft-page-break/><text:s text:c="40"/><text:span text:style-name="T177">printf("Опция --thickness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my_square){</text:span></text:p>
      <text:p text:style-name="P161"><text:s text:c="48"/><text:span text:style-name="T177">checker = sscanf(optarg, "%d", &amp;my_square-&gt;thickness);</text:span></text:p>
      <text:p text:style-name="P161"><text:s text:c="48"/><text:span text:style-name="T177">if (checker == 1 &amp;&amp; my_square-&gt;thickness &gt;= 0){</text:span></text:p>
      <text:p text:style-name="P161"><text:s text:c="56"/><text:span text:style-name="T177">flags.thkns_flag = 1;</text:span></text:p>
      <text:p text:style-name="P161"><text:s text:c="48"/><text:span text:style-name="T177">} else {</text:span></text:p>
      <text:p text:style-name="P161"><text:s text:c="56"/><text:span text:style-name="T177">printf("Толщина задана неверно\n");</text:span></text:p>
      <text:p text:style-name="P161"><text:s text:c="56"/><text:span text:style-name="T177">err = ERR_OPT;</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C':</text:span></text:p>
      <text:p text:style-name="P161"><text:s text:c="33"/><text:span text:style-name="T177">if ((optind &lt; argc &amp;&amp; argv[optind][0] != '-') &amp;&amp; optind != argc-1){</text:span></text:p>
      <text:p text:style-name="P161"><text:s text:c="40"/><text:span text:style-name="T177">printf("Опция --color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color &amp;&amp; my_square &amp;&amp; my_freq_color){</text:span></text:p>
      <text:p text:style-name="P161"><text:s text:c="48"/><text:span text:style-name="T177">checker = sscanf(optarg, "%d.%d.%d", &amp;color-&gt;R, &amp;color-&gt;G, &amp;color-&gt;B);</text:span></text:p>
      <text:p text:style-name="P161"><text:soft-page-break/><text:s text:c="48"/><text:span text:style-name="T177">if ((checker == 3) &amp;&amp; check_color(color-&gt;R, color-&gt;G, color-&gt;B)){</text:span></text:p>
      <text:p text:style-name="P161"><text:s text:c="56"/><text:span text:style-name="T177">flags.clr_flag = 1;</text:span></text:p>
      <text:p text:style-name="P161"><text:s text:c="56"/><text:span text:style-name="T177">my_square-&gt;color = color;</text:span></text:p>
      <text:p text:style-name="P161"><text:s text:c="56"/><text:span text:style-name="T177">my_freq_color-&gt;new_color = color;</text:span></text:p>
      <text:p text:style-name="P161"><text:s text:c="48"/><text:span text:style-name="T177">} else {</text:span></text:p>
      <text:p text:style-name="P161"><text:s text:c="56"/><text:span text:style-name="T177">printf("Цвет задан неверно\n");</text:span></text:p>
      <text:p text:style-name="P161"><text:s text:c="56"/><text:span text:style-name="T177">err = ERR_COLOR;</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f':</text:span></text:p>
      <text:p text:style-name="P161"><text:s text:c="32"/><text:span text:style-name="T177">if (my_square){</text:span></text:p>
      <text:p text:style-name="P161"><text:s text:c="40"/><text:span text:style-name="T177">flags.fill_flag = 1;</text:span></text:p>
      <text:p text:style-name="P161"><text:s text:c="40"/><text:span text:style-name="T177">my_square-&gt;fill = (bool)1;</text:span></text:p>
      <text:p text:style-name="P161"><text:s text:c="32"/><text:span text:style-name="T177">} else {</text:span></text:p>
      <text:p text:style-name="P161"><text:s text:c="40"/><text:span text:style-name="T177">printf("Ошибка памяти\n");</text:span></text:p>
      <text:p text:style-name="P161"><text:s text:c="40"/><text:span text:style-name="T177">err = ERR_MEM;</text:span></text:p>
      <text:p text:style-name="P161"><text:s text:c="32"/><text:span text:style-name="T177">}</text:span></text:p>
      <text:p text:style-name="P161"><text:s text:c="32"/><text:span text:style-name="T177">break;</text:span></text:p>
      <text:p text:style-name="P161"><text:s text:c="24"/><text:span text:style-name="T177">case 'c': </text:span></text:p>
      <text:p text:style-name="P161"><text:s text:c="32"/><text:span text:style-name="T177">if ((optind &lt; argc &amp;&amp; argv[optind][0] != '-') &amp;&amp; optind != argc-1){</text:span></text:p>
      <text:p text:style-name="P161"><text:s text:c="40"/><text:span text:style-name="T177">printf("Опция --fill_color принимает только один аргумент.\n%s и </text:span><text:soft-page-break/><text:span text:style-name="T177">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fill_color){</text:span></text:p>
      <text:p text:style-name="P161"><text:s text:c="48"/><text:span text:style-name="T177">int checker = sscanf(optarg, "%d.%d.%d", &amp;fill_color-&gt;R, &amp;fill_color-&gt;G, &amp;fill_color-&gt;B);</text:span></text:p>
      <text:p text:style-name="P161"><text:s text:c="48"/><text:span text:style-name="T177">if ((checker == 3) &amp;&amp; check_color(fill_color-&gt;R, fill_color-&gt;G, fill_color-&gt;B)){</text:span></text:p>
      <text:p text:style-name="P161"><text:s text:c="56"/><text:span text:style-name="T177">if (my_square){</text:span></text:p>
      <text:p text:style-name="P161"><text:s text:c="64"/><text:span text:style-name="T177">my_square-&gt;fill_color = fill_color;</text:span></text:p>
      <text:p text:style-name="P161"><text:s text:c="64"/><text:span text:style-name="T177">flags.fill_clr_flag = 1;</text:span></text:p>
      <text:p text:style-name="P161"><text:s text:c="56"/><text:span text:style-name="T177">} else if (!my_square){</text:span></text:p>
      <text:p text:style-name="P161"><text:s text:c="64"/><text:span text:style-name="T177">printf("Ошибка памяти\n");</text:span></text:p>
      <text:p text:style-name="P161"><text:s text:c="64"/><text:span text:style-name="T177">err = ERR_MEM;</text:span></text:p>
      <text:p text:style-name="P161"><text:s text:c="56"/><text:span text:style-name="T177">}</text:span></text:p>
      <text:p text:style-name="P161"><text:s text:c="48"/><text:span text:style-name="T177">} else {</text:span></text:p>
      <text:p text:style-name="P161"><text:s text:c="56"/><text:span text:style-name="T177">printf("Цвет заливки задан неверно\n");</text:span></text:p>
      <text:p text:style-name="P161"><text:s text:c="56"/><text:span text:style-name="T177">err = ERR_COLOR;</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r':</text:span></text:p>
      <text:p text:style-name="P161"><text:s text:c="32"/><text:span text:style-name="T177">if ((optind &lt; argc &amp;&amp; argv[optind][0] != '-') &amp;&amp; optind != argc-1){</text:span></text:p>
      <text:p text:style-name="P161"><text:soft-page-break/><text:s text:c="40"/><text:span text:style-name="T177">printf("Опция --right_down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r_point){</text:span></text:p>
      <text:p text:style-name="P161"><text:s text:c="48"/><text:span text:style-name="T177">int checker = sscanf(optarg, "%d.%d", &amp;r_point-&gt;x, &amp;r_point-&gt;y);</text:span></text:p>
      <text:p text:style-name="P161"><text:s text:c="48"/><text:span text:style-name="T177">if (checker == 2){</text:span></text:p>
      <text:p text:style-name="P161"><text:s text:c="56"/><text:span text:style-name="T177">if (exchange_data){</text:span></text:p>
      <text:p text:style-name="P161"><text:s text:c="64"/><text:span text:style-name="T177">exchange_data-&gt;right_down = r_point;</text:span></text:p>
      <text:p text:style-name="P161"><text:s text:c="64"/><text:span text:style-name="T177">flags.rt_dwn_flag = 1;</text:span></text:p>
      <text:p text:style-name="P161"><text:s text:c="56"/><text:span text:style-name="T177">} else {</text:span></text:p>
      <text:p text:style-name="P161"><text:s text:c="64"/><text:span text:style-name="T177">printf("Ошибка памяти\n");</text:span></text:p>
      <text:p text:style-name="P161"><text:s text:c="64"/><text:span text:style-name="T177">err = ERR_MEM;</text:span></text:p>
      <text:p text:style-name="P161"><text:s text:c="56"/><text:span text:style-name="T177">}</text:span></text:p>
      <text:p text:style-name="P161"><text:s text:c="48"/><text:span text:style-name="T177">} else {</text:span></text:p>
      <text:p text:style-name="P161"><text:s text:c="56"/><text:span text:style-name="T177">printf("Координаты правой нижней точки заданы неверно\n");</text:span></text:p>
      <text:p text:style-name="P161"><text:s text:c="56"/><text:span text:style-name="T177">err = ERR_COORDS;</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 <text:s text:c="22"/></text:span></text:p>
      <text:p text:style-name="P161"><text:s text:c="32"/><text:span text:style-name="T177">break;</text:span></text:p>
      <text:p text:style-name="P161"><text:s text:c="24"/><text:span text:style-name="T177">case 'T':</text:span></text:p>
      <text:p text:style-name="P161"><text:soft-page-break/><text:s text:c="32"/><text:span text:style-name="T177">if ((optind &lt; argc &amp;&amp; argv[optind][0] != '-') &amp;&amp; optind != argc-1){</text:span></text:p>
      <text:p text:style-name="P161"><text:s text:c="40"/><text:span text:style-name="T177">printf("Опция --exchange_type принимает только один аргумент.\n%s и следующие аргументы будут проигнорированы.\n", argv[optind]);</text:span></text:p>
      <text:p text:style-name="P161"><text:s text:c="40"/><text:span text:style-name="T177">err = ERR_OPT;</text:span></text:p>
      <text:p text:style-name="P161"><text:s text:c="32"/><text:span text:style-name="T177">} else {</text:span></text:p>
      <text:p text:style-name="P161"><text:s text:c="40"/><text:span text:style-name="T177">if (exchange_data){</text:span></text:p>
      <text:p text:style-name="P161"><text:s text:c="48"/><text:span text:style-name="T177">if (!strcmp(optarg, "clockwise") || !strcmp(optarg, "counterclockwise") || !strcmp(optarg, "diagonals")){</text:span></text:p>
      <text:p text:style-name="P161"><text:s text:c="56"/><text:span text:style-name="T177">exchange_data-&gt;type = optarg;</text:span></text:p>
      <text:p text:style-name="P161"><text:s text:c="56"/><text:span text:style-name="T177">flags.exchg_t_flag = 1;</text:span></text:p>
      <text:p text:style-name="P161"><text:s text:c="48"/><text:span text:style-name="T177">} else {</text:span></text:p>
      <text:p text:style-name="P161"><text:s text:c="56"/><text:span text:style-name="T177">printf("Введенного способа обмена частей не существует\n");</text:span></text:p>
      <text:p text:style-name="P161"><text:s text:c="56"/><text:span text:style-name="T177">err = ERR_EXCH_TYPE;</text:span></text:p>
      <text:p text:style-name="P161"><text:s text:c="48"/><text:span text:style-name="T177">}</text:span></text:p>
      <text:p text:style-name="P161"><text:s text:c="40"/><text:span text:style-name="T177">} else {</text:span></text:p>
      <text:p text:style-name="P161"><text:s text:c="48"/><text:span text:style-name="T177">printf("Ошибка памяти\n");</text:span></text:p>
      <text:p text:style-name="P161"><text:s text:c="48"/><text:span text:style-name="T177">err = ERR_MEM;</text:span></text:p>
      <text:p text:style-name="P161"><text:s text:c="40"/><text:span text:style-name="T177">}</text:span></text:p>
      <text:p text:style-name="P161"><text:s text:c="32"/><text:span text:style-name="T177">}</text:span></text:p>
      <text:p text:style-name="P161"><text:s text:c="32"/><text:span text:style-name="T177">break;</text:span></text:p>
      <text:p text:style-name="P161"><text:s text:c="24"/><text:span text:style-name="T177">case OPT_INFO:</text:span></text:p>
      <text:p text:style-name="P161"><text:s text:c="32"/><text:span text:style-name="T177">if ((optind &lt; argc &amp;&amp; argv[optind][0] == '-') || optind == argc-1){</text:span></text:p>
      <text:p text:style-name="P161"><text:s text:c="40"/><text:span text:style-name="T177">info_opt = 1;</text:span></text:p>
      <text:p text:style-name="P161"><text:s text:c="32"/><text:span text:style-name="T177">} else {</text:span></text:p>
      <text:p text:style-name="P161"><text:s text:c="40"/><text:span text:style-name="T177">printf("Опция --info не принимает аргументов.\n%s и последующие аргументы будут проигнорированы.\n", argv[optind]);</text:span></text:p>
      <text:p text:style-name="P161"><text:s text:c="40"/><text:span text:style-name="T177">err = ERR_OPT;</text:span></text:p>
      <text:p text:style-name="P161"><text:soft-page-break/><text:s text:c="32"/><text:span text:style-name="T177">}</text:span></text:p>
      <text:p text:style-name="P161"><text:s text:c="32"/><text:span text:style-name="T177">break;</text:span></text:p>
      <text:p text:style-name="P161"><text:s text:c="24"/><text:span text:style-name="T177">case '?':</text:span></text:p>
      <text:p text:style-name="P161"><text:s text:c="24"/><text:span text:style-name="T177">default:</text:span></text:p>
      <text:p text:style-name="P161"><text:s text:c="32"/><text:span text:style-name="T177">printf("Введенного флага не существует.\n");</text:span></text:p>
      <text:p text:style-name="P161"><text:s text:c="32"/><text:span text:style-name="T177">err = ERR_OPT;</text:span></text:p>
      <text:p text:style-name="P161"><text:s text:c="32"/><text:span text:style-name="T177">break;</text:span></text:p>
      <text:p text:style-name="P161"><text:s text:c="16"/><text:span text:style-name="T177">}</text:span></text:p>
      <text:p text:style-name="P161"><text:s text:c="8"/><text:span text:style-name="T177">}</text:span></text:p>
      <text:p text:style-name="P160"/>
      <text:p text:style-name="P161"><text:s text:c="8"/><text:span text:style-name="T177">/* Проверка на то, что последним подано имя входного файла */</text:span></text:p>
      <text:p text:style-name="P161"><text:s text:c="8"/><text:span text:style-name="T177">if (!flags.iname_flag || !img_iname){</text:span></text:p>
      <text:p text:style-name="P160"/>
      <text:p text:style-name="P161"><text:s text:c="16"/><text:span text:style-name="T177">if (argv[argc-1][0] != '-'){ </text:span></text:p>
      <text:p text:style-name="P161"><text:s text:c="24"/><text:span text:style-name="T177">img_iname = realloc(img_iname, strlen(argv[argc-1])); </text:span></text:p>
      <text:p text:style-name="P160"/>
      <text:p text:style-name="P161"><text:s text:c="24"/><text:span text:style-name="T177">if (img_iname){</text:span></text:p>
      <text:p text:style-name="P161"><text:s text:c="32"/><text:span text:style-name="T177">strcpy(img_iname, argv[argc-1]);</text:span></text:p>
      <text:p text:style-name="P161"><text:s text:c="32"/><text:span text:style-name="T177">if (read_image(my_image, img_iname, &amp;err))</text:span></text:p>
      <text:p text:style-name="P161"><text:s text:c="40"/><text:span text:style-name="T177">flags.iname_flag = 1;</text:span></text:p>
      <text:p text:style-name="P161"><text:s text:c="24"/><text:span text:style-name="T177">} else err = ERR_MEM;</text:span></text:p>
      <text:p text:style-name="P160"/>
      <text:p text:style-name="P161"><text:s text:c="16"/><text:span text:style-name="T177">} else <text:s/>if (!help_opt)</text:span></text:p>
      <text:p text:style-name="P161"><text:s text:c="24"/><text:span text:style-name="T177">err = ERR_INPUT_NAME;</text:span></text:p>
      <text:p text:style-name="P161"><text:s text:c="8"/><text:span text:style-name="T177">} <text:s text:c="6"/></text:span></text:p>
      <text:p text:style-name="P160"/>
      <text:p text:style-name="P161"><text:s text:c="8"/><text:span text:style-name="T177">if (img_iname != NULL &amp;&amp; strcmp(img_iname, img_oname) == 0){</text:span></text:p>
      <text:p text:style-name="P161"><text:s text:c="16"/><text:span text:style-name="T177">printf("Имена входного и выходного файлов совпадают\n");</text:span></text:p>
      <text:p text:style-name="P161"><text:s text:c="16"/><text:span text:style-name="T177">err = ERR_OUTPUT_NAME;</text:span></text:p>
      <text:p text:style-name="P161"><text:s text:c="8"/><text:span text:style-name="T177">}</text:span></text:p>
      <text:p text:style-name="P161"><text:s text:c="8"/></text:p>
      <text:p text:style-name="P161"><text:s text:c="8"/><text:span text:style-name="T177">if (!flags.err &amp;&amp; !help_opt) </text:span></text:p>
      <text:p text:style-name="P161"><text:soft-page-break/><text:s text:c="16"/><text:span text:style-name="T177">printf("Course work for option 4.16, created by Alina Kiseleva\n");</text:span></text:p>
      <text:p text:style-name="P160"/>
      <text:p text:style-name="P161"><text:s text:c="8"/><text:span text:style-name="T177">if (info_opt)</text:span></text:p>
      <text:p text:style-name="P161"><text:s text:c="16"/><text:span text:style-name="T177">print_png_info(my_image);</text:span></text:p>
      <text:p text:style-name="P160"/>
      <text:p text:style-name="P161"><text:s text:c="8"/><text:span text:style-name="T177">if (err) flags.err = 1;</text:span></text:p>
      <text:p text:style-name="P160"/>
      <text:p text:style-name="P161"><text:s text:c="8"/><text:span text:style-name="T177">int is_valid = check_input_data(flags);</text:span></text:p>
      <text:p text:style-name="P160"/>
      <text:p text:style-name="P161"><text:s text:c="8"/><text:span text:style-name="T177">if (is_valid){</text:span></text:p>
      <text:p text:style-name="P161"><text:s text:c="16"/><text:span text:style-name="T177">if (is_valid == 1)</text:span></text:p>
      <text:p text:style-name="P161"><text:s text:c="24"/><text:span text:style-name="T177">draw_square(my_square, my_image);</text:span></text:p>
      <text:p text:style-name="P161"><text:s text:c="16"/><text:span text:style-name="T177">else if (is_valid == 2)</text:span></text:p>
      <text:p text:style-name="P161"><text:s text:c="24"/><text:span text:style-name="T177">exchange_places(exchange_data, my_image, &amp;err);</text:span></text:p>
      <text:p text:style-name="P161"><text:s text:c="16"/><text:span text:style-name="T177">else if (is_valid == 3)</text:span></text:p>
      <text:p text:style-name="P161"><text:s text:c="24"/><text:span text:style-name="T177">replace_freq_color(my_freq_color, my_image, &amp;err);</text:span></text:p>
      <text:p text:style-name="P161"><text:s text:c="16"/><text:span text:style-name="T177">else if (is_valid == 4)</text:span></text:p>
      <text:p text:style-name="P161"><text:s text:c="24"/><text:span text:style-name="T177">make_contrast(my_contrast, my_image);</text:span></text:p>
      <text:p text:style-name="P161"><text:s text:c="16"/><text:span text:style-name="T177">write_image(my_image, img_oname, &amp;err);</text:span></text:p>
      <text:p text:style-name="P161"><text:s text:c="8"/><text:span text:style-name="T177">}</text:span></text:p>
      <text:p text:style-name="P161"><text:s text:c="8"/></text:p>
      <text:p text:style-name="P161"><text:s text:c="8"/><text:span text:style-name="T177">if (img_iname)</text:span></text:p>
      <text:p text:style-name="P161"><text:s text:c="16"/><text:span text:style-name="T177">free(img_iname);</text:span></text:p>
      <text:p text:style-name="P161"><text:s text:c="8"/><text:span text:style-name="T177">if (img_oname)</text:span></text:p>
      <text:p text:style-name="P161"><text:s text:c="16"/><text:span text:style-name="T177">free(img_oname);</text:span></text:p>
      <text:p text:style-name="P161"><text:s text:c="8"/><text:span text:style-name="T177">if (l_point) <text:s text:c="3"/></text:span></text:p>
      <text:p text:style-name="P161"><text:s text:c="16"/><text:span text:style-name="T177">free(l_point);</text:span></text:p>
      <text:p text:style-name="P161"><text:s text:c="8"/><text:span text:style-name="T177">if (r_point)</text:span></text:p>
      <text:p text:style-name="P161"><text:s text:c="16"/><text:span text:style-name="T177">free(r_point);</text:span></text:p>
      <text:p text:style-name="P161"><text:s text:c="8"/><text:span text:style-name="T177">if (color)</text:span></text:p>
      <text:p text:style-name="P161"><text:s text:c="16"/><text:span text:style-name="T177">free(color);</text:span></text:p>
      <text:p text:style-name="P161"><text:s text:c="8"/><text:span text:style-name="T177">if (fill_color) </text:span></text:p>
      <text:p text:style-name="P161"><text:s text:c="16"/><text:span text:style-name="T177">free(fill_color);</text:span></text:p>
      <text:p text:style-name="P161"><text:s text:c="8"/><text:span text:style-name="T177">if (my_square) <text:s/></text:span></text:p>
      <text:p text:style-name="P161"><text:s text:c="16"/><text:span text:style-name="T177">free(my_square);</text:span></text:p>
      <text:p text:style-name="P161"><text:s text:c="8"/><text:span text:style-name="T177">if (exchange_data) <text:s text:c="5"/></text:span></text:p>
      <text:p text:style-name="P161"><text:s text:c="16"/><text:span text:style-name="T177">free(exchange_data);</text:span></text:p>
      <text:p text:style-name="P161"><text:soft-page-break/><text:s text:c="8"/><text:span text:style-name="T177">if (my_freq_color)</text:span></text:p>
      <text:p text:style-name="P161"><text:s text:c="16"/><text:span text:style-name="T177">free(my_freq_color);</text:span></text:p>
      <text:p text:style-name="P161"><text:s text:c="8"/><text:span text:style-name="T177">if (my_image) <text:s text:c="2"/></text:span></text:p>
      <text:p text:style-name="P161"><text:s text:c="16"/><text:span text:style-name="T177">free(my_image);</text:span></text:p>
      <text:p text:style-name="P161"><text:s text:c="8"/><text:span text:style-name="T177">if (my_contrast) <text:s text:c="7"/></text:span></text:p>
      <text:p text:style-name="P161"><text:s text:c="16"/><text:span text:style-name="T177">free(my_contrast);</text:span></text:p>
      <text:p text:style-name="P160"/>
      <text:p text:style-name="P161"><text:s text:c="8"/><text:span text:style-name="T177">return err;</text:span></text:p>
      <text:p text:style-name="P162">}</text:p>
      <text:p text:style-name="P1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monospace"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loext:opacity="1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style: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style: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494cm" fo:margin-bottom="0cm" style:contextual-spacing="false" fo:line-height="0.483cm"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cm" fo:margin-bottom="0.353cm" style:contextual-spacing="false" fo:line-height="115%" fo:orphans="2" fo:widows="2" style:writing-mode="lr-tb"/>
      <style:text-properties fo:color="#000000" loext:opacity="100%" style:font-name="Times New Roman1"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1"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1" fo:font-family="'Times New Roman'" style:font-family-generic="roman" style:font-pitch="variable" fo:font-size="12pt" fo:letter-spacing="-0.002cm" fo:language="en" fo:country="US" style:letter-kerning="true"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shadow="none" style:writing-mode="lr-tb"/>
      <style:text-properties fo:color="#000000" loext:opacity="100%" style:font-name="Helvetica" fo:font-family="Helvetica" style:font-family-generic="swiss" style:font-pitch="variable" fo:font-size="10pt" fo:language="ru" fo:country="RU" style:font-name-asian="Times New Roman1"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1"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style: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text-indent="-0.635cm"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1.633cm" fo:margin-right="0cm" fo:margin-top="0cm" fo:margin-bottom="0cm" style: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style: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style: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1" style:font-family-complex="'Times New Roman'"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1"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1" fo:font-family="'Times New Roman'"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1"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1" fo:font-family="'Times New Roman'" style:font-family-generic="roman" style:font-pitch="variable" style:text-underline-style="none" style:font-name-complex="Times New Roman1"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1"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none" fo:font-weight="bold" style:font-size-asian="12pt" style:font-weight-asian="bold" style:font-name-complex="Times New Roman1"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1"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1"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1" fo:font-family="'Times New Roman'" style:font-family-generic="roman" style:font-pitch="variable" fo:background-color="#ffffff" style:font-name-complex="Times New Roman1"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1" style:font-family-complex="'Times New Roman'" style:font-family-generic-complex="roman" style:font-pitch-complex="variable"/>
    </style:style>
    <style:style style:name="hps" style:family="text" style:parent-style-name="Основной_20_шрифт_20_абзаца">
      <style:text-properties style:font-name-complex="Times New Roman1"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1"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1"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1"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1"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1"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loext:opacity="100%" style:font-name="Times New Roman" fo:font-family="'Times New Roman'" style:font-pitch="variable" fo:font-size="12pt" style:text-underline-style="solid" style:text-underline-width="auto" style:text-underline-color="font-color" style:font-name-asian="Times New Roman2" style:font-family-asian="'Times New Roman'" style:font-family-generic-asian="system" style:font-pitch-asian="variable"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0"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loext:num-list-format="%3%." style:num-suffix="." style:num-format="i">
        <style:list-level-properties text:list-level-position-and-space-mode="label-alignment">
          <style:list-level-label-alignment text:label-followed-by="listtab"/>
        </style:list-level-properties>
      </text:list-level-style-number>
      <text:list-level-style-number text:level="4" text:style-name="WW8Num1z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WW8Num1z0" loext:num-list-format="%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WW8Num1z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WW8Num1z0"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002cm"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paragraph-rsid="00410b01"/>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5"/></text:p>
      </style:header>
      <style:header-first>
        <text:p text:style-name="Header"/>
      </style:header-first>
      <style:footer>
        <text:p text:style-name="MP2"><text:page-number text:select-page="current">3</text:page-number></text:p>
        <text:p text:style-name="MP3"/>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ПРОЕКТ ЛЭТИ</dc:title>
    <dc:subject/>
    <meta:keyword/>
    <meta:initial-creator>SAP</meta:initial-creator>
    <meta:creation-date>2015-11-10T19:53:00</meta:creation-date>
    <dc:date>2025-06-01T23:43:36.868000000</dc:date>
    <meta:print-date>2015-07-17T12:06:00</meta:print-date>
    <meta:editing-cycles>16</meta:editing-cycles>
    <meta:editing-duration>PT3H56M23S</meta:editing-duration>
    <meta:generator>LibreOffice/24.8.0.3$Windows_X86_64 LibreOffice_project/0bdf1299c94fe897b119f97f3c613e9dca6be583</meta:generator>
    <meta:document-statistic meta:table-count="21" meta:image-count="10" meta:object-count="0" meta:page-count="55" meta:paragraph-count="1136" meta:word-count="5595" meta:character-count="64083" meta:non-whitespace-character-count="39009"/>
  </office:meta>
</office:document-meta>
</file>